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2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2">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3">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185">
      <style:graphic-properties draw:fill="none" draw:stroke="solid" svg:stroke-width="0.01389in" svg:stroke-color="#000000" svg:stroke-opacity="100%"/>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8">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2">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3">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1">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90%" fo:text-align="left" style:tab-stop-distance="0.74994in" fo:margin-left="0.18749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90%" fo:text-align="left" style:tab-stop-distance="0.74994in" fo:margin-left="0.56246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left" style:tab-stop-distance="0.74994in" fo:margin-left="0.56246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90%" fo:text-align="left" style:tab-stop-distance="0.74994in" fo:margin-left="0.56246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1">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2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8">
      <style:paragraph-properties fo:line-height="90%" fo:text-align="left" style:tab-stop-distance="0.74994in" fo:margin-left="0.18749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4">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7">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57292in" style:font-size-asian="0.57292in" style:font-size-complex="0.5729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8">
      <style:paragraph-properties fo:line-height="100%" fo:text-align="center" style:tab-stop-distance="0.93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9">
      <style:graphic-properties fo:wrap-option="wrap" fo:padding-top="0.04955in" fo:padding-bottom="0.04955in" fo:padding-left="0.0991in" fo:padding-right="0.099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00">
      <style:graphic-properties draw:fill="none" draw:stroke="solid" svg:stroke-width="0.01389in" svg:stroke-color="#000000" svg:stroke-opacity="100%"/>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2">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5">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6">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08">
      <style:text-properties fo:font-variant="normal" fo:text-transform="none" fo:color="#002e6d"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9">
      <style:text-properties fo:font-variant="normal" fo:text-transform="none" fo:color="#002e6d"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0">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90%" fo:text-align="left" style:tab-stop-distance="0.74994in" fo:margin-left="0.56246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90%" fo:text-align="left" style:tab-stop-distance="0.74994in" fo:margin-left="0.18749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0">
      <style:graphic-properties draw:fill="none" draw:stroke="solid" svg:stroke-width="0.01389in" svg:stroke-color="#000000" svg:stroke-opacity="100%"/>
    </style:style>
    <style:style style:family="text" style:name="a2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90%" fo:text-align="left" style:tab-stop-distance="0.74994in" fo:margin-left="0.18749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1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3">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4">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11">
      <style:text-properties fo:font-variant="normal" fo:text-transform="none" fo:color="#002e6d"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4">
      <style:text-properties fo:font-variant="normal" fo:text-transform="none" fo:color="#002e6d"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7">
      <style:text-properties fo:font-variant="normal" fo:text-transform="none" fo:color="#002e6d"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1">
      <style:paragraph-properties fo:line-height="90%" fo:text-align="left" style:tab-stop-distance="0.74994in" fo:margin-left="0.56246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3">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90%" fo:text-align="left" style:tab-stop-distance="0.74994in" fo:margin-left="0.56246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306" style:parent-style-name="Graphics">
      <style:graphic-properties draw:fill="none" fo:clip="rect(0in, 0in, 0in, 0in)" draw:stroke="none"/>
    </style:style>
    <style:style style:family="text" style:name="a2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90%" fo:text-align="left" style:tab-stop-distance="0.74994in" fo:margin-left="0.56246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center" style:tab-stop-distance="1in" fo:margin-left="0in" fo:margin-right="0in" fo:text-indent="0in" fo:margin-top="0.17708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0">
      <style:text-properties fo:font-variant="normal" fo:text-transform="none" fo:color="#1b1e29"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4">
      <style:text-properties fo:font-variant="normal" fo:text-transform="none" fo:color="#002e6d"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6">
      <style:text-properties fo:font-variant="normal" fo:text-transform="none" fo:color="#1b1e29"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7">
      <style:text-properties fo:font-variant="normal" fo:text-transform="none" fo:color="#1b1e29"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0">
      <style:graphic-properties draw:fill="none" draw:stroke="solid" svg:stroke-width="0.01389in" svg:stroke-color="#000000" svg:stroke-opacity="100%"/>
    </style:style>
    <style:style style:family="paragraph" style:name="a1740">
      <style:paragraph-properties fo:line-height="90%" fo:text-align="left" style:tab-stop-distance="0.74994in" fo:margin-left="0.56246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3">
      <style:paragraph-properties fo:line-height="90%" fo:text-align="left" style:tab-stop-distance="0.74994in" fo:margin-left="0.374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5">
      <style:paragraph-properties fo:line-height="100%" fo:text-align="left" style:tab-stop-distance="1.0555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90%" fo:text-align="left" style:tab-stop-distance="0.74994in" fo:margin-left="0.374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7">
      <style:paragraph-properties fo:line-height="100%" fo:text-align="left" style:tab-stop-distance="1.05556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90%" fo:text-align="left" style:tab-stop-distance="0.74994in" fo:margin-left="0.18749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paragraph" style:name="a2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01">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143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1432">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paragraph" style:name="a2004">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ext" style:name="a1434">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0">
      <style:text-properties fo:font-variant="normal" fo:text-transform="none" fo:color="#1b1e29"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05">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paragraph" style:name="a1435">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1">
      <style:text-properties fo:font-variant="normal" fo:text-transform="none" fo:color="#1b1e29"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color="#1b1e29" fo:font-size="0.22222in" style:font-size-asian="0.22222in" style:font-size-complex="0.22222in" fo:language="en" fo:country="US" fo:font-weight="bold" style:font-weight-asian="bold" style:font-weight-complex="bold" style:letter-kerning="true"/>
    </style:style>
    <style:style style:family="text" style:name="a2007">
      <style:text-properties fo:font-size="0.22222in" style:font-size-asian="0.22222in" style:font-size-complex="0.22222in" fo:language="en" fo:country="US" fo:font-weight="bold" style:font-weight-asian="bold" style:font-weight-complex="bold"/>
    </style:style>
    <style:style style:family="paragraph" style:name="a26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Arial"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8">
      <style:paragraph-properties/>
    </style:style>
    <style:style style:family="paragraph" style:name="a1438">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4">
      <style:text-properties fo:font-variant="normal" fo:text-transform="none" fo:color="#1b1e29"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6">
      <style:text-properties fo:font-variant="normal" fo:text-transform="none" fo:color="#1b1e29"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0%" fo:text-align="left" style:tab-stop-distance="1in" fo:margin-left="0in" fo:margin-right="0in" fo:text-indent="0in" fo:margin-top="0.04028in" fo:margin-bottom="0in" style:punctuation-wrap="simple" style:vertical-align="auto" style:writing-mode="lr-tb">
        <style:tab-stops>
          <style:tab-stop style:position="1.2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2">
      <style:paragraph-properties fo:line-height="90%" fo:text-align="left" style:tab-stop-distance="0.74994in" fo:margin-left="0.56246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4">
      <style:paragraph-properties fo:line-height="100%" fo:text-align="left" style:tab-stop-distance="1in" fo:margin-left="0.375in" fo:margin-right="0in" fo:text-indent="-0.375in" fo:margin-top="0.04028in" fo:margin-bottom="0in" style:punctuation-wrap="simple" style:vertical-align="auto" style:writing-mode="lr-tb">
        <style:tab-stops>
          <style:tab-stop style:position="0.91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90%" fo:text-align="left" style:tab-stop-distance="0.74994in" fo:margin-left="0.56246in" fo:margin-right="0in" fo:text-indent="-0.187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7">
      <style:paragraph-properties fo:line-height="100%" fo:text-align="left" style:tab-stop-distance="1in" fo:margin-left="0.8125in" fo:margin-right="0in" fo:text-indent="-0.3125in" fo:margin-top="0.04028in" fo:margin-bottom="0in" style:punctuation-wrap="simple" style:vertical-align="auto" style:writing-mode="lr-tb">
        <style:tab-stops>
          <style:tab-stop style:position="0.4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10">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paragraph" style:name="a2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0">
      <style:graphic-properties draw:fill="none" draw:stroke="solid" svg:stroke-width="0.01389in" svg:stroke-color="#000000" svg:stroke-opacity="100%"/>
    </style:style>
    <style:style style:family="drawing-page" style:name="a20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2">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0">
      <style:text-properties fo:font-variant="normal" fo:text-transform="none" fo:color="#002e6d"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29861in" style:font-size-asian="0.29861in" style:font-size-complex="0.29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6">
      <style:paragraph-properties fo:line-height="90%" fo:text-align="left" style:tab-stop-distance="0.74994in" fo:margin-left="0.56181in" fo:margin-right="0in" fo:text-indent="-0.18681in" fo:margin-top="0.05208in" fo:margin-bottom="0.08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2">
      <style:text-properties fo:font-variant="normal" fo:text-transform="none" fo:color="#1b1e29"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29861in" style:font-size-asian="0.29861in" style:font-size-complex="0.29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3">
      <style:text-properties fo:font-variant="normal" fo:text-transform="none" fo:color="#1b1e29"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90%" fo:text-align="left" style:tab-stop-distance="0.74994in" fo:margin-left="0.56181in" fo:margin-right="0in" fo:text-indent="-0.18681in" fo:margin-top="0.05208in" fo:margin-bottom="0.08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6">
      <style:text-properties fo:font-variant="normal" fo:text-transform="none" fo:color="#1b1e29"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7">
      <style:text-properties fo:font-variant="normal" fo:text-transform="none" fo:color="#1b1e29"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0">
      <style:paragraph-properties fo:line-height="100%" fo:text-align="left" style:tab-stop-distance="1in" fo:margin-left="0.8125in" fo:margin-right="0in" fo:text-indent="-0.3125in" fo:margin-top="0.04028in" fo:margin-bottom="0in" style:punctuation-wrap="simple" style:vertical-align="auto" style:writing-mode="lr-tb">
        <style:tab-stops>
          <style:tab-stop style:position="0.4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1">
      <style:graphic-properties draw:fill="none" draw:stroke="solid" svg:stroke-width="0.01389in" svg:stroke-color="#000000" svg:stroke-opacity="100%"/>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3">
      <style:paragraph-properties fo:line-height="100%" fo:text-align="left" style:tab-stop-distance="1in" fo:margin-left="0.8125in" fo:margin-right="0in" fo:text-indent="-0.3125in" fo:margin-top="0.04028in" fo:margin-bottom="0in" style:punctuation-wrap="simple" style:vertical-align="auto" style:writing-mode="lr-tb">
        <style:tab-stops>
          <style:tab-stop style:position="0.4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6">
      <style:paragraph-properties fo:line-height="100%" fo:text-align="left" style:tab-stop-distance="1in" fo:margin-left="0.8125in" fo:margin-right="0in" fo:text-indent="-0.3125in" fo:margin-top="0.04028in" fo:margin-bottom="0in" style:punctuation-wrap="simple" style:vertical-align="auto" style:writing-mode="lr-tb">
        <style:tab-stops>
          <style:tab-stop style:position="0.4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7">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9">
      <style:paragraph-properties fo:line-height="100%" fo:text-align="left" style:tab-stop-distance="1in" fo:margin-left="0.375in" fo:margin-right="0in" fo:text-indent="-0.375in" fo:margin-top="0.04028in" fo:margin-bottom="0in" style:punctuation-wrap="simple" style:vertical-align="auto" style:writing-mode="lr-tb">
        <style:tab-stops>
          <style:tab-stop style:position="0.91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29861in" style:font-size-asian="0.29861in" style:font-size-complex="0.29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90%" fo:text-align="left" style:tab-stop-distance="0.74994in" fo:margin-left="0.56181in" fo:margin-right="0in" fo:text-indent="-0.18681in" fo:margin-top="0.05208in" fo:margin-bottom="0.08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0">
      <style:text-properties fo:font-variant="normal" fo:text-transform="none" fo:color="#002e6d"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90%" fo:text-align="left" style:tab-stop-distance="0.74994in" fo:margin-left="0.18681in" fo:margin-right="0in" fo:text-indent="-0.18681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7">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8">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29861in" style:font-size-asian="0.29861in" style:font-size-complex="0.29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654" style:parent-style-name="Graphics">
      <style:graphic-properties draw:fill="none" fo:clip="rect(0in, 0in, 0in, 0in)" draw:stroke="none"/>
    </style:style>
    <style:style style:family="paragraph" style:name="a2029">
      <style:paragraph-properties fo:line-height="90%" fo:text-align="left" style:tab-stop-distance="0.74994in" fo:margin-left="0.56181in" fo:margin-right="0in" fo:text-indent="-0.18681in" fo:margin-top="0.05208in" fo:margin-bottom="0.08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5" style:parent-style-name="Graphics">
      <style:graphic-properties draw:fill="none" fo:clip="rect(3.18193in, 0in, 0in, 0in)" draw:stroke="none"/>
    </style:style>
    <style:style style:family="graphic" style:name="a2656" style:parent-style-name="Graphics">
      <style:graphic-properties draw:fill="none" fo:clip="rect(0in, 0in, 0in, 0in)" draw:stroke="none"/>
    </style:style>
    <style:style style:family="graphic" style:name="a2657" style:parent-style-name="Graphics">
      <style:graphic-properties draw:fill="none" draw:stroke="none"/>
    </style:style>
    <style:style style:family="graphic" style:name="a2658" style:parent-style-name="Graphics">
      <style:graphic-properties draw:fill="none" draw:stroke="none"/>
    </style:style>
    <style:style style:family="presentation" style:name="a2659">
      <style:graphic-properties draw:fill="none" draw:stroke="solid" svg:stroke-width="0.01389in" svg:stroke-color="#000000" svg:stroke-opacity="100%"/>
    </style:style>
    <style:style style:family="paragraph" style:name="a1770">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2">
      <style:paragraph-properties fo:line-height="100%" fo:text-align="left" style:tab-stop-distance="1in" fo:margin-left="0.8125in" fo:margin-right="0in" fo:text-indent="-0.3125in" fo:margin-top="0.04028in" fo:margin-bottom="0in" style:punctuation-wrap="simple" style:vertical-align="auto" style:writing-mode="lr-tb">
        <style:tab-stops>
          <style:tab-stop style:position="0.4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left" style:tab-stop-distance="1in" fo:margin-left="0.8125in" fo:margin-right="0in" fo:text-indent="-0.3125in" fo:margin-top="0.04028in" fo:margin-bottom="0in" style:punctuation-wrap="simple" style:vertical-align="auto" style:writing-mode="lr-tb">
        <style:tab-stops>
          <style:tab-stop style:position="0.4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100%" fo:text-align="left" style:tab-stop-distance="1in" fo:margin-left="0.8125in" fo:margin-right="0in" fo:text-indent="-0.3125in" fo:margin-top="0.04028in" fo:margin-bottom="0in" style:punctuation-wrap="simple" style:vertical-align="auto" style:writing-mode="lr-tb">
        <style:tab-stops>
          <style:tab-stop style:position="0.4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4">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1779">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29861in" style:font-size-asian="0.29861in" style:font-size-complex="0.29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2">
      <style:paragraph-properties fo:line-height="90%" fo:text-align="left" style:tab-stop-distance="0.74994in" fo:margin-left="0.56181in" fo:margin-right="0in" fo:text-indent="-0.18681in" fo:margin-top="0.05208in" fo:margin-bottom="0.08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29861in" style:font-size-asian="0.29861in" style:font-size-complex="0.29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left" style:tab-stop-distance="0.74994in" fo:margin-left="0.56246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5">
      <style:paragraph-properties fo:line-height="90%" fo:text-align="left" style:tab-stop-distance="0.74994in" fo:margin-left="0.56181in" fo:margin-right="0in" fo:text-indent="-0.18681in" fo:margin-top="0.05208in" fo:margin-bottom="0.08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29861in" style:font-size-asian="0.29861in" style:font-size-complex="0.29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left" style:tab-stop-distance="0.74994in" fo:margin-left="0.56246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8">
      <style:paragraph-properties fo:line-height="90%" fo:text-align="left" style:tab-stop-distance="0.74994in" fo:margin-left="0.18681in" fo:margin-right="0in" fo:text-indent="-0.18681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9">
      <style:paragraph-properties fo:line-height="90%" fo:text-align="left" style:tab-stop-distance="1in" fo:margin-left="0.1836in" fo:margin-right="0in" fo:text-indent="-0.1836in" fo:margin-top="0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1">
      <style:paragraph-properties fo:line-height="100%" fo:text-align="left" style:tab-stop-distance="1in" fo:margin-left="0.375in" fo:margin-right="0in" fo:text-indent="-0.375in" fo:margin-top="0.04028in" fo:margin-bottom="0in" style:punctuation-wrap="simple" style:vertical-align="auto" style:writing-mode="lr-tb">
        <style:tab-stops>
          <style:tab-stop style:position="0.91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4">
      <style:paragraph-properties fo:line-height="100%" fo:text-align="left" style:tab-stop-distance="1in" fo:margin-left="0.8125in" fo:margin-right="0in" fo:text-indent="-0.3125in" fo:margin-top="0.04028in" fo:margin-bottom="0in" style:punctuation-wrap="simple" style:vertical-align="auto" style:writing-mode="lr-tb">
        <style:tab-stops>
          <style:tab-stop style:position="0.4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7">
      <style:paragraph-properties fo:line-height="100%" fo:text-align="left" style:tab-stop-distance="1in" fo:margin-left="0.8125in" fo:margin-right="0in" fo:text-indent="-0.3125in" fo:margin-top="0.04028in" fo:margin-bottom="0in" style:punctuation-wrap="simple" style:vertical-align="auto" style:writing-mode="lr-tb">
        <style:tab-stops>
          <style:tab-stop style:position="0.4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70">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3">
      <style:paragraph-properties fo:line-height="90%" fo:text-align="left" style:tab-stop-distance="0.74994in" fo:margin-left="0.56246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45">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90%" fo:text-align="left" style:tab-stop-distance="0.74994in" fo:margin-left="0.56246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2">
      <style:paragraph-properties fo:line-height="90%" fo:text-align="left" style:tab-stop-distance="1in" fo:margin-left="0.1836in" fo:margin-right="0in" fo:text-indent="-0.1836in" fo:margin-top="0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48">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Arial"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5">
      <style:paragraph-properties fo:line-height="90%" fo:text-align="left" style:tab-stop-distance="1in" fo:margin-left="0.1836in" fo:margin-right="0in" fo:text-indent="-0.1836in" fo:margin-top="0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8">
      <style:paragraph-properties fo:line-height="90%" fo:text-align="left" style:tab-stop-distance="1in" fo:margin-left="0.1836in" fo:margin-right="0in" fo:text-indent="-0.1836in" fo:margin-top="0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0">
      <style:paragraph-properties fo:line-height="100%" fo:text-align="left" style:tab-stop-distance="1in" fo:margin-left="0.375in" fo:margin-right="0in" fo:text-indent="-0.375in" fo:margin-top="0.04028in" fo:margin-bottom="0in" style:punctuation-wrap="simple" style:vertical-align="auto" style:writing-mode="lr-tb">
        <style:tab-stops>
          <style:tab-stop style:position="0.91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3">
      <style:paragraph-properties fo:line-height="100%" fo:text-align="left" style:tab-stop-distance="1in" fo:margin-left="0.375in" fo:margin-right="0in" fo:text-indent="-0.375in" fo:margin-top="0.04028in" fo:margin-bottom="0in" style:punctuation-wrap="simple" style:vertical-align="auto" style:writing-mode="lr-tb">
        <style:tab-stops>
          <style:tab-stop style:position="0.91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75in" style:font-size-asian="0.375in" style:font-size-complex="0.37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3">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366">
      <style:paragraph-properties fo:line-height="100%" fo:text-align="left" style:tab-stop-distance="1in" fo:margin-left="0.8125in" fo:margin-right="0in" fo:text-indent="-0.3125in" fo:margin-top="0.04028in" fo:margin-bottom="0in" style:punctuation-wrap="simple" style:vertical-align="auto" style:writing-mode="lr-tb">
        <style:tab-stops>
          <style:tab-stop style:position="0.4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795">
      <style:table-properties style:writing-mode="lr-tb"/>
    </style:style>
    <style:style style:family="table-column" style:name="a1796">
      <style:table-column-properties style:column-width="3.07426in"/>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97">
      <style:table-column-properties style:column-width="3.07426in"/>
    </style:style>
    <style:style style:family="paragraph" style:name="a2369">
      <style:paragraph-properties fo:line-height="100%" fo:text-align="left" style:tab-stop-distance="1in" fo:margin-left="0.8125in" fo:margin-right="0in" fo:text-indent="-0.3125in" fo:margin-top="0.04028in" fo:margin-bottom="0in" style:punctuation-wrap="simple" style:vertical-align="auto" style:writing-mode="lr-tb">
        <style:tab-stops>
          <style:tab-stop style:position="0.4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98">
      <style:table-column-properties style:column-width="3.07426in"/>
    </style:style>
    <style:style style:family="table-row" style:name="a1799">
      <style:table-row-properties style:row-height="0.53033in"/>
    </style:style>
    <style:style style:family="text" style:name="a2050">
      <style:text-properties fo:font-variant="normal" fo:text-transform="none" fo:color="#1b1e2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draw:fill="none" draw:stroke="solid" svg:stroke-width="0.01389in" svg:stroke-color="#000000" svg:stroke-opacity="100%"/>
    </style:style>
    <style:style style:family="graphic" style:name="a20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53">
      <style:graphic-properties draw:fill="none" draw:stroke="solid" svg:stroke-width="0.01389in" svg:stroke-color="#000000" svg:stroke-opacity="100%"/>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1">
      <style:paragraph-properties fo:line-height="90%" fo:text-align="left" style:tab-stop-distance="1in" fo:margin-left="0.1836in" fo:margin-right="0in" fo:text-indent="-0.1836in" fo:margin-top="0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6">
      <style:paragraph-properties fo:line-height="90%" fo:text-align="left" style:tab-stop-distance="1in" fo:margin-left="0in" fo:margin-right="0in" fo:text-indent="0in" fo:margin-top="0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8">
      <style:paragraph-properties fo:line-height="90%" fo:text-align="left" style:tab-stop-distance="1in" fo:margin-left="0in" fo:margin-right="0in" fo:text-indent="0in" fo:margin-top="0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2">
      <style:paragraph-properties fo:line-height="100%" fo:text-align="left" style:tab-stop-distance="1.056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4">
      <style:paragraph-properties fo:line-height="100%" fo:text-align="left" style:tab-stop-distance="1.05691in" fo:margin-left="0.87492in" fo:margin-right="0in" fo:text-indent="-0.374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left" style:tab-stop-distance="1.05691in" fo:margin-left="0.87492in" fo:margin-right="0in" fo:text-indent="-0.374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2">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02967in" fo:margin-left="0.69751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5">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0">
      <style:paragraph-properties fo:line-height="100%" fo:text-align="left" style:tab-stop-distance="1in" fo:margin-left="0.30443in" fo:margin-right="0in" fo:text-indent="-0.3044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1.02967in" fo:margin-left="0.69751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8">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3">
      <style:paragraph-properties fo:line-height="100%" fo:text-align="left" style:tab-stop-distance="1in" fo:margin-left="0.30443in" fo:margin-right="0in" fo:text-indent="-0.3044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02967in" fo:margin-left="0.69751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2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80">
      <style:paragraph-properties fo:line-height="100%" fo:text-align="left" style:tab-stop-distance="1.05691in" fo:margin-left="0.87492in" fo:margin-right="0in" fo:text-indent="-0.374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left" style:tab-stop-distance="1.05691in" fo:margin-left="0.87492in" fo:margin-right="0in" fo:text-indent="-0.374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6">
      <style:paragraph-properties fo:line-height="100%" fo:text-align="left" style:tab-stop-distance="1.05691in" fo:margin-left="0.87492in" fo:margin-right="0in" fo:text-indent="-0.374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00%" fo:text-align="left" style:tab-stop-distance="1.05691in" fo:margin-left="0.87492in" fo:margin-right="0in" fo:text-indent="-0.374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6">
      <style:paragraph-properties fo:line-height="100%" fo:text-align="left" style:tab-stop-distance="1.008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2">
      <style:paragraph-properties fo:line-height="100%" fo:text-align="left" style:tab-stop-distance="1.05691in" fo:margin-left="0.87492in" fo:margin-right="0in" fo:text-indent="-0.374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23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9">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80">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20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3">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90%" fo:text-align="left" style:tab-stop-distance="0.74994in" fo:margin-left="0.18749in" fo:margin-right="0in" fo:text-indent="-0.18749in" fo:margin-top="0.17708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90%" fo:text-align="left" style:tab-stop-distance="0.74994in" fo:margin-left="0.18749in" fo:margin-right="0in" fo:text-indent="-0.18749in" fo:margin-top="0.17708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0">
      <style:paragraph-properties fo:line-height="90%" fo:text-align="left" style:tab-stop-distance="0.74994in" fo:margin-left="0.18749in" fo:margin-right="0in" fo:text-indent="-0.18749in" fo:margin-top="0.17708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90%" fo:text-align="left" style:tab-stop-distance="0.74994in" fo:margin-left="0.18749in" fo:margin-right="0in" fo:text-indent="-0.18749in" fo:margin-top="0.17708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6">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9">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2">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3">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75in" style:font-size-asian="0.375in" style:font-size-complex="0.37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4">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 style:name="a1906">
      <style:table-properties style:writing-mode="lr-tb"/>
    </style:style>
    <style:style style:family="table-column" style:name="a1907">
      <style:table-column-properties style:column-width="2.97855in"/>
    </style:style>
    <style:style style:family="table-column" style:name="a1908">
      <style:table-column-properties style:column-width="2.97855in"/>
    </style:style>
    <style:style style:family="table-column" style:name="a1909">
      <style:table-column-properties style:column-width="2.97855in"/>
    </style:style>
    <style:style style:family="table-row" style:name="a1910">
      <style:table-row-properties style:row-height="0.53033in"/>
    </style:style>
    <style:style style:family="text" style:name="a1911">
      <style:text-properties fo:color="#ffffff"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text" style:name="a1912">
      <style:text-properties fo:color="#ffffff" fo:font-family="Calibri"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paragraph" style:name="a1913">
      <style:paragraph-properties fo:line-height="100%" fo:text-align="center" style:tab-stop-distance="0.74994in" fo:margin-left="0in" fo:margin-right="0in" fo:text-indent="0in" fo:margin-top="0in" fo:margin-bottom="0in" style:punctuation-wrap="hanging" style:vertical-align="auto" style:writing-mode="lr-tb">
        <style:tab-stops/>
      </style:paragraph-properties>
    </style:style>
    <style:style style:family="table-cell" style:name="a1914">
      <style:table-cell-properties style:vertical-align="top" fo:background-color="#c00000"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1915">
      <style:text-properties fo:color="#ffffff"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text" style:name="a1916">
      <style:text-properties fo:color="#ffffff" fo:font-family="Calibri"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paragraph" style:name="a1917">
      <style:paragraph-properties fo:line-height="100%" fo:text-align="center" style:tab-stop-distance="0.74994in" fo:margin-left="0in" fo:margin-right="0in" fo:text-indent="0in" fo:margin-top="0in" fo:margin-bottom="0in" style:punctuation-wrap="hanging" style:vertical-align="auto" style:writing-mode="lr-tb">
        <style:tab-stops/>
      </style:paragraph-properties>
    </style:style>
    <style:style style:family="table-cell" style:name="a1918">
      <style:table-cell-properties style:vertical-align="top" fo:background-color="#c00000"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1919">
      <style:text-properties fo:color="#ffffff"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2">
      <style:graphic-properties fo:wrap-option="wrap" fo:padding-top="0.05in" fo:padding-bottom="0.05in" fo:padding-left="0.1in" fo:padding-right="0.1in" draw:textarea-vertical-align="middle" draw:textarea-horizontal-align="center" draw:fill="solid" draw:fill-color="#00b050" draw:opacity="30%" draw:stroke="solid" svg:stroke-width="0.01389in" svg:stroke-color="#3c3c3c" svg:stroke-opacity="100%" draw:stroke-linejoin="miter" svg:stroke-linecap="butt" draw:auto-grow-width="false" draw:auto-grow-height="false"/>
      <style:paragraph-properties style:font-independent-line-spacing="true" style:writing-mode="lr-tb"/>
    </style:style>
    <style:style style:family="paragraph" style:name="a1607">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3">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8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8">
      <style:graphic-properties fo:wrap-option="wrap" fo:padding-top="0.05in" fo:padding-bottom="0.05in" fo:padding-left="0.1in" fo:padding-right="0.1in" draw:textarea-vertical-align="middle" draw:textarea-horizontal-align="center" draw:fill="solid" draw:fill-color="#1b1e29" draw:opacity="15%" draw:stroke="solid" svg:stroke-width="0.01389in" svg:stroke-color="#3c3c3c" svg:stroke-opacity="100%" draw:stroke-linejoin="miter" svg:stroke-linecap="butt" draw:auto-grow-width="false" draw:auto-grow-height="false"/>
      <style:paragraph-properties style:font-independent-line-spacing="true" style:writing-mode="lr-tb"/>
    </style:style>
    <style:style style:family="text" style:name="a2809">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color="#ffffff" fo:font-family="Calibri"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paragraph" style:name="a1921">
      <style:paragraph-properties fo:line-height="100%" fo:text-align="center" style:tab-stop-distance="0.74994in" fo:margin-left="0in" fo:margin-right="0in" fo:text-indent="0in" fo:margin-top="0in" fo:margin-bottom="0in" style:punctuation-wrap="hanging" style:vertical-align="auto" style:writing-mode="lr-tb">
        <style:tab-stops/>
      </style:paragraph-properties>
    </style:style>
    <style:style style:family="table-cell" style:name="a1922">
      <style:table-cell-properties style:vertical-align="top" fo:background-color="#c00000"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able-row" style:name="a1923">
      <style:table-row-properties style:row-height="0.53033in"/>
    </style:style>
    <style:style style:family="text" style:name="a1924">
      <style:text-properties fo:color="#1b1e29" fo:font-size="0.22222in" style:font-size-asian="0.22222in" style:font-size-complex="0.22222in" fo:language="en" fo:country="US" fo:font-weight="bold" style:font-weight-asian="bold" style:font-weight-complex="bold" style:letter-kerning="true"/>
    </style:style>
    <style:style style:family="text" style:name="a1925">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paragraph" style:name="a1926">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able-cell" style:name="a1927">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1928">
      <style:text-properties fo:color="#1b1e29" fo:font-size="0.22222in" style:font-size-asian="0.22222in" style:font-size-complex="0.22222in" fo:language="en" fo:country="US" fo:font-weight="bold" style:font-weight-asian="bold" style:font-weight-complex="bold" style:letter-kerning="true"/>
    </style:style>
    <style:style style:family="text" style:name="a1929">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2">
      <style:text-properties fo:font-variant="normal" fo:text-transform="none" fo:color="#bfbfbf" style:text-line-through-type="none" style:text-line-through-style="none" style:text-line-through-width="auto" style:text-line-through-color="font-color" style:text-position="0% 100%" fo:font-family="Fave Script Bold Pr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3">
      <style:text-properties fo:font-variant="normal" fo:text-transform="none" fo:color="#1b1e29" style:text-line-through-type="none" style:text-line-through-style="none" style:text-line-through-width="auto" style:text-line-through-color="font-color" style:text-position="0% 100%" fo:font-family="Fave Script Bold Pr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816">
      <style:graphic-properties draw:fill="none" draw:stroke="solid" svg:stroke-width="0.01389in" svg:stroke-color="#000000" svg:stroke-opacity="100%"/>
    </style:style>
    <style:style style:family="text" style:name="a28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paragraph" style:name="a2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31">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color="#1b1e29" fo:font-size="0.22222in" style:font-size-asian="0.22222in" style:font-size-complex="0.22222in" fo:language="en" fo:country="US" fo:font-weight="bold" style:font-weight-asian="bold" style:font-weight-complex="bold" style:letter-kerning="tru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color="#1b1e29" fo:font-size="0.22222in" style:font-size-asian="0.22222in" style:font-size-complex="0.22222in" fo:language="en" fo:country="US" fo:font-weight="bold" style:font-weight-asian="bold" style:font-weight-complex="bold" style:letter-kerning="tru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style:style>
    <style:style style:family="paragraph" style:name="a2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2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style:style>
    <style:style style:family="paragraph" style:name="a2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7">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8">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9">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0">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paragraph" style:name="a2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41">
      <style:table-row-properties style:row-height="0.53033in"/>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2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paragraph" style:name="a2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45">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presentation" style:name="a251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1946">
      <style:text-properties fo:color="#1b1e29" fo:font-size="0.22222in" style:font-size-asian="0.22222in" style:font-size-complex="0.22222in" fo:language="en" fo:country="US" fo:font-weight="bold" style:font-weight-asian="bold" style:font-weight-complex="bold" style:letter-kerning="true"/>
    </style:style>
    <style:style style:family="drawing-page" style:name="a2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7">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drawing-page" style:name="a25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8">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ext" style:name="a2519">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able-cell" style:name="a1949">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paragraph" style:name="a2200">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2">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3">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1">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3">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9">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9">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0">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2521">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1952">
      <style:paragraph-properties/>
    </style:style>
    <style:style style:family="text" style:name="a2523">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4">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color="#1b1e29" fo:font-size="0.22222in" style:font-size-asian="0.22222in" style:font-size-complex="0.22222in" fo:language="en" fo:country="US" fo:font-weight="bold" style:font-weight-asian="bold" style:font-weight-complex="bold" style:letter-kerning="true"/>
    </style:style>
    <style:style style:family="text" style:name="a1955">
      <style:text-properties fo:font-size="0.22222in" style:font-size-asian="0.22222in" style:font-size-complex="0.22222in" fo:language="en" fo:country="US" fo:font-weight="bold" style:font-weight-asian="bold" style:font-weight-complex="bold"/>
    </style:style>
    <style:style style:family="presentation" style:name="a2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56">
      <style:paragraph-properties/>
    </style:style>
    <style:style style:family="text" style:name="a2527">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8">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58">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able-row" style:name="a1959">
      <style:table-row-properties style:row-height="0.53033in"/>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5">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2">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202124" style:text-line-through-type="none" style:text-line-through-style="none" style:text-line-through-width="auto" style:text-line-through-color="font-color" style:text-position="0% 100%" fo:font-family="Robot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1b1e2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9">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5">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8">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0">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color="#1b1e29" fo:font-size="0.22222in" style:font-size-asian="0.22222in" style:font-size-complex="0.22222in" fo:language="en" fo:country="US" fo:font-weight="bold" style:font-weight-asian="bold" style:font-weight-complex="bold" style:letter-kerning="true"/>
    </style:style>
    <style:style style:family="text" style:name="a253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61">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text" style:name="a2532">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paragraph" style:name="a2533">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63">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1964">
      <style:text-properties fo:color="#1b1e29" fo:font-size="0.22222in" style:font-size-asian="0.22222in" style:font-size-complex="0.22222in" fo:language="en" fo:country="US" fo:font-weight="bold" style:font-weight-asian="bold" style:font-weight-complex="bold" style:letter-kerning="true"/>
    </style:style>
    <style:style style:family="text" style:name="a253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size="0.22222in" style:font-size-asian="0.22222in" style:font-size-complex="0.22222in" fo:language="en" fo:country="US" fo:font-weight="bold" style:font-weight-asian="bold" style:font-weight-complex="bold"/>
    </style:style>
    <style:style style:family="paragraph" style:name="a2536">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6">
      <style:paragraph-properties/>
    </style:style>
    <style:style style:family="presentation" style:name="a2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68">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2539">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color="#1b1e29" fo:font-size="0.22222in" style:font-size-asian="0.22222in" style:font-size-complex="0.22222in" fo:language="en" fo:country="US" fo:font-weight="bold" style:font-weight-asian="bold" style:font-weight-complex="bold" style:letter-kerning="true"/>
    </style:style>
    <style:style style:family="drawing-page" style:name="a2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2">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2">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2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6">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2">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2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3">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6">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1">
      <style:drawing-page-properties draw:fill="solid" draw:fill-color="#003e7f" draw:opacity="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2">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83333in" style:font-size-asian="0.83333in" style:font-size-complex="0.83333in" fo:letter-spacing="-0.031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3">
      <style:paragraph-properties fo:line-height="75%"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540">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45">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1346">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2">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style:style>
    <style:style style:family="paragraph" style:name="a2543">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3">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1349">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size="0.22222in" style:font-size-asian="0.22222in" style:font-size-complex="0.22222in" fo:language="en" fo:country="US" fo:font-weight="bold" style:font-weight-asian="bold" style:font-weight-complex="bold"/>
    </style:style>
    <style:style style:family="paragraph" style:name="a1975">
      <style:paragraph-properties/>
    </style:style>
    <style:style style:family="paragraph" style:name="a2546">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77">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presentation" style:name="a2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978">
      <style:table-row-properties style:row-height="0.53033in"/>
    </style:style>
    <style:style style:family="text" style:name="a2549">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color="#1b1e29" fo:font-size="0.22222in" style:font-size-asian="0.22222in" style:font-size-complex="0.22222in" fo:language="en" fo:country="US" fo:font-weight="bold" style:font-weight-asian="bold" style:font-weight-complex="bold" style:letter-kerning="true"/>
    </style:style>
    <style:style style:family="graphic" style:name="a2230">
      <style:graphic-properties fo:wrap-option="wrap" fo:padding-top="0.05in" fo:padding-bottom="0.05in" fo:padding-left="0.1in" fo:padding-right="0.1in" draw:textarea-vertical-align="top" draw:textarea-horizontal-align="left" draw:fill="solid" draw:fill-color="#ac162c" draw:opacity="100%" draw:stroke="solid" svg:stroke-width="0.01042in" svg:stroke-color="#001970" svg:stroke-opacity="100%" draw:stroke-linejoin="miter" svg:stroke-linecap="butt" draw:auto-grow-width="false" draw:auto-grow-height="false"/>
      <style:paragraph-properties style:font-independent-line-spacing="true" style:writing-mode="lr-tb"/>
    </style:style>
    <style:style style:family="text" style:name="a1660">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3">
      <style:graphic-properties fo:wrap-option="wrap" fo:padding-top="0.05in" fo:padding-bottom="0.05in" fo:padding-left="0.1in" fo:padding-right="0.1in" draw:textarea-vertical-align="top" draw:textarea-horizontal-align="left" draw:fill="solid" draw:fill-color="#ac162c" draw:opacity="100%" draw:stroke="solid" svg:stroke-width="0.01042in" svg:stroke-color="#001970" svg:stroke-opacity="100%" draw:stroke-linejoin="miter" svg:stroke-linecap="butt" draw:auto-grow-width="false" draw:auto-grow-height="false"/>
      <style:paragraph-properties style:font-independent-line-spacing="true" style:writing-mode="lr-tb"/>
    </style:style>
    <style:style style:family="presentation" style:name="a1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1">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6">
      <style:graphic-properties fo:wrap-option="wrap" fo:padding-top="0.05in" fo:padding-bottom="0.05in" fo:padding-left="0.1in" fo:padding-right="0.1in" draw:textarea-vertical-align="top" draw:textarea-horizontal-align="left" draw:fill="solid" draw:fill-color="#ac162c" draw:opacity="100%" draw:stroke="solid" svg:stroke-width="0.01042in" svg:stroke-color="#001970" svg:stroke-opacity="100%" draw:stroke-linejoin="miter" svg:stroke-linecap="butt" draw:auto-grow-width="false" draw:auto-grow-height="false"/>
      <style:paragraph-properties style:font-independent-line-spacing="true" style:writing-mode="lr-tb"/>
    </style:style>
    <style:style style:family="text" style:name="a22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8">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9">
      <style:graphic-properties fo:wrap-option="wrap" fo:padding-top="0.05in" fo:padding-bottom="0.05in" fo:padding-left="0.1in" fo:padding-right="0.1in" draw:textarea-vertical-align="top" draw:textarea-horizontal-align="left" draw:fill="solid" draw:fill-color="#969696" draw:opacity="100%" draw:stroke="solid" svg:stroke-width="0.01389in" svg:stroke-color="#001970" svg:stroke-opacity="100%" draw:stroke-linejoin="miter" svg:stroke-linecap="butt" draw:auto-grow-width="false" draw:auto-grow-height="false"/>
      <style:paragraph-properties style:font-independent-line-spacing="true" style:writing-mode="lr-tb"/>
    </style:style>
    <style:style style:family="paragraph" style:name="a286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7">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52">
      <style:text-properties fo:font-variant="normal" fo:text-transform="none" fo:color="#1b1e29" style:text-line-through-type="none" style:text-line-through-style="none" style:text-line-through-width="auto" style:text-line-through-color="font-color" style:text-position="0% 100%" fo:font-family="Calibri" fo:font-size="0.23333in" style:font-size-asian="0.23333in" style:font-size-complex="0.2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0">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3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51">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80">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presentation" style:name="a1355">
      <style:graphic-properties draw:fill="none" draw:stroke="solid" svg:stroke-width="0.01389in" svg:stroke-color="#000000" svg:stroke-opacity="100%"/>
    </style:style>
    <style:style style:family="paragraph" style:name="a2552">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1">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7">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82">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2554">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color="#1b1e29" fo:font-size="0.22222in" style:font-size-asian="0.22222in" style:font-size-complex="0.22222in" fo:language="en" fo:country="US" fo:font-weight="bold" style:font-weight-asian="bold" style:font-weight-complex="bold"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5">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size="0.22222in" style:font-size-asian="0.22222in" style:font-size-complex="0.22222in" fo:language="en" fo:country="US" fo:font-weight="bold" style:font-weight-asian="bold" style:font-weight-complex="bold"/>
    </style:style>
    <style:style style:family="paragraph" style:name="a1359">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style:style>
    <style:style style:family="presentation" style:name="a2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8">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87">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paragraph" style:name="a2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color="#1b1e29" fo:font-size="0.22222in" style:font-size-asian="0.22222in" style:font-size-complex="0.22222in" fo:language="en" fo:country="US" fo:font-weight="bold" style:font-weight-asian="bold" style:font-weight-complex="bold" style:letter-kerning="true"/>
    </style:style>
    <style:style style:family="text" style:name="a1989">
      <style:text-properties fo:color="#1b1e29" fo:font-size="0.22222in" style:font-size-asian="0.22222in" style:font-size-complex="0.22222in" fo:language="en" fo:country="US" fo:font-weight="bold" style:font-weight-asian="bold" style:font-weight-complex="bold" style:letter-kerning="true"/>
    </style:style>
    <style:style style:family="text" style:name="a2240">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23611in" style:font-size-asian="0.23611in" style:font-size-complex="0.236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41">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2">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3">
      <style:paragraph-properties fo:line-height="90%" fo:text-align="center" style:tab-stop-distance="0.82639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4">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5">
      <style:paragraph-properties fo:line-height="90%" fo:text-align="center" style:tab-stop-distance="0.82639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8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6">
      <style:graphic-properties fo:wrap-option="wrap" fo:padding-top="0.03542in" fo:padding-bottom="0.03542in" fo:padding-left="0.03542in" fo:padding-right="0.03542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76">
      <style:graphic-properties draw:fill="none" fo:clip="rect(0in, 0.03808in, 0in, 0.03808in)" draw:stroke="none"/>
    </style:style>
    <style:style style:family="text" style:name="a22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7">
      <style:graphic-properties draw:fill="none" fo:clip="rect(0in, 0.27374in, 0in, 0.27374in)" draw:stroke="none"/>
    </style:style>
    <style:style style:family="text" style:name="a2873">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draw:fill="none" fo:clip="rect(0in, 0.03046in, 0in, 0.03046in)" draw:stroke="none"/>
    </style:style>
    <style:style style:family="paragraph" style:name="a2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9">
      <style:graphic-properties fo:wrap-option="wrap" fo:padding-top="0.05in" fo:padding-bottom="0.05in" fo:padding-left="0.1in" fo:padding-right="0.1in" draw:textarea-vertical-align="top" draw:textarea-horizontal-align="left" draw:fill="solid" draw:fill-color="#969696" draw:opacity="100%" draw:stroke="solid" svg:stroke-width="0.01389in" svg:stroke-color="#001970" svg:stroke-opacity="100%" draw:stroke-linejoin="miter" svg:stroke-linecap="butt" draw:auto-grow-width="false" draw:auto-grow-height="false"/>
      <style:paragraph-properties style:font-independent-line-spacing="true" style:writing-mode="lr-tb"/>
    </style:style>
    <style:style style:family="presentation" style:name="a1679">
      <style:graphic-properties draw:fill="none" draw:stroke="solid" svg:stroke-width="0.01389in" svg:stroke-color="#000000" svg:stroke-opacity="100%"/>
    </style:style>
    <style:style style:family="text" style:name="a2875">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9">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4">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1">
      <style:graphic-properties draw:fill="none" fo:clip="rect(0in, 0.03647in, 0in, 0.03647in)" draw:stroke="none"/>
    </style:style>
    <style:style style:family="paragraph" style:name="a1990">
      <style:paragraph-properties/>
    </style:style>
    <style:style style:family="presentation" style:name="a2562">
      <style:graphic-properties draw:fill="none" fo:clip="rect(0in, 0.28011in, 0in, 0.28011in)" draw:stroke="non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63">
      <style:graphic-properties draw:fill="none" fo:clip="rect(0in, 0.28011in, 0in, 0.28011in)" draw:stroke="none"/>
    </style:style>
    <style:style style:family="text" style:name="a1992">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1367">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4">
      <style:graphic-properties draw:fill="none" fo:clip="rect(0in, 0.78451in, 0in, 0.78451in)" draw:stroke="none"/>
    </style:style>
    <style:style style:family="text" style:name="a1993">
      <style:text-properties fo:font-size="0.22222in" style:font-size-asian="0.22222in" style:font-size-complex="0.22222in" fo:language="en" fo:country="US" fo:font-weight="bold" style:font-weight-asian="bold" style:font-weight-complex="bold"/>
    </style:style>
    <style:style style:family="text" style:name="a256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4">
      <style:paragraph-properties/>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6">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able-cell" style:name="a1996">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2568">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997">
      <style:table-row-properties style:row-height="0.53033in"/>
    </style:style>
    <style:style style:family="paragraph" style:name="a2569">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color="#1b1e29" fo:font-size="0.22222in" style:font-size-asian="0.22222in" style:font-size-complex="0.22222in" fo:language="en" fo:country="US" fo:font-weight="bold" style:font-weight-asian="bold" style:font-weight-complex="bold" style:letter-kerning="true"/>
    </style:style>
    <style:style style:family="text" style:name="a1999">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text" style:name="a2250">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23611in" style:font-size-asian="0.23611in" style:font-size-complex="0.236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1">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2">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9444in" style:font-size-asian="0.19444in" style:font-size-complex="0.19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90%" fo:text-align="center" style:tab-stop-distance="0.82639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0">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5">
      <style:paragraph-properties fo:line-height="90%" fo:text-align="center" style:tab-stop-distance="0.82639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1">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6">
      <style:graphic-properties fo:wrap-option="wrap" fo:padding-top="0.03542in" fo:padding-bottom="0.03542in" fo:padding-left="0.03542in" fo:padding-right="0.03542in" draw:textarea-vertical-align="middle" draw:textarea-horizontal-align="center" draw:fill="none" draw:stroke="none" draw:auto-grow-width="false" draw:auto-grow-height="false"/>
      <style:paragraph-properties style:font-independent-line-spacing="true" style:writing-mode="lr-tb"/>
    </style:style>
    <style:style style:family="text" style:name="a22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3">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8">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9">
      <style:graphic-properties fo:wrap-option="wrap" fo:padding-top="0.05in" fo:padding-bottom="0.05in" fo:padding-left="0.1in" fo:padding-right="0.1in" draw:textarea-vertical-align="top" draw:textarea-horizontal-align="left" draw:fill="solid" draw:fill-color="#969696" draw:opacity="100%" draw:stroke="solid" svg:stroke-width="0.01389in" svg:stroke-color="#001970" svg:stroke-opacity="100%" draw:stroke-linejoin="miter" svg:stroke-linecap="butt" draw:auto-grow-width="false" draw:auto-grow-height="false"/>
      <style:paragraph-properties style:font-independent-line-spacing="true" style:writing-mode="lr-tb"/>
    </style:style>
    <style:style style:family="text" style:name="a2885">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1">
      <style:graphic-properties draw:fill="none" draw:stroke="solid" svg:stroke-width="0.01389in" svg:stroke-color="#000000" svg:stroke-opacity="100%"/>
    </style:style>
    <style:style style:family="paragraph" style:name="a1375">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8">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2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6">
      <style:text-properties fo:font-variant="normal" fo:text-transform="none" fo:color="#c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7">
      <style:text-properties fo:font-variant="normal" fo:text-transform="none" fo:color="#c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23611in" style:font-size-asian="0.23611in" style:font-size-complex="0.236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1">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3">
      <style:paragraph-properties fo:line-height="90%" fo:text-align="center" style:tab-stop-distance="0.82639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4">
      <style:graphic-properties fo:wrap-option="wrap" fo:padding-top="0.03542in" fo:padding-bottom="0.03542in" fo:padding-left="0.03542in" fo:padding-right="0.03542in" draw:textarea-vertical-align="middle" draw:textarea-horizontal-align="center" draw:fill="none"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5">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graphic" style:name="a2267">
      <style:graphic-properties fo:wrap-option="wrap" fo:padding-top="0.05in" fo:padding-bottom="0.05in" fo:padding-left="0.1in" fo:padding-right="0.1in" draw:textarea-vertical-align="top" draw:textarea-horizontal-align="left" draw:fill="solid" draw:fill-color="#969696" draw:opacity="100%" draw:stroke="solid" svg:stroke-width="0.01389in" svg:stroke-color="#001970" svg:stroke-opacity="100%" draw:stroke-linejoin="miter" svg:stroke-linecap="butt" draw:auto-grow-width="false" draw:auto-grow-height="false"/>
      <style:paragraph-properties style:font-independent-line-spacing="true" style:writing-mode="lr-tb"/>
    </style:style>
    <style:style style:family="paragraph" style:name="a28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8">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69">
      <style:paragraph-properties fo:line-height="90%" fo:text-align="center" style:tab-stop-distance="1.60417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8" style:parent-style-name="Graphics">
      <style:graphic-properties draw:fill="none" fo:clip="rect(0in, 0in, 0in, 0in)" draw:stroke="none"/>
    </style:style>
    <style:style style:family="text" style:name="a1699">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7">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9">
      <style:text-properties fo:font-variant="normal" fo:text-transform="none" fo:color="#000000"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1">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2">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580">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90%" fo:text-align="left" style:tab-stop-distance="0.74994in" fo:margin-left="0.18681in" fo:margin-right="0in" fo:text-indent="-0.18681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3">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90%" fo:text-align="left" style:tab-stop-distance="0.74994in" fo:margin-left="0.18681in" fo:margin-right="0in" fo:text-indent="-0.18681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6">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0">
      <style:graphic-properties fo:wrap-option="wrap" fo:padding-top="0.02292in" fo:padding-bottom="0.02292in" fo:padding-left="0.02292in" fo:padding-right="0.02292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71">
      <style:graphic-properties draw:fill="none" draw:stroke="solid" svg:stroke-width="0.01389in" svg:stroke-color="#000000" svg:stroke-opacity="100%"/>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90%" fo:text-align="left" style:tab-stop-distance="0.74994in" fo:margin-left="0.56181in" fo:margin-right="0in" fo:text-indent="-0.18681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90%" fo:text-align="left" style:tab-stop-distance="0.74994in" fo:margin-left="0.56181in" fo:margin-right="0in" fo:text-indent="-0.18681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2">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Arial"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5">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9">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2280">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5">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1">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3">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2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0">
      <style:text-properties fo:color="#ffffff"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text" style:name="a1801">
      <style:text-properties fo:color="#ffffff" fo:font-family="Calibri"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paragraph" style:name="a1802">
      <style:paragraph-properties fo:line-height="100%" fo:text-align="center" style:tab-stop-distance="0.74994in" fo:margin-left="0in" fo:margin-right="0in" fo:text-indent="0in" fo:margin-top="0in" fo:margin-bottom="0in" style:punctuation-wrap="hanging" style:vertical-align="auto" style:writing-mode="lr-tb">
        <style:tab-stops/>
      </style:paragraph-properties>
    </style:style>
    <style:style style:family="table-cell" style:name="a1803">
      <style:table-cell-properties style:vertical-align="top" fo:background-color="#c00000"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1804">
      <style:text-properties fo:color="#ffffff"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text" style:name="a1805">
      <style:text-properties fo:color="#ffffff" fo:font-family="Calibri"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paragraph" style:name="a1806">
      <style:paragraph-properties fo:line-height="100%" fo:text-align="center" style:tab-stop-distance="0.74994in" fo:margin-left="0in" fo:margin-right="0in" fo:text-indent="0in" fo:margin-top="0in" fo:margin-bottom="0in" style:punctuation-wrap="hanging" style:vertical-align="auto" style:writing-mode="lr-tb">
        <style:tab-stops/>
      </style:paragraph-properties>
    </style:style>
    <style:style style:family="table-cell" style:name="a1807">
      <style:table-cell-properties style:vertical-align="top" fo:background-color="#c00000"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1808">
      <style:text-properties fo:color="#ffffff"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text" style:name="a1809">
      <style:text-properties fo:color="#ffffff" fo:font-family="Calibri" fo:font-size="0.33333in" style:font-size-asian="0.33333in" style:font-size-complex="0.33333in" fo:language="en" fo:country="US" style:text-underline-type="single" style:text-underline-style="solid" style:text-underline-width="auto" fo:font-weight="bold" style:font-weight-asian="bold" style:font-weight-complex="bold" style:text-underline-mode="continuous" style:letter-kerning="true"/>
    </style:style>
    <style:style style:family="paragraph" style:name="a1810">
      <style:paragraph-properties fo:line-height="100%" fo:text-align="center" style:tab-stop-distance="0.74994in" fo:margin-left="0in" fo:margin-right="0in" fo:text-indent="0in" fo:margin-top="0in" fo:margin-bottom="0in" style:punctuation-wrap="hanging" style:vertical-align="auto" style:writing-mode="lr-tb">
        <style:tab-stops/>
      </style:paragraph-properties>
    </style:style>
    <style:style style:family="table-cell" style:name="a1811">
      <style:table-cell-properties style:vertical-align="top" fo:background-color="#c00000"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able-row" style:name="a1812">
      <style:table-row-properties style:row-height="0.53033in"/>
    </style:style>
    <style:style style:family="text" style:name="a1813">
      <style:text-properties fo:color="#1b1e29" fo:font-size="0.22222in" style:font-size-asian="0.22222in" style:font-size-complex="0.22222in" fo:language="en" fo:country="US" fo:font-weight="bold" style:font-weight-asian="bold" style:font-weight-complex="bold" style:letter-kerning="true"/>
    </style:style>
    <style:style style:family="text" style:name="a1814">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paragraph" style:name="a1815">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able-cell" style:name="a1816">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1817">
      <style:text-properties fo:color="#1b1e29" fo:font-size="0.22222in" style:font-size-asian="0.22222in" style:font-size-complex="0.22222in" fo:language="en" fo:country="US" fo:font-weight="bold" style:font-weight-asian="bold" style:font-weight-complex="bold" style:letter-kerning="true"/>
    </style:style>
    <style:style style:family="text" style:name="a1818">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paragraph" style:name="a1819">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02967in" fo:margin-left="0.69751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0">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2702">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03">
      <style:paragraph-properties fo:line-height="90%" fo:text-align="left" style:tab-stop-distance="0.74994in" fo:margin-left="0.18749in" fo:margin-right="0in" fo:text-indent="-0.18749in" fo:margin-top="0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6">
      <style:paragraph-properties fo:line-height="90%" fo:text-align="left" style:tab-stop-distance="0.74994in" fo:margin-left="0.18749in" fo:margin-right="0in" fo:text-indent="-0.18749in" fo:margin-top="0in" fo:margin-bottom="0.04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8">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9">
      <style:paragraph-properties fo:line-height="90%" fo:text-align="left" style:tab-stop-distance="0.74994in" fo:margin-left="0.56246in" fo:margin-right="0in" fo:text-indent="-0.18749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20">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1821">
      <style:text-properties fo:color="#1b1e29" fo:font-size="0.22222in" style:font-size-asian="0.22222in" style:font-size-complex="0.22222in" fo:language="en" fo:country="US" fo:font-weight="bold" style:font-weight-asian="bold" style:font-weight-complex="bold" style:letter-kerning="true"/>
    </style:style>
    <style:style style:family="text" style:name="a1822">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1823">
      <style:paragraph-properties/>
    </style:style>
    <style:style style:family="text" style:name="a1825">
      <style:text-properties fo:color="#1b1e29" fo:font-size="0.22222in" style:font-size-asian="0.22222in" style:font-size-complex="0.22222in" fo:language="en" fo:country="US" fo:font-weight="bold" style:font-weight-asian="bold" style:font-weight-complex="bold" style:letter-kerning="true"/>
    </style:style>
    <style:style style:family="text" style:name="a1826">
      <style:text-properties fo:font-size="0.22222in" style:font-size-asian="0.22222in" style:font-size-complex="0.22222in" fo:language="en" fo:country="US" fo:font-weight="bold" style:font-weight-asian="bold" style:font-weight-complex="bold"/>
    </style:style>
    <style:style style:family="paragraph" style:name="a1827">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ext" style:name="a1828">
      <style:text-properties fo:color="#1b1e29" fo:font-size="0.22222in" style:font-size-asian="0.22222in" style:font-size-complex="0.22222in" fo:language="en" fo:country="US" fo:font-weight="bold" style:font-weight-asian="bold" style:font-weight-complex="bold" style:letter-kerning="true"/>
    </style:style>
    <style:style style:family="text" style:name="a1829">
      <style:text-properties fo:font-size="0.22222in" style:font-size-asian="0.22222in" style:font-size-complex="0.22222in" fo:language="en" fo:country="US" fo:font-weight="bold" style:font-weight-asian="bold" style:font-weight-complex="bold"/>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3">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71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2">
      <style:paragraph-properties fo:line-height="90%" fo:text-align="left" style:tab-stop-distance="0.74994in" fo:margin-left="0.18749in" fo:margin-right="0in" fo:text-indent="-0.18749in" fo:margin-top="0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90%" fo:text-align="left" style:tab-stop-distance="0.74994in" fo:margin-left="0.56246in" fo:margin-right="0in" fo:text-indent="-0.18749in" fo:margin-top="0.0520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4">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5">
      <style:paragraph-properties fo:line-height="90%" fo:text-align="left" style:tab-stop-distance="0.74994in" fo:margin-left="0.18749in" fo:margin-right="0in" fo:text-indent="-0.18749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7">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8">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0">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presentation" style:name="a240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ell" style:name="a1831">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2402">
      <style:text-properties fo:font-variant="normal" fo:text-transform="none" fo:color="#ffffff" style:text-line-through-type="none" style:text-line-through-style="none" style:text-line-through-width="auto" style:text-line-through-color="font-color" style:text-position="-25%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32">
      <style:table-row-properties style:row-height="0.53341in"/>
    </style:style>
    <style:style style:family="paragraph" style:name="a2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color="#1b1e29" fo:font-size="0.22222in" style:font-size-asian="0.22222in" style:font-size-complex="0.22222in" fo:language="en" fo:country="US" fo:font-weight="bold" style:font-weight-asian="bold" style:font-weight-complex="bold" style:letter-kerning="true"/>
    </style:style>
    <style:style style:family="text" style:name="a1834">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graphic" style:name="a2405">
      <style:graphic-properties fo:wrap-option="wrap" fo:padding-top="0.05in" fo:padding-bottom="0.05in" fo:padding-left="0.1in" fo:padding-right="0.1in" draw:textarea-vertical-align="middle" draw:textarea-horizontal-align="center" draw:fill="gradient" draw:fill-gradient-name="a2404" draw:stroke="none" draw:shadow="visible" draw:shadow-offset-x="0in" draw:shadow-offset-y="0.01389in" draw:shadow-color="#000000" draw:shadow-opacity="100%" draw:auto-grow-width="false" draw:auto-grow-height="false" draw:decorative="true"/>
      <style:paragraph-properties style:font-independent-line-spacing="true" style:writing-mode="lr-tb"/>
    </style:style>
    <style:style style:family="paragraph" style:name="a1835">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ext" style:name="a2406">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01528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36">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paragraph" style:name="a2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color="#1b1e29" fo:font-size="0.22222in" style:font-size-asian="0.22222in" style:font-size-complex="0.22222in" fo:language="en" fo:country="US" fo:font-weight="bold" style:font-weight-asian="bold" style:font-weight-complex="bold" style:letter-kerning="true"/>
    </style:style>
    <style:style style:family="text" style:name="a240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01944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8">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paragraph" style:name="a2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paragraph" style:name="a1520">
      <style:paragraph-properties fo:line-height="90%" fo:text-align="left" style:tab-stop-distance="0.74994in" fo:margin-left="0.56246in" fo:margin-right="0in" fo:text-indent="-0.18749in" fo:margin-top="0.0520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5">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1">
      <style:text-properties fo:font-variant="normal" fo:text-transform="none" fo:color="#cc0000"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2">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90%" fo:text-align="left" style:tab-stop-distance="0.74994in" fo:margin-left="0.56246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4">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7">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8">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410">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04583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0">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2411">
      <style:text-properties fo:font-variant="normal" fo:text-transform="none" fo:color="#ffffff" style:text-line-through-type="none" style:text-line-through-style="none" style:text-line-through-width="auto" style:text-line-through-color="font-color" style:text-position="0% 100%" fo:font-family="Source Sans Pro" fo:font-size="0.29167in" style:font-size-asian="0.29167in" style:font-size-complex="0.29167in" fo:letter-spacing="0.04583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2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size="0.22222in" style:font-size-asian="0.22222in" style:font-size-complex="0.22222in" fo:language="en" fo:country="US" fo:font-weight="bold" style:font-weight-asian="bold" style:font-weight-complex="bold"/>
    </style:style>
    <style:style style:family="graphic" style:name="a241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843">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ext" style:name="a2414">
      <style:text-properties fo:font-variant="normal" fo:text-transform="none" fo:color="#ffffff"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4">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2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size="0.22222in" style:font-size-asian="0.22222in" style:font-size-complex="0.22222in" fo:language="en" fo:country="US" fo:font-weight="bold" style:font-weight-asian="bold" style:font-weight-complex="bold"/>
    </style:style>
    <style:style style:family="graphic" style:name="a2416">
      <style:graphic-properties fo:wrap-option="wrap" fo:padding-top="0.05in" fo:padding-bottom="0.05in" fo:padding-left="0.1in" fo:padding-right="0.1in" draw:textarea-vertical-align="middle" draw:textarea-horizontal-align="center" draw:fill="solid" draw:fill-color="#007dbc" draw:opacity="100%" draw:stroke="solid" svg:stroke-width="0.01389in" svg:stroke-color="#ffffff" svg:stroke-opacity="100%" draw:stroke-linejoin="miter" svg:stroke-linecap="butt" draw:shadow="visible" draw:shadow-offset-x="0in" draw:shadow-offset-y="0.01389in" draw:shadow-color="#000000" draw:shadow-opacity="100%" draw:auto-grow-width="false" draw:auto-grow-height="false"/>
      <style:paragraph-properties style:font-independent-line-spacing="true" style:writing-mode="lr-tb"/>
    </style:style>
    <style:style style:family="paragraph" style:name="a1846">
      <style:paragraph-properties/>
    </style:style>
    <style:style style:family="text" style:name="a2417">
      <style:text-properties fo:font-variant="normal" fo:text-transform="none" fo:color="#ffffff"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48">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graphic" style:name="a2419">
      <style:graphic-properties fo:wrap-option="wrap" fo:padding-top="0.05in" fo:padding-bottom="0.05in" fo:padding-left="0.1in" fo:padding-right="0.1in" draw:textarea-vertical-align="middle" draw:textarea-horizontal-align="center" draw:fill="solid" draw:fill-color="#cc0000" draw:opacity="100%" draw:stroke="solid" svg:stroke-width="0.01389in" svg:stroke-color="#ffffff" svg:stroke-opacity="100%" draw:stroke-linejoin="miter" svg:stroke-linecap="butt" draw:shadow="visible" draw:shadow-offset-x="0in" draw:shadow-offset-y="0.01389in" draw:shadow-color="#000000" draw:shadow-opacity="100%" draw:auto-grow-width="false" draw:auto-grow-height="false"/>
      <style:paragraph-properties style:font-independent-line-spacing="true" style:writing-mode="lr-tb"/>
    </style:style>
    <style:style style:family="table-row" style:name="a1849">
      <style:table-row-properties style:row-height="0.53033in"/>
    </style:style>
    <style:style style:family="text" style:name="a2100">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0">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1">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3">
      <style:text-properties fo:font-variant="normal" fo:text-transform="none" fo:color="#001970" style:text-line-through-type="none" style:text-line-through-style="none" style:text-line-through-width="auto" style:text-line-through-color="font-color" style:text-position="0% 100%" fo:font-family="Franklin Gothic Book" style:font-family-generic="swiss" style:font-pitch="variable" fo:font-size="3.51389in" style:font-size-asian="3.51389in" style:font-size-complex="3.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0">
      <style:graphic-properties draw:fill="none" draw:stroke="solid" svg:stroke-width="0.01389in" svg:stroke-color="#000000" svg:stroke-opacity="100%"/>
    </style:style>
    <style:style style:family="graphic" style:name="a2105">
      <style:graphic-properties fo:wrap-option="wrap" fo:padding-top="0.05286in" fo:padding-bottom="0.05286in" fo:padding-left="0.10571in" fo:padding-right="0.10571in" draw:textarea-vertical-align="top" draw:textarea-horizontal-align="left" draw:fill="none" draw:stroke="none" draw:auto-grow-width="false" draw:auto-grow-height="true"/>
      <style:paragraph-properties style:font-independent-line-spacing="true" style:writing-mode="lr-tb"/>
    </style:style>
    <style:style style:family="text" style:name="a2106">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8">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6">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9">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0">
      <style:text-properties fo:font-variant="normal" fo:text-transform="none" fo:color="#ffffff"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0">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2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graphic" style:name="a2422">
      <style:graphic-properties fo:wrap-option="wrap" fo:padding-top="0.05in" fo:padding-bottom="0.05in" fo:padding-left="0.1in" fo:padding-right="0.1in" draw:textarea-vertical-align="middle" draw:textarea-horizontal-align="center" draw:fill="solid" draw:fill-color="#969696" draw:opacity="100%" draw:stroke="solid" svg:stroke-width="0.01389in" svg:stroke-color="#ffffff" svg:stroke-opacity="100%" draw:stroke-linejoin="miter" svg:stroke-linecap="butt" draw:shadow="visible" draw:shadow-offset-x="0in" draw:shadow-offset-y="0.01389in" draw:shadow-color="#000000" draw:shadow-opacity="100%" draw:auto-grow-width="false" draw:auto-grow-height="false"/>
      <style:paragraph-properties style:font-independent-line-spacing="true" style:writing-mode="lr-tb"/>
    </style:style>
    <style:style style:family="paragraph" style:name="a1852">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ext" style:name="a242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853">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paragraph" style:name="a24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color="#1b1e29" fo:font-size="0.22222in" style:font-size-asian="0.22222in" style:font-size-complex="0.22222in" fo:language="en" fo:country="US" fo:font-weight="bold" style:font-weight-asian="bold" style:font-weight-complex="bold" style:letter-kerning="true"/>
    </style:style>
    <style:style style:family="text" style:name="a1855">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text" style:name="a242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6">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paragraph" style:name="a24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57">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1858">
      <style:text-properties fo:color="#1b1e29" fo:font-size="0.22222in" style:font-size-asian="0.22222in" style:font-size-complex="0.22222in" fo:language="en" fo:country="US" fo:font-weight="bold" style:font-weight-asian="bold" style:font-weight-complex="bold" style:letter-kerning="true"/>
    </style:style>
    <style:style style:family="text" style:name="a2429">
      <style:text-properties fo:font-variant="normal" fo:text-transform="none" fo:color="#1b1e29"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9">
      <style:text-properties fo:font-size="0.22222in" style:font-size-asian="0.22222in" style:font-size-complex="0.22222in" fo:language="en" fo:country="US" fo:font-weight="bold" style:font-weight-asian="bold" style:font-weight-complex="bold"/>
    </style:style>
    <style:style style:family="graphic" style:name="a2110">
      <style:graphic-properties fo:wrap-option="wrap" fo:padding-top="0.05286in" fo:padding-bottom="0.05286in" fo:padding-left="0.10571in" fo:padding-right="0.10571in" draw:textarea-vertical-align="top" draw:textarea-horizontal-align="center" draw:fill="none" draw:stroke="none" draw:auto-grow-width="false" draw:auto-grow-height="true"/>
      <style:paragraph-properties style:font-independent-line-spacing="true" style:writing-mode="lr-tb"/>
    </style:style>
    <style:style style:family="text" style:name="a1540">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1">
      <style:graphic-properties draw:fill="none" draw:stroke="solid" svg:stroke-width="0.01389in" svg:stroke-color="#000000" svg:stroke-opacity="100%"/>
    </style:style>
    <style:style style:family="paragraph" style:name="a1541">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1">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17">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draw:fill="none" draw:stroke="solid" svg:stroke-width="0.01389in" svg:stroke-color="#000000" svg:stroke-opacity="100%"/>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5">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2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8">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ext" style:name="a1861">
      <style:text-properties fo:color="#1b1e29" fo:font-size="0.22222in" style:font-size-asian="0.22222in" style:font-size-complex="0.22222in" fo:language="en" fo:country="US" fo:font-weight="bold" style:font-weight-asian="bold" style:font-weight-complex="bold" style:letter-kerning="true"/>
    </style:style>
    <style:style style:family="graphic" style:name="a24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62">
      <style:text-properties fo:font-size="0.22222in" style:font-size-asian="0.22222in" style:font-size-complex="0.22222in" fo:language="en" fo:country="US" fo:font-weight="bold" style:font-weight-asian="bold" style:font-weight-complex="bold"/>
    </style:style>
    <style:style style:family="text" style:name="a243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3">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paragraph" style:name="a2434">
      <style:paragraph-properties fo:line-height="100%" fo:text-align="center"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64">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243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865">
      <style:table-row-properties style:row-height="0.53033in"/>
    </style:style>
    <style:style style:family="text" style:name="a243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6">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2437">
      <style:paragraph-properties fo:line-height="100%" fo:text-align="center"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graphic" style:name="a2438">
      <style:graphic-properties fo:wrap-option="wrap" fo:padding-top="0.05in" fo:padding-bottom="0.05in" fo:padding-left="0.1in" fo:padding-right="0.1in" draw:textarea-vertical-align="middle" draw:textarea-horizontal-align="center" draw:fill="solid" draw:fill-color="#007dbc" draw:opacity="100%" draw:stroke="solid" svg:stroke-width="0.04167in" svg:stroke-color="#ffffff" svg:stroke-opacity="100%" draw:stroke-linejoin="miter" svg:stroke-linecap="butt" draw:shadow="visible" draw:shadow-offset-x="0.06944in" draw:shadow-offset-y="0.12028in" draw:shadow-color="#1b1e29" draw:shadow-opacity="39%" draw:auto-grow-width="false" draw:auto-grow-height="false"/>
      <style:paragraph-properties style:font-independent-line-spacing="true" style:writing-mode="lr-tb"/>
    </style:style>
    <style:style style:family="paragraph" style:name="a1868">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text" style:name="a243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869">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paragraph" style:name="a2120">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2">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4">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1">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6">
      <style:paragraph-properties fo:line-height="100%" fo:text-align="left" style:tab-stop-distance="1.02967in" fo:margin-left="0.84028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left" style:tab-stop-distance="1.02967in" fo:margin-left="0.18267in" fo:margin-right="0in" fo:text-indent="-0.182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2">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4">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9">
      <style:paragraph-properties fo:line-height="100%" fo:text-align="left" style:tab-stop-distance="1.02967in" fo:margin-left="0.84028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5">
      <style:paragraph-properties fo:line-height="90%" fo:text-align="left" style:tab-stop-distance="0.74994in" fo:margin-left="0.18749in" fo:margin-right="0in" fo:text-indent="-0.18749in" fo:margin-top="0.10417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7">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8">
      <style:paragraph-properties fo:line-height="90%" fo:text-align="left" style:tab-stop-distance="0.74994in" fo:margin-left="0.18749in" fo:margin-right="0in" fo:text-indent="-0.18749in" fo:margin-top="0.10417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100%" fo:text-align="center"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color="#1b1e29" fo:font-size="0.22222in" style:font-size-asian="0.22222in" style:font-size-complex="0.22222in" fo:language="en" fo:country="US" fo:font-weight="bold" style:font-weight-asian="bold" style:font-weight-complex="bold" style:letter-kerning="true"/>
    </style:style>
    <style:style style:family="text" style:name="a244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1">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text" style:name="a2442">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2">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paragraph" style:name="a2443">
      <style:paragraph-properties fo:line-height="100%" fo:text-align="center"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73">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graphic" style:name="a2444">
      <style:graphic-properties fo:wrap-option="wrap" fo:padding-top="0.05in" fo:padding-bottom="0.05in" fo:padding-left="0.1in" fo:padding-right="0.1in" draw:textarea-vertical-align="middle" draw:textarea-horizontal-align="center" draw:fill="solid" draw:fill-color="#cc0000" draw:opacity="100%" draw:stroke="solid" svg:stroke-width="0.04167in" svg:stroke-color="#ffffff" svg:stroke-opacity="100%" draw:stroke-linejoin="miter" svg:stroke-linecap="butt" draw:shadow="visible" draw:shadow-offset-x="0.06944in" draw:shadow-offset-y="0.12028in" draw:shadow-color="#1b1e29" draw:shadow-opacity="39%" draw:auto-grow-width="false" draw:auto-grow-height="false"/>
      <style:paragraph-properties style:font-independent-line-spacing="true" style:writing-mode="lr-tb"/>
    </style:style>
    <style:style style:family="text" style:name="a1874">
      <style:text-properties fo:color="#1b1e29" fo:font-size="0.22222in" style:font-size-asian="0.22222in" style:font-size-complex="0.22222in" fo:language="en" fo:country="US" fo:font-weight="bold" style:font-weight-asian="bold" style:font-weight-complex="bold" style:letter-kerning="true"/>
    </style:style>
    <style:style style:family="text" style:name="a244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01389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5">
      <style:text-properties fo:color="#1b1e29" fo:font-size="0.22222in" style:font-size-asian="0.22222in" style:font-size-complex="0.22222in" fo:language="en" fo:country="US" fo:font-weight="bold" style:font-weight-asian="bold" style:font-weight-complex="bold" style:letter-kerning="true"/>
    </style:style>
    <style:style style:family="paragraph" style:name="a2446">
      <style:paragraph-properties fo:line-height="100%" fo:text-align="center"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6">
      <style:paragraph-properties/>
    </style:style>
    <style:style style:family="graphic" style:name="a2447">
      <style:graphic-properties fo:wrap-option="wrap" fo:padding-top="0.05in" fo:padding-bottom="0.05in" fo:padding-left="0.1in" fo:padding-right="0.1in" draw:textarea-vertical-align="middle" draw:textarea-horizontal-align="center" draw:fill="solid" draw:fill-color="#002e6d" draw:opacity="100%" draw:stroke="solid" svg:stroke-width="0.04167in" svg:stroke-color="#ffffff" svg:stroke-opacity="100%" draw:stroke-linejoin="miter" svg:stroke-linecap="butt" draw:shadow="visible" draw:shadow-offset-x="0.06944in" draw:shadow-offset-y="0.12028in" draw:shadow-color="#1b1e29" draw:shadow-opacity="39%" draw:auto-grow-width="false" draw:auto-grow-height="false"/>
      <style:paragraph-properties style:font-independent-line-spacing="true" style:writing-mode="lr-tb"/>
    </style:style>
    <style:style style:family="graphic" style:name="a2448" style:parent-style-name="Graphics">
      <style:graphic-properties draw:fill="none" fo:clip="rect(0in, 0in, 0in, 0in)" draw:stroke="none"/>
    </style:style>
    <style:style style:family="text" style:name="a1878">
      <style:text-properties fo:color="#1b1e29" fo:font-size="0.22222in" style:font-size-asian="0.22222in" style:font-size-complex="0.22222in" fo:language="en" fo:country="US" fo:font-weight="bold" style:font-weight-asian="bold" style:font-weight-complex="bold" style:letter-kerning="true"/>
    </style:style>
    <style:style style:family="text" style:name="a2449">
      <style:text-properties fo:font-variant="normal" fo:text-transform="none" fo:color="#002e6d"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9">
      <style:text-properties fo:font-size="0.22222in" style:font-size-asian="0.22222in" style:font-size-complex="0.22222in" fo:language="en" fo:country="US" fo:font-weight="bold" style:font-weight-asian="bold" style:font-weight-complex="bold"/>
    </style:style>
    <style:style style:family="presentation" style:name="a1560">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2">
      <style:paragraph-properties fo:line-height="100%" fo:text-align="left" style:tab-stop-distance="1.02967in" fo:margin-left="0.84028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3">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0.74994in" fo:margin-left="0.18749in" fo:margin-right="0in" fo:text-indent="-0.18749in" fo:margin-top="0.17708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0">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left" style:tab-stop-distance="1.02967in" fo:margin-left="0.84028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1">
      <style:paragraph-properties fo:line-height="90%" fo:text-align="left" style:tab-stop-distance="0.74994in" fo:margin-left="0.18749in" fo:margin-right="0in" fo:text-indent="-0.18749in" fo:margin-top="0.10417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left" style:tab-stop-distance="0.74994in" fo:margin-left="0.18749in" fo:margin-right="0in" fo:text-indent="-0.18749in" fo:margin-top="0.17708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3">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4">
      <style:paragraph-properties fo:line-height="90%" fo:text-align="left" style:tab-stop-distance="0.74994in" fo:margin-left="0.18749in" fo:margin-right="0in" fo:text-indent="-0.18749in" fo:margin-top="0.10417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7">
      <style:paragraph-properties fo:line-height="90%" fo:text-align="left" style:tab-stop-distance="0.74994in" fo:margin-left="0in" fo:margin-right="0in" fo:text-indent="0in" fo:margin-top="0.17708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69">
      <style:graphic-properties draw:fill="none" draw:stroke="solid" svg:stroke-width="0.01389in" svg:stroke-color="#000000" svg:stroke-opacity="100%"/>
    </style:style>
    <style:style style:family="text" style:name="a2450">
      <style:text-properties fo:font-variant="normal" fo:text-transform="none" fo:color="#002e6d" style:text-line-through-type="none" style:text-line-through-style="none" style:text-line-through-width="auto" style:text-line-through-color="font-color" style:text-position="0% 100%" fo:font-family="Source Sans Pro"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1">
      <style:text-properties fo:font-variant="normal" fo:text-transform="none" fo:color="#002e6d" style:text-line-through-type="none" style:text-line-through-style="none" style:text-line-through-width="auto" style:text-line-through-color="font-color" style:text-position="0% 100%" fo:font-family="Source Sans Pro"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style:style>
    <style:style style:family="paragraph" style:name="a2452">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3">
      <style:text-properties fo:font-variant="normal" fo:text-transform="none" fo:color="#002e6d" style:text-line-through-type="none" style:text-line-through-style="none" style:text-line-through-width="auto" style:text-line-through-color="font-color" style:text-position="0% 100%" fo:font-family="Source Sans Pro"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882">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2454">
      <style:text-properties fo:font-variant="normal" fo:text-transform="none" fo:color="#002e6d" style:text-line-through-type="none" style:text-line-through-style="none" style:text-line-through-width="auto" style:text-line-through-color="font-color" style:text-position="0% 100%" fo:font-family="Source Sans Pro"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83">
      <style:table-row-properties style:row-height="0.53033in"/>
    </style:style>
    <style:style style:family="paragraph" style:name="a245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color="#1b1e29" fo:font-size="0.22222in" style:font-size-asian="0.22222in" style:font-size-complex="0.22222in" fo:language="en" fo:country="US" fo:font-weight="bold" style:font-weight-asian="bold" style:font-weight-complex="bold" style:letter-kerning="true"/>
    </style:style>
    <style:style style:family="text" style:name="a2456">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5">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text" style:name="a2457">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0.74994in" fo:margin-left="0in" fo:margin-right="0in" fo:text-indent="0in" fo:margin-top="0in" fo:margin-bottom="0in" style:punctuation-wrap="hanging" style:vertical-align="auto" style:writing-mode="lr-tb">
        <style:tab-stops/>
      </style:paragraph-properties>
    </style:style>
    <style:style style:family="paragraph" style:name="a2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87">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2459">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color="#1b1e29" fo:font-size="0.22222in" style:font-size-asian="0.22222in" style:font-size-complex="0.22222in" fo:language="en" fo:country="US" fo:font-weight="bold" style:font-weight-asian="bold" style:font-weight-complex="bold" style:letter-kerning="true"/>
    </style:style>
    <style:style style:family="text" style:name="a1889">
      <style:text-properties fo:font-size="0.22222in" style:font-size-asian="0.22222in" style:font-size-complex="0.22222in" fo:language="en" fo:country="US" fo:font-weight="bold" style:font-weight-asian="bold" style:font-weight-complex="bold"/>
    </style:style>
    <style:style style:family="paragraph" style:name="a2140">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90%" fo:text-align="left" style:tab-stop-distance="0.74994in" fo:margin-left="0.18749in" fo:margin-right="0in" fo:text-indent="-0.18749in" fo:margin-top="0.17708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left" style:tab-stop-distance="1.0296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left" style:tab-stop-distance="0.74994in" fo:margin-left="0.18749in" fo:margin-right="0in" fo:text-indent="-0.18749in" fo:margin-top="0.17708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90%" fo:text-align="left" style:tab-stop-distance="0.74994in" fo:margin-left="0.18749in" fo:margin-right="0in" fo:text-indent="-0.18749in" fo:margin-top="0.17708in" fo:margin-bottom="0.1770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8">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2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1">
      <style:text-properties fo:font-variant="normal" fo:text-transform="none" fo:color="#002e6d" style:text-line-through-type="none" style:text-line-through-style="none" style:text-line-through-width="auto" style:text-line-through-color="font-color" style:text-position="0% 100%" fo:font-family="Source Sans Pro"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0">
      <style:paragraph-properties/>
    </style:style>
    <style:style style:family="text" style:name="a2462">
      <style:text-properties fo:font-variant="normal" fo:text-transform="none" fo:color="#002e6d" style:text-line-through-type="none" style:text-line-through-style="none" style:text-line-through-width="auto" style:text-line-through-color="font-color" style:text-position="0% 100%" fo:font-family="Source Sans Pro"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92">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text" style:name="a2464">
      <style:text-properties fo:font-variant="normal" fo:text-transform="none" fo:color="#002e6d" style:text-line-through-type="none" style:text-line-through-style="none" style:text-line-through-width="auto" style:text-line-through-color="font-color" style:text-position="0% 100%" fo:font-family="Source Sans Pro"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color="#1b1e29" fo:font-size="0.22222in" style:font-size-asian="0.22222in" style:font-size-complex="0.22222in" fo:language="en" fo:country="US" fo:font-weight="bold" style:font-weight-asian="bold" style:font-weight-complex="bold" style:letter-kerning="true"/>
    </style:style>
    <style:style style:family="text" style:name="a246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4">
      <style:text-properties fo:color="#1b1e29" fo:font-family="Calibri" fo:font-size="0.22222in" style:font-size-asian="0.22222in" style:font-size-complex="0.22222in" fo:language="en" fo:country="US" fo:font-weight="bold" style:font-weight-asian="bold" style:font-weight-complex="bold" style:letter-kerning="true"/>
    </style:style>
    <style:style style:family="text" style:name="a2466">
      <style:text-properties fo:font-variant="normal" fo:text-transform="none" fo:color="#002e6d" style:text-line-through-type="none" style:text-line-through-style="none" style:text-line-through-width="auto" style:text-line-through-color="font-color" style:text-position="0% 100%" fo:font-family="Source Sans Pro"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style:style>
    <style:style style:family="paragraph" style:name="a246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8">
      <style:text-properties fo:font-variant="normal" fo:text-transform="none" fo:color="#002e6d" style:text-line-through-type="none" style:text-line-through-style="none" style:text-line-through-width="auto" style:text-line-through-color="font-color" style:text-position="0% 100%" fo:font-family="Source Sans Pro"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97">
      <style:table-cell-properties style:vertical-align="top" fo:border-top="0.01389in solid #1b1e29" fo:border-bottom="0.01389in solid #1b1e29" fo:border-left="0.01389in solid #1b1e29" fo:border-right="0.01389in solid #1b1e29" fo:padding-top="0.05in" fo:padding-bottom="0.05in" fo:padding-left="0.1in" fo:padding-right="0.1in"/>
      <style:paragraph-properties style:writing-mode="lr-tb"/>
    </style:style>
    <style:style style:family="paragraph" style:name="a246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9">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3">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01042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1">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1970" style:text-line-through-type="none" style:text-line-through-style="none" style:text-line-through-width="auto" style:text-line-through-color="font-color" style:text-position="0% 100%" fo:font-family="Franklin Gothic Book" style:font-family-generic="swiss" style:font-pitch="variable" fo:font-size="3.51389in" style:font-size-asian="3.51389in" style:font-size-complex="3.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4">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75in" style:font-size-asian="0.375in" style:font-size-complex="0.37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9">
      <style:graphic-properties fo:wrap-option="wrap" fo:padding-top="0.05286in" fo:padding-bottom="0.05286in" fo:padding-left="0.10571in" fo:padding-right="0.10571in" draw:textarea-vertical-align="top" draw:textarea-horizontal-align="left" draw:fill="none" draw:stroke="none" draw:auto-grow-width="false" draw:auto-grow-height="true"/>
      <style:paragraph-properties style:font-independent-line-spacing="true" style:writing-mode="lr-tb"/>
    </style:style>
    <style:style style:family="paragraph" style:name="a2785">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787" style:parent-style-name="Graphics">
      <style:graphic-properties draw:fill="none" draw:stroke="none"/>
    </style:style>
    <style:style style:family="text" style:name="a2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71">
      <style:text-properties fo:font-variant="normal" fo:text-transform="none" fo:color="#002e6d"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2">
      <style:text-properties fo:font-variant="normal" fo:text-transform="none" fo:color="#002e6d"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475">
      <style:graphic-properties draw:fill="none" draw:stroke="solid" svg:stroke-width="0.01389in" svg:stroke-color="#000000" svg:stroke-opacity="100%"/>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1">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1590">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2">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4">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0">
      <style:graphic-properties fo:wrap-option="wrap" fo:padding-top="0.05in" fo:padding-bottom="0.05in" fo:padding-left="0.1in" fo:padding-right="0.1in" draw:textarea-vertical-align="middle" draw:textarea-horizontal-align="center" draw:fill="solid" draw:fill-color="#00b050" draw:opacity="25%" draw:stroke="solid" svg:stroke-width="0.01389in" svg:stroke-color="#3c3c3c" svg:stroke-opacity="100%" draw:stroke-linejoin="miter" svg:stroke-linecap="butt" draw:auto-grow-width="false" draw:auto-grow-height="false"/>
      <style:paragraph-properties style:font-independent-line-spacing="true" style:writing-mode="lr-tb"/>
    </style:style>
    <style:style style:family="graphic" style:name="a1594">
      <style:graphic-properties fo:wrap-option="wrap" fo:padding-top="0.05286in" fo:padding-bottom="0.05286in" fo:padding-left="0.10571in" fo:padding-right="0.10571in" draw:textarea-vertical-align="top" draw:textarea-horizontal-align="center" draw:fill="none" draw:stroke="none" draw:auto-grow-width="false" draw:auto-grow-height="true"/>
      <style:paragraph-properties style:font-independent-line-spacing="true" style:writing-mode="lr-tb"/>
    </style:style>
    <style:style style:family="paragraph" style:name="a2166">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5">
      <style:graphic-properties draw:fill="none" draw:stroke="solid" svg:stroke-width="0.01389in" svg:stroke-color="#000000" svg:stroke-opacity="100%"/>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3">
      <style:graphic-properties fo:wrap-option="wrap" fo:padding-top="0.05in" fo:padding-bottom="0.05in" fo:padding-left="0.1in" fo:padding-right="0.1in" draw:textarea-vertical-align="middle" draw:textarea-horizontal-align="center" draw:fill="solid" draw:fill-color="#00b050" draw:opacity="25%" draw:stroke="solid" svg:stroke-width="0.01389in" svg:stroke-color="#3c3c3c" svg:stroke-opacity="100%" draw:stroke-linejoin="miter" svg:stroke-linecap="butt" draw:auto-grow-width="false" draw:auto-grow-height="false"/>
      <style:paragraph-properties style:font-independent-line-spacing="true" style:writing-mode="lr-tb"/>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9">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6">
      <style:graphic-properties fo:wrap-option="wrap" fo:padding-top="0.05in" fo:padding-bottom="0.05in" fo:padding-left="0.1in" fo:padding-right="0.1in" draw:textarea-vertical-align="middle" draw:textarea-horizontal-align="center" draw:fill="solid" draw:fill-color="#00b050" draw:opacity="25%" draw:stroke="solid" svg:stroke-width="0.01389in" svg:stroke-color="#3c3c3c" svg:stroke-opacity="100%" draw:stroke-linejoin="miter" svg:stroke-linecap="butt" draw:auto-grow-width="false" draw:auto-grow-height="false"/>
      <style:paragraph-properties style:font-independent-line-spacing="true" style:writing-mode="lr-tb"/>
    </style:style>
    <style:style style:family="text" style:name="a27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9">
      <style:graphic-properties fo:wrap-option="wrap" fo:padding-top="0.05in" fo:padding-bottom="0.05in" fo:padding-left="0.1in" fo:padding-right="0.1in" draw:textarea-vertical-align="middle" draw:textarea-horizontal-align="center" draw:fill="solid" draw:fill-color="#1b1e29" draw:opacity="15%" draw:stroke="solid" svg:stroke-width="0.01389in" svg:stroke-color="#05311c" svg:stroke-opacity="100%" draw:stroke-linejoin="miter" svg:stroke-linecap="butt" draw:auto-grow-width="false" draw:auto-grow-height="false"/>
      <style:paragraph-properties style:font-independent-line-spacing="true" style:writing-mode="lr-tb"/>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9">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84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18">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37497in" text:min-label-width="0.18749in"/>
        <style:text-properties fo:font-family="Arial" style:font-family-generic="swiss" style:font-pitch="variable" fo:font-size="100%"/>
      </text:list-level-style-bullet>
      <text:list-level-style-bullet text:level="3" text:bullet-char="•">
        <style:list-level-properties text:space-before="0.74994in" text:min-label-width="0.18749in"/>
        <style:text-properties fo:font-family="Arial" style:font-family-generic="swiss" style:font-pitch="variable" fo:font-size="100%"/>
      </text:list-level-style-bullet>
      <text:list-level-style-bullet text:level="4" text:bullet-char="•">
        <style:list-level-properties text:space-before="1.12491in" text:min-label-width="0.18749in"/>
        <style:text-properties fo:font-family="Arial" style:font-family-generic="swiss" style:font-pitch="variable" fo:font-size="100%"/>
      </text:list-level-style-bullet>
      <text:list-level-style-bullet text:level="5" text:bullet-char="•">
        <style:list-level-properties text:space-before="1.49988in" text:min-label-width="0.18749in"/>
        <style:text-properties fo:font-family="Arial" style:font-family-generic="swiss" style:font-pitch="variable" fo:font-size="100%"/>
      </text:list-level-style-bullet>
      <text:list-level-style-bullet text:level="6" text:bullet-char="•">
        <style:list-level-properties text:space-before="2.56251in" text:min-label-width="0.18749in"/>
        <style:text-properties fo:font-family="Arial" style:font-family-generic="swiss" style:font-pitch="variable" fo:font-size="100%"/>
      </text:list-level-style-bullet>
      <text:list-level-style-bullet text:level="7" text:bullet-char="•">
        <style:list-level-properties text:space-before="3.06251in" text:min-label-width="0.18749in"/>
        <style:text-properties fo:font-family="Arial" style:font-family-generic="swiss" style:font-pitch="variable" fo:font-size="100%"/>
      </text:list-level-style-bullet>
      <text:list-level-style-bullet text:level="8" text:bullet-char="•">
        <style:list-level-properties text:space-before="3.56251in" text:min-label-width="0.18749in"/>
        <style:text-properties fo:font-family="Arial" style:font-family-generic="swiss" style:font-pitch="variable" fo:font-size="100%"/>
      </text:list-level-style-bullet>
      <text:list-level-style-bullet text:level="9" text:bullet-char="•">
        <style:list-level-properties text:space-before="4.06251in" text:min-label-width="0.18749in"/>
        <style:text-properties fo:font-family="Arial" style:font-family-generic="swiss" style:font-pitch="variable" fo:font-size="100%"/>
      </text:list-level-style-bullet>
    </text:list-style>
    <text:list-style style:name="a28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6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8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91"/>
    <text:list-style style:name="a2704">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995"/>
    <text:list-style style:name="a2707">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2130">
      <text:list-level-style-bullet text:level="1" text:bullet-char="•">
        <style:list-level-properties text:space-before="0.02778in" text:min-label-width="0.3125in"/>
        <style:text-properties fo:font-family="Arial" style:font-family-generic="swiss" style:font-pitch="variable" fo:font-size="100%"/>
      </text:list-level-style-bullet>
      <text:list-level-style-bullet text:level="2" text:bullet-char="•">
        <style:list-level-properties text:space-before="0.52778in" text:min-label-width="0.3125in"/>
        <style:text-properties fo:font-family="Arial" style:font-family-generic="swiss" style:font-pitch="variable" fo:font-size="100%"/>
      </text:list-level-style-bullet>
      <text:list-level-style-bullet text:level="3" text:bullet-char="•">
        <style:list-level-properties text:space-before="1.02778in" text:min-label-width="0.3125in"/>
        <style:text-properties fo:font-family="Arial" style:font-family-generic="swiss" style:font-pitch="variable" fo:font-size="100%"/>
      </text:list-level-style-bullet>
      <text:list-level-style-bullet text:level="4" text:bullet-char="•">
        <style:list-level-properties text:space-before="1.52778in" text:min-label-width="0.3125in"/>
        <style:text-properties fo:font-family="Arial" style:font-family-generic="swiss" style:font-pitch="variable" fo:font-size="100%"/>
      </text:list-level-style-bullet>
      <text:list-level-style-bullet text:level="5" text:bullet-char="•">
        <style:list-level-properties text:space-before="2.02778in" text:min-label-width="0.3125in"/>
        <style:text-properties fo:font-family="Arial" style:font-family-generic="swiss" style:font-pitch="variable" fo:font-size="100%"/>
      </text:list-level-style-bullet>
      <text:list-level-style-bullet text:level="6" text:bullet-char="•">
        <style:list-level-properties text:space-before="2.52778in" text:min-label-width="0.3125in"/>
        <style:text-properties fo:font-family="Arial" style:font-family-generic="swiss" style:font-pitch="variable" fo:font-size="100%"/>
      </text:list-level-style-bullet>
      <text:list-level-style-bullet text:level="7" text:bullet-char="•">
        <style:list-level-properties text:space-before="3.02778in" text:min-label-width="0.3125in"/>
        <style:text-properties fo:font-family="Arial" style:font-family-generic="swiss" style:font-pitch="variable" fo:font-size="100%"/>
      </text:list-level-style-bullet>
      <text:list-level-style-bullet text:level="8" text:bullet-char="•">
        <style:list-level-properties text:space-before="3.52778in" text:min-label-width="0.3125in"/>
        <style:text-properties fo:font-family="Arial" style:font-family-generic="swiss" style:font-pitch="variable" fo:font-size="100%"/>
      </text:list-level-style-bullet>
      <text:list-level-style-bullet text:level="9" text:bullet-char="•">
        <style:list-level-properties text:space-before="4.02778in" text:min-label-width="0.3125in"/>
        <style:text-properties fo:font-family="Arial" style:font-family-generic="swiss" style:font-pitch="variable" fo:font-size="100%"/>
      </text:list-level-style-bullet>
    </text:list-style>
    <text:list-style style:name="a2278">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325">
      <text:list-level-style-bullet text:level="1" text:bullet-char="Ø">
        <style:list-level-properties text:space-before="0in" text:min-label-width="0.375in"/>
        <style:text-properties fo:color="#595959" fo:font-family="Wingdings" style:font-pitch="variable" fo:font-size="0.14583in"/>
      </text:list-level-style-bullet>
      <text:list-level-style-bullet text:level="2" text:bullet-char="Ø">
        <style:list-level-properties text:space-before="0.5in" text:min-label-width="0.375in"/>
        <style:text-properties fo:color="#595959" fo:font-family="Wingdings" style:font-pitch="variable" fo:font-size="0.14583in"/>
      </text:list-level-style-bullet>
      <text:list-level-style-bullet text:level="3" text:bullet-char="Ø">
        <style:list-level-properties text:space-before="1in" text:min-label-width="0.375in"/>
        <style:text-properties fo:color="#595959" fo:font-family="Wingdings" style:font-pitch="variable" fo:font-size="0.14583in"/>
      </text:list-level-style-bullet>
      <text:list-level-style-bullet text:level="4" text:bullet-char="Ø">
        <style:list-level-properties text:space-before="1.5in" text:min-label-width="0.375in"/>
        <style:text-properties fo:color="#595959" fo:font-family="Wingdings" style:font-pitch="variable" fo:font-size="0.14583in"/>
      </text:list-level-style-bullet>
      <text:list-level-style-bullet text:level="5" text:bullet-char="Ø">
        <style:list-level-properties text:space-before="2in" text:min-label-width="0.375in"/>
        <style:text-properties fo:color="#595959" fo:font-family="Wingdings" style:font-pitch="variable" fo:font-size="0.14583in"/>
      </text:list-level-style-bullet>
      <text:list-level-style-bullet text:level="6" text:bullet-char="Ø">
        <style:list-level-properties text:space-before="2.5in" text:min-label-width="0.375in"/>
        <style:text-properties fo:color="#595959" fo:font-family="Wingdings" style:font-pitch="variable" fo:font-size="0.14583in"/>
      </text:list-level-style-bullet>
      <text:list-level-style-bullet text:level="7" text:bullet-char="Ø">
        <style:list-level-properties text:space-before="3in" text:min-label-width="0.375in"/>
        <style:text-properties fo:color="#595959" fo:font-family="Wingdings" style:font-pitch="variable" fo:font-size="0.14583in"/>
      </text:list-level-style-bullet>
      <text:list-level-style-bullet text:level="8" text:bullet-char="Ø">
        <style:list-level-properties text:space-before="3.5in" text:min-label-width="0.375in"/>
        <style:text-properties fo:color="#595959" fo:font-family="Wingdings" style:font-pitch="variable" fo:font-size="0.14583in"/>
      </text:list-level-style-bullet>
      <text:list-level-style-bullet text:level="9" text:bullet-char="Ø">
        <style:list-level-properties text:space-before="4in" text:min-label-width="0.375in"/>
        <style:text-properties fo:color="#595959" fo:font-family="Wingdings" style:font-pitch="variable" fo:font-size="0.14583in"/>
      </text:list-level-style-bullet>
    </text:list-style>
    <text:list-style style:name="a1662">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085">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710">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87497in" text:min-label-width="0.18749in"/>
        <style:text-properties fo:font-family="Arial" fo:font-size="100%"/>
      </text:list-level-style-bullet>
      <text:list-level-style-bullet text:level="4" text:bullet-char="•">
        <style:list-level-properties text:space-before="1.37497in" text:min-label-width="0.18749in"/>
        <style:text-properties fo:font-family="Arial" fo:font-size="100%"/>
      </text:list-level-style-bullet>
      <text:list-level-style-bullet text:level="5" text:bullet-char="•">
        <style:list-level-properties text:space-before="1.87497in" text:min-label-width="0.18749in"/>
        <style:text-properties fo:font-family="Arial" fo:font-size="100%"/>
      </text:list-level-style-bullet>
      <text:list-level-style-bullet text:level="6" text:bullet-char="•">
        <style:list-level-properties text:space-before="2.37497in" text:min-label-width="0.18749in"/>
        <style:text-properties fo:font-family="Arial" fo:font-size="100%"/>
      </text:list-level-style-bullet>
      <text:list-level-style-bullet text:level="7" text:bullet-char="•">
        <style:list-level-properties text:space-before="2.87497in" text:min-label-width="0.18749in"/>
        <style:text-properties fo:font-family="Arial" fo:font-size="100%"/>
      </text:list-level-style-bullet>
      <text:list-level-style-bullet text:level="8" text:bullet-char="•">
        <style:list-level-properties text:space-before="3.37497in" text:min-label-width="0.18749in"/>
        <style:text-properties fo:font-family="Arial" fo:font-size="100%"/>
      </text:list-level-style-bullet>
      <text:list-level-style-bullet text:level="9" text:bullet-char="•">
        <style:list-level-properties text:space-before="3.87497in" text:min-label-width="0.18749in"/>
        <style:text-properties fo:font-family="Arial" fo:font-size="100%"/>
      </text:list-level-style-bullet>
    </text:list-style>
    <text:list-style style:name="a2133">
      <text:list-level-style-bullet text:level="1" text:bullet-char="•">
        <style:list-level-properties text:space-before="0.02778in" text:min-label-width="0.3125in"/>
        <style:text-properties fo:font-family="Arial" style:font-family-generic="swiss" style:font-pitch="variable" fo:font-size="100%"/>
      </text:list-level-style-bullet>
      <text:list-level-style-bullet text:level="2" text:bullet-char="•">
        <style:list-level-properties text:space-before="0.52778in" text:min-label-width="0.3125in"/>
        <style:text-properties fo:font-family="Arial" style:font-family-generic="swiss" style:font-pitch="variable" fo:font-size="100%"/>
      </text:list-level-style-bullet>
      <text:list-level-style-bullet text:level="3" text:bullet-char="•">
        <style:list-level-properties text:space-before="1.02778in" text:min-label-width="0.3125in"/>
        <style:text-properties fo:font-family="Arial" style:font-family-generic="swiss" style:font-pitch="variable" fo:font-size="100%"/>
      </text:list-level-style-bullet>
      <text:list-level-style-bullet text:level="4" text:bullet-char="•">
        <style:list-level-properties text:space-before="1.52778in" text:min-label-width="0.3125in"/>
        <style:text-properties fo:font-family="Arial" style:font-family-generic="swiss" style:font-pitch="variable" fo:font-size="100%"/>
      </text:list-level-style-bullet>
      <text:list-level-style-bullet text:level="5" text:bullet-char="•">
        <style:list-level-properties text:space-before="2.02778in" text:min-label-width="0.3125in"/>
        <style:text-properties fo:font-family="Arial" style:font-family-generic="swiss" style:font-pitch="variable" fo:font-size="100%"/>
      </text:list-level-style-bullet>
      <text:list-level-style-bullet text:level="6" text:bullet-char="•">
        <style:list-level-properties text:space-before="2.52778in" text:min-label-width="0.3125in"/>
        <style:text-properties fo:font-family="Arial" style:font-family-generic="swiss" style:font-pitch="variable" fo:font-size="100%"/>
      </text:list-level-style-bullet>
      <text:list-level-style-bullet text:level="7" text:bullet-char="•">
        <style:list-level-properties text:space-before="3.02778in" text:min-label-width="0.3125in"/>
        <style:text-properties fo:font-family="Arial" style:font-family-generic="swiss" style:font-pitch="variable" fo:font-size="100%"/>
      </text:list-level-style-bullet>
      <text:list-level-style-bullet text:level="8" text:bullet-char="•">
        <style:list-level-properties text:space-before="3.52778in" text:min-label-width="0.3125in"/>
        <style:text-properties fo:font-family="Arial" style:font-family-generic="swiss" style:font-pitch="variable" fo:font-size="100%"/>
      </text:list-level-style-bullet>
      <text:list-level-style-bullet text:level="9" text:bullet-char="•">
        <style:list-level-properties text:space-before="4.02778in" text:min-label-width="0.3125in"/>
        <style:text-properties fo:font-family="Arial" style:font-family-generic="swiss" style:font-pitch="variable" fo:font-size="100%"/>
      </text:list-level-style-bullet>
    </text:list-style>
    <text:list-style style:name="a2328">
      <text:list-level-style-bullet text:level="1" text:bullet-char="o">
        <style:list-level-properties text:space-before="0in" text:min-label-width="0.3125in"/>
        <style:text-properties fo:font-family="Courier New" style:font-family-generic="modern" style:font-pitch="fixed" fo:font-size="0.18056in"/>
      </text:list-level-style-bullet>
      <text:list-level-style-bullet text:level="2" text:bullet-char="o">
        <style:list-level-properties text:space-before="0.5in" text:min-label-width="0.3125in"/>
        <style:text-properties fo:font-family="Courier New" style:font-family-generic="modern" style:font-pitch="fixed" fo:font-size="0.18056in"/>
      </text:list-level-style-bullet>
      <text:list-level-style-bullet text:level="3" text:bullet-char="o">
        <style:list-level-properties text:space-before="1in" text:min-label-width="0.3125in"/>
        <style:text-properties fo:font-family="Courier New" style:font-family-generic="modern" style:font-pitch="fixed" fo:font-size="0.18056in"/>
      </text:list-level-style-bullet>
      <text:list-level-style-bullet text:level="4" text:bullet-char="o">
        <style:list-level-properties text:space-before="1.5in" text:min-label-width="0.3125in"/>
        <style:text-properties fo:font-family="Courier New" style:font-family-generic="modern" style:font-pitch="fixed" fo:font-size="0.18056in"/>
      </text:list-level-style-bullet>
      <text:list-level-style-bullet text:level="5" text:bullet-char="o">
        <style:list-level-properties text:space-before="2in" text:min-label-width="0.3125in"/>
        <style:text-properties fo:font-family="Courier New" style:font-family-generic="modern" style:font-pitch="fixed" fo:font-size="0.18056in"/>
      </text:list-level-style-bullet>
      <text:list-level-style-bullet text:level="6" text:bullet-char="o">
        <style:list-level-properties text:space-before="2.5in" text:min-label-width="0.3125in"/>
        <style:text-properties fo:font-family="Courier New" style:font-family-generic="modern" style:font-pitch="fixed" fo:font-size="0.18056in"/>
      </text:list-level-style-bullet>
      <text:list-level-style-bullet text:level="7" text:bullet-char="o">
        <style:list-level-properties text:space-before="3in" text:min-label-width="0.3125in"/>
        <style:text-properties fo:font-family="Courier New" style:font-family-generic="modern" style:font-pitch="fixed" fo:font-size="0.18056in"/>
      </text:list-level-style-bullet>
      <text:list-level-style-bullet text:level="8" text:bullet-char="o">
        <style:list-level-properties text:space-before="3.5in" text:min-label-width="0.3125in"/>
        <style:text-properties fo:font-family="Courier New" style:font-family-generic="modern" style:font-pitch="fixed" fo:font-size="0.18056in"/>
      </text:list-level-style-bullet>
      <text:list-level-style-bullet text:level="9" text:bullet-char="o">
        <style:list-level-properties text:space-before="4in" text:min-label-width="0.3125in"/>
        <style:text-properties fo:font-family="Courier New" style:font-family-generic="modern" style:font-pitch="fixed" fo:font-size="0.18056in"/>
      </text:list-level-style-bullet>
    </text:list-style>
    <text:list-style style:name="a2088">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471">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5in" text:min-label-width="0.18749in"/>
        <style:text-properties fo:font-family="Arial" style:font-family-generic="swiss" style:font-pitch="variable" fo:font-size="100%"/>
      </text:list-level-style-bullet>
      <text:list-level-style-bullet text:level="3" text:bullet-char="•">
        <style:list-level-properties text:space-before="1in" text:min-label-width="0.18749in"/>
        <style:text-properties fo:font-family="Arial" style:font-family-generic="swiss" style:font-pitch="variable" fo:font-size="100%"/>
      </text:list-level-style-bullet>
      <text:list-level-style-bullet text:level="4" text:bullet-char="•">
        <style:list-level-properties text:space-before="1.5in" text:min-label-width="0.18749in"/>
        <style:text-properties fo:font-family="Arial" style:font-family-generic="swiss" style:font-pitch="variable" fo:font-size="100%"/>
      </text:list-level-style-bullet>
      <text:list-level-style-bullet text:level="5" text:bullet-char="•">
        <style:list-level-properties text:space-before="2in" text:min-label-width="0.18749in"/>
        <style:text-properties fo:font-family="Arial" style:font-family-generic="swiss" style:font-pitch="variable" fo:font-size="100%"/>
      </text:list-level-style-bullet>
      <text:list-level-style-bullet text:level="6" text:bullet-char="•">
        <style:list-level-properties text:space-before="2.5in" text:min-label-width="0.18749in"/>
        <style:text-properties fo:font-family="Arial" style:font-family-generic="swiss" style:font-pitch="variable" fo:font-size="100%"/>
      </text:list-level-style-bullet>
      <text:list-level-style-bullet text:level="7" text:bullet-char="•">
        <style:list-level-properties text:space-before="3in" text:min-label-width="0.18749in"/>
        <style:text-properties fo:font-family="Arial" style:font-family-generic="swiss" style:font-pitch="variable" fo:font-size="100%"/>
      </text:list-level-style-bullet>
      <text:list-level-style-bullet text:level="8" text:bullet-char="•">
        <style:list-level-properties text:space-before="3.5in" text:min-label-width="0.18749in"/>
        <style:text-properties fo:font-family="Arial" style:font-family-generic="swiss" style:font-pitch="variable" fo:font-size="100%"/>
      </text:list-level-style-bullet>
      <text:list-level-style-bullet text:level="9" text:bullet-char="•">
        <style:list-level-properties text:space-before="4in" text:min-label-width="0.18749in"/>
        <style:text-properties fo:font-family="Arial" style:font-family-generic="swiss" style:font-pitch="variable" fo:font-size="100%"/>
      </text:list-level-style-bullet>
    </text:list-style>
    <text:list-style style:name="a1666">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136">
      <text:list-level-style-bullet text:level="1" text:bullet-char="•">
        <style:list-level-properties text:space-before="0.02778in" text:min-label-width="0.3125in"/>
        <style:text-properties fo:font-family="Arial" style:font-family-generic="swiss" style:font-pitch="variable" fo:font-size="100%"/>
      </text:list-level-style-bullet>
      <text:list-level-style-bullet text:level="2" text:bullet-char="•">
        <style:list-level-properties text:space-before="0.52778in" text:min-label-width="0.3125in"/>
        <style:text-properties fo:font-family="Arial" style:font-family-generic="swiss" style:font-pitch="variable" fo:font-size="100%"/>
      </text:list-level-style-bullet>
      <text:list-level-style-bullet text:level="3" text:bullet-char="•">
        <style:list-level-properties text:space-before="1.02778in" text:min-label-width="0.3125in"/>
        <style:text-properties fo:font-family="Arial" style:font-family-generic="swiss" style:font-pitch="variable" fo:font-size="100%"/>
      </text:list-level-style-bullet>
      <text:list-level-style-bullet text:level="4" text:bullet-char="•">
        <style:list-level-properties text:space-before="1.52778in" text:min-label-width="0.3125in"/>
        <style:text-properties fo:font-family="Arial" style:font-family-generic="swiss" style:font-pitch="variable" fo:font-size="100%"/>
      </text:list-level-style-bullet>
      <text:list-level-style-bullet text:level="5" text:bullet-char="•">
        <style:list-level-properties text:space-before="2.02778in" text:min-label-width="0.3125in"/>
        <style:text-properties fo:font-family="Arial" style:font-family-generic="swiss" style:font-pitch="variable" fo:font-size="100%"/>
      </text:list-level-style-bullet>
      <text:list-level-style-bullet text:level="6" text:bullet-char="•">
        <style:list-level-properties text:space-before="2.52778in" text:min-label-width="0.3125in"/>
        <style:text-properties fo:font-family="Arial" style:font-family-generic="swiss" style:font-pitch="variable" fo:font-size="100%"/>
      </text:list-level-style-bullet>
      <text:list-level-style-bullet text:level="7" text:bullet-char="•">
        <style:list-level-properties text:space-before="3.02778in" text:min-label-width="0.3125in"/>
        <style:text-properties fo:font-family="Arial" style:font-family-generic="swiss" style:font-pitch="variable" fo:font-size="100%"/>
      </text:list-level-style-bullet>
      <text:list-level-style-bullet text:level="8" text:bullet-char="•">
        <style:list-level-properties text:space-before="3.52778in" text:min-label-width="0.3125in"/>
        <style:text-properties fo:font-family="Arial" style:font-family-generic="swiss" style:font-pitch="variable" fo:font-size="100%"/>
      </text:list-level-style-bullet>
      <text:list-level-style-bullet text:level="9" text:bullet-char="•">
        <style:list-level-properties text:space-before="4.02778in" text:min-label-width="0.3125in"/>
        <style:text-properties fo:font-family="Arial" style:font-family-generic="swiss" style:font-pitch="variable" fo:font-size="100%"/>
      </text:list-level-style-bullet>
    </text:list-style>
    <text:list-style style:name="a1713">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87497in" text:min-label-width="0.18749in"/>
        <style:text-properties fo:font-family="Arial" fo:font-size="100%"/>
      </text:list-level-style-bullet>
      <text:list-level-style-bullet text:level="4" text:bullet-char="•">
        <style:list-level-properties text:space-before="1.37497in" text:min-label-width="0.18749in"/>
        <style:text-properties fo:font-family="Arial" fo:font-size="100%"/>
      </text:list-level-style-bullet>
      <text:list-level-style-bullet text:level="5" text:bullet-char="•">
        <style:list-level-properties text:space-before="1.87497in" text:min-label-width="0.18749in"/>
        <style:text-properties fo:font-family="Arial" fo:font-size="100%"/>
      </text:list-level-style-bullet>
      <text:list-level-style-bullet text:level="6" text:bullet-char="•">
        <style:list-level-properties text:space-before="2.37497in" text:min-label-width="0.18749in"/>
        <style:text-properties fo:font-family="Arial" fo:font-size="100%"/>
      </text:list-level-style-bullet>
      <text:list-level-style-bullet text:level="7" text:bullet-char="•">
        <style:list-level-properties text:space-before="2.87497in" text:min-label-width="0.18749in"/>
        <style:text-properties fo:font-family="Arial" fo:font-size="100%"/>
      </text:list-level-style-bullet>
      <text:list-level-style-bullet text:level="8" text:bullet-char="•">
        <style:list-level-properties text:space-before="3.37497in" text:min-label-width="0.18749in"/>
        <style:text-properties fo:font-family="Arial" fo:font-size="100%"/>
      </text:list-level-style-bullet>
      <text:list-level-style-bullet text:level="9" text:bullet-char="•">
        <style:list-level-properties text:space-before="3.87497in" text:min-label-width="0.18749in"/>
        <style:text-properties fo:font-family="Arial" fo:font-size="100%"/>
      </text:list-level-style-bullet>
    </text:list-style>
    <text:list-style style:name="a1474">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37497in" text:min-label-width="0.18749in"/>
        <style:text-properties fo:font-family="Arial" style:font-family-generic="swiss" style:font-pitch="variable" fo:font-size="100%"/>
      </text:list-level-style-bullet>
      <text:list-level-style-bullet text:level="3" text:bullet-char="•">
        <style:list-level-properties text:space-before="0.87497in" text:min-label-width="0.18749in"/>
        <style:text-properties fo:font-family="Arial" style:font-family-generic="swiss" style:font-pitch="variable" fo:font-size="100%"/>
      </text:list-level-style-bullet>
      <text:list-level-style-bullet text:level="4" text:bullet-char="•">
        <style:list-level-properties text:space-before="1.37497in" text:min-label-width="0.18749in"/>
        <style:text-properties fo:font-family="Arial" style:font-family-generic="swiss" style:font-pitch="variable" fo:font-size="100%"/>
      </text:list-level-style-bullet>
      <text:list-level-style-bullet text:level="5" text:bullet-char="•">
        <style:list-level-properties text:space-before="1.87497in" text:min-label-width="0.18749in"/>
        <style:text-properties fo:font-family="Arial" style:font-family-generic="swiss" style:font-pitch="variable" fo:font-size="100%"/>
      </text:list-level-style-bullet>
      <text:list-level-style-bullet text:level="6" text:bullet-char="•">
        <style:list-level-properties text:space-before="2.37497in" text:min-label-width="0.18749in"/>
        <style:text-properties fo:font-family="Arial" style:font-family-generic="swiss" style:font-pitch="variable" fo:font-size="100%"/>
      </text:list-level-style-bullet>
      <text:list-level-style-bullet text:level="7" text:bullet-char="•">
        <style:list-level-properties text:space-before="2.87497in" text:min-label-width="0.18749in"/>
        <style:text-properties fo:font-family="Arial" style:font-family-generic="swiss" style:font-pitch="variable" fo:font-size="100%"/>
      </text:list-level-style-bullet>
      <text:list-level-style-bullet text:level="8" text:bullet-char="•">
        <style:list-level-properties text:space-before="3.37497in" text:min-label-width="0.18749in"/>
        <style:text-properties fo:font-family="Arial" style:font-family-generic="swiss" style:font-pitch="variable" fo:font-size="100%"/>
      </text:list-level-style-bullet>
      <text:list-level-style-bullet text:level="9" text:bullet-char="•">
        <style:list-level-properties text:space-before="3.87497in" text:min-label-width="0.18749in"/>
        <style:text-properties fo:font-family="Arial" style:font-family-generic="swiss" style:font-pitch="variable" fo:font-size="100%"/>
      </text:list-level-style-bullet>
    </text:list-style>
    <text:list-style style:name="a1521">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37497in" text:min-label-width="0.18749in"/>
        <style:text-properties fo:font-family="Arial" style:font-family-generic="swiss" style:font-pitch="variable" fo:font-size="100%"/>
      </text:list-level-style-bullet>
      <text:list-level-style-bullet text:level="3" text:bullet-char="•">
        <style:list-level-properties text:space-before="0.74994in" text:min-label-width="0.18749in"/>
        <style:text-properties fo:font-family="Arial" style:font-family-generic="swiss" style:font-pitch="variable" fo:font-size="100%"/>
      </text:list-level-style-bullet>
      <text:list-level-style-bullet text:level="4" text:bullet-char="•">
        <style:list-level-properties text:space-before="1.12491in" text:min-label-width="0.18749in"/>
        <style:text-properties fo:font-family="Arial" style:font-family-generic="swiss" style:font-pitch="variable" fo:font-size="100%"/>
      </text:list-level-style-bullet>
      <text:list-level-style-bullet text:level="5" text:bullet-char="•">
        <style:list-level-properties text:space-before="1.49988in" text:min-label-width="0.18749in"/>
        <style:text-properties fo:font-family="Arial" style:font-family-generic="swiss" style:font-pitch="variable" fo:font-size="100%"/>
      </text:list-level-style-bullet>
      <text:list-level-style-bullet text:level="6" text:bullet-char="•">
        <style:list-level-properties text:space-before="2.56251in" text:min-label-width="0.18749in"/>
        <style:text-properties fo:font-family="Arial" style:font-family-generic="swiss" style:font-pitch="variable" fo:font-size="100%"/>
      </text:list-level-style-bullet>
      <text:list-level-style-bullet text:level="7" text:bullet-char="•">
        <style:list-level-properties text:space-before="3.06251in" text:min-label-width="0.18749in"/>
        <style:text-properties fo:font-family="Arial" style:font-family-generic="swiss" style:font-pitch="variable" fo:font-size="100%"/>
      </text:list-level-style-bullet>
      <text:list-level-style-bullet text:level="8" text:bullet-char="•">
        <style:list-level-properties text:space-before="3.56251in" text:min-label-width="0.18749in"/>
        <style:text-properties fo:font-family="Arial" style:font-family-generic="swiss" style:font-pitch="variable" fo:font-size="100%"/>
      </text:list-level-style-bullet>
      <text:list-level-style-bullet text:level="9" text:bullet-char="•">
        <style:list-level-properties text:space-before="4.06251in" text:min-label-width="0.18749in"/>
        <style:text-properties fo:font-family="Arial" style:font-family-generic="swiss" style:font-pitch="variable" fo:font-size="100%"/>
      </text:list-level-style-bullet>
    </text:list-style>
    <text:list-style style:name="a1669">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1716">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87497in" text:min-label-width="0.18749in"/>
        <style:text-properties fo:font-family="Arial" fo:font-size="100%"/>
      </text:list-level-style-bullet>
      <text:list-level-style-bullet text:level="4" text:bullet-char="•">
        <style:list-level-properties text:space-before="1.37497in" text:min-label-width="0.18749in"/>
        <style:text-properties fo:font-family="Arial" fo:font-size="100%"/>
      </text:list-level-style-bullet>
      <text:list-level-style-bullet text:level="5" text:bullet-char="•">
        <style:list-level-properties text:space-before="1.87497in" text:min-label-width="0.18749in"/>
        <style:text-properties fo:font-family="Arial" fo:font-size="100%"/>
      </text:list-level-style-bullet>
      <text:list-level-style-bullet text:level="6" text:bullet-char="•">
        <style:list-level-properties text:space-before="2.37497in" text:min-label-width="0.18749in"/>
        <style:text-properties fo:font-family="Arial" fo:font-size="100%"/>
      </text:list-level-style-bullet>
      <text:list-level-style-bullet text:level="7" text:bullet-char="•">
        <style:list-level-properties text:space-before="2.87497in" text:min-label-width="0.18749in"/>
        <style:text-properties fo:font-family="Arial" fo:font-size="100%"/>
      </text:list-level-style-bullet>
      <text:list-level-style-bullet text:level="8" text:bullet-char="•">
        <style:list-level-properties text:space-before="3.37497in" text:min-label-width="0.18749in"/>
        <style:text-properties fo:font-family="Arial" fo:font-size="100%"/>
      </text:list-level-style-bullet>
      <text:list-level-style-bullet text:level="9" text:bullet-char="•">
        <style:list-level-properties text:space-before="3.87497in" text:min-label-width="0.18749in"/>
        <style:text-properties fo:font-family="Arial" fo:font-size="100%"/>
      </text:list-level-style-bullet>
    </text:list-style>
    <text:list-style style:name="a1477">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37497in" text:min-label-width="0.18749in"/>
        <style:text-properties fo:font-family="Arial" style:font-family-generic="swiss" style:font-pitch="variable" fo:font-size="100%"/>
      </text:list-level-style-bullet>
      <text:list-level-style-bullet text:level="3" text:bullet-char="•">
        <style:list-level-properties text:space-before="0.87497in" text:min-label-width="0.18749in"/>
        <style:text-properties fo:font-family="Arial" style:font-family-generic="swiss" style:font-pitch="variable" fo:font-size="100%"/>
      </text:list-level-style-bullet>
      <text:list-level-style-bullet text:level="4" text:bullet-char="•">
        <style:list-level-properties text:space-before="1.37497in" text:min-label-width="0.18749in"/>
        <style:text-properties fo:font-family="Arial" style:font-family-generic="swiss" style:font-pitch="variable" fo:font-size="100%"/>
      </text:list-level-style-bullet>
      <text:list-level-style-bullet text:level="5" text:bullet-char="•">
        <style:list-level-properties text:space-before="1.87497in" text:min-label-width="0.18749in"/>
        <style:text-properties fo:font-family="Arial" style:font-family-generic="swiss" style:font-pitch="variable" fo:font-size="100%"/>
      </text:list-level-style-bullet>
      <text:list-level-style-bullet text:level="6" text:bullet-char="•">
        <style:list-level-properties text:space-before="2.37497in" text:min-label-width="0.18749in"/>
        <style:text-properties fo:font-family="Arial" style:font-family-generic="swiss" style:font-pitch="variable" fo:font-size="100%"/>
      </text:list-level-style-bullet>
      <text:list-level-style-bullet text:level="7" text:bullet-char="•">
        <style:list-level-properties text:space-before="2.87497in" text:min-label-width="0.18749in"/>
        <style:text-properties fo:font-family="Arial" style:font-family-generic="swiss" style:font-pitch="variable" fo:font-size="100%"/>
      </text:list-level-style-bullet>
      <text:list-level-style-bullet text:level="8" text:bullet-char="•">
        <style:list-level-properties text:space-before="3.37497in" text:min-label-width="0.18749in"/>
        <style:text-properties fo:font-family="Arial" style:font-family-generic="swiss" style:font-pitch="variable" fo:font-size="100%"/>
      </text:list-level-style-bullet>
      <text:list-level-style-bullet text:level="9" text:bullet-char="•">
        <style:list-level-properties text:space-before="3.87497in" text:min-label-width="0.18749in"/>
        <style:text-properties fo:font-family="Arial" style:font-family-generic="swiss" style:font-pitch="variable" fo:font-size="100%"/>
      </text:list-level-style-bullet>
    </text:list-style>
    <text:list-style style:name="a1719">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5in" text:min-label-width="0.18749in"/>
        <style:text-properties fo:font-family="Arial" fo:font-size="100%"/>
      </text:list-level-style-bullet>
      <text:list-level-style-bullet text:level="3" text:bullet-char="•">
        <style:list-level-properties text:space-before="1in" text:min-label-width="0.18749in"/>
        <style:text-properties fo:font-family="Arial" fo:font-size="100%"/>
      </text:list-level-style-bullet>
      <text:list-level-style-bullet text:level="4" text:bullet-char="•">
        <style:list-level-properties text:space-before="1.5in" text:min-label-width="0.18749in"/>
        <style:text-properties fo:font-family="Arial" fo:font-size="100%"/>
      </text:list-level-style-bullet>
      <text:list-level-style-bullet text:level="5" text:bullet-char="•">
        <style:list-level-properties text:space-before="2in" text:min-label-width="0.18749in"/>
        <style:text-properties fo:font-family="Arial" fo:font-size="100%"/>
      </text:list-level-style-bullet>
      <text:list-level-style-bullet text:level="6" text:bullet-char="•">
        <style:list-level-properties text:space-before="2.5in" text:min-label-width="0.18749in"/>
        <style:text-properties fo:font-family="Arial" fo:font-size="100%"/>
      </text:list-level-style-bullet>
      <text:list-level-style-bullet text:level="7" text:bullet-char="•">
        <style:list-level-properties text:space-before="3in" text:min-label-width="0.18749in"/>
        <style:text-properties fo:font-family="Arial" fo:font-size="100%"/>
      </text:list-level-style-bullet>
      <text:list-level-style-bullet text:level="8" text:bullet-char="•">
        <style:list-level-properties text:space-before="3.5in" text:min-label-width="0.18749in"/>
        <style:text-properties fo:font-family="Arial" fo:font-size="100%"/>
      </text:list-level-style-bullet>
      <text:list-level-style-bullet text:level="9" text:bullet-char="•">
        <style:list-level-properties text:space-before="4in" text:min-label-width="0.18749in"/>
        <style:text-properties fo:font-family="Arial" fo:font-size="100%"/>
      </text:list-level-style-bullet>
    </text:list-style>
    <text:list-style style:name="a1528">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37497in" text:min-label-width="0.18749in"/>
        <style:text-properties fo:font-family="Arial" style:font-family-generic="swiss" style:font-pitch="variable" fo:font-size="100%"/>
      </text:list-level-style-bullet>
      <text:list-level-style-bullet text:level="3" text:bullet-char="•">
        <style:list-level-properties text:space-before="0.74994in" text:min-label-width="0.18749in"/>
        <style:text-properties fo:font-family="Arial" style:font-family-generic="swiss" style:font-pitch="variable" fo:font-size="100%"/>
      </text:list-level-style-bullet>
      <text:list-level-style-bullet text:level="4" text:bullet-char="•">
        <style:list-level-properties text:space-before="1.12491in" text:min-label-width="0.18749in"/>
        <style:text-properties fo:font-family="Arial" style:font-family-generic="swiss" style:font-pitch="variable" fo:font-size="100%"/>
      </text:list-level-style-bullet>
      <text:list-level-style-bullet text:level="5" text:bullet-char="•">
        <style:list-level-properties text:space-before="1.49988in" text:min-label-width="0.18749in"/>
        <style:text-properties fo:font-family="Arial" style:font-family-generic="swiss" style:font-pitch="variable" fo:font-size="100%"/>
      </text:list-level-style-bullet>
      <text:list-level-style-bullet text:level="6" text:bullet-char="•">
        <style:list-level-properties text:space-before="2.56251in" text:min-label-width="0.18749in"/>
        <style:text-properties fo:font-family="Arial" style:font-family-generic="swiss" style:font-pitch="variable" fo:font-size="100%"/>
      </text:list-level-style-bullet>
      <text:list-level-style-bullet text:level="7" text:bullet-char="•">
        <style:list-level-properties text:space-before="3.06251in" text:min-label-width="0.18749in"/>
        <style:text-properties fo:font-family="Arial" style:font-family-generic="swiss" style:font-pitch="variable" fo:font-size="100%"/>
      </text:list-level-style-bullet>
      <text:list-level-style-bullet text:level="8" text:bullet-char="•">
        <style:list-level-properties text:space-before="3.56251in" text:min-label-width="0.18749in"/>
        <style:text-properties fo:font-family="Arial" style:font-family-generic="swiss" style:font-pitch="variable" fo:font-size="100%"/>
      </text:list-level-style-bullet>
      <text:list-level-style-bullet text:level="9" text:bullet-char="•">
        <style:list-level-properties text:space-before="4.06251in" text:min-label-width="0.18749in"/>
        <style:text-properties fo:font-family="Arial" style:font-family-generic="swiss" style:font-pitch="variable" fo:font-size="100%"/>
      </text:list-level-style-bullet>
    </text:list-style>
    <text:list-style style:name="a2710">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2713">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2522">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716">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2281">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525">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719">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331">
      <text:list-level-style-bullet text:level="1" text:bullet-char="o">
        <style:list-level-properties text:space-before="0in" text:min-label-width="0.3125in"/>
        <style:text-properties fo:font-family="Courier New" style:font-family-generic="modern" style:font-pitch="fixed" fo:font-size="0.18056in"/>
      </text:list-level-style-bullet>
      <text:list-level-style-bullet text:level="2" text:bullet-char="o">
        <style:list-level-properties text:space-before="0.5in" text:min-label-width="0.3125in"/>
        <style:text-properties fo:font-family="Courier New" style:font-family-generic="modern" style:font-pitch="fixed" fo:font-size="0.18056in"/>
      </text:list-level-style-bullet>
      <text:list-level-style-bullet text:level="3" text:bullet-char="o">
        <style:list-level-properties text:space-before="1in" text:min-label-width="0.3125in"/>
        <style:text-properties fo:font-family="Courier New" style:font-family-generic="modern" style:font-pitch="fixed" fo:font-size="0.18056in"/>
      </text:list-level-style-bullet>
      <text:list-level-style-bullet text:level="4" text:bullet-char="o">
        <style:list-level-properties text:space-before="1.5in" text:min-label-width="0.3125in"/>
        <style:text-properties fo:font-family="Courier New" style:font-family-generic="modern" style:font-pitch="fixed" fo:font-size="0.18056in"/>
      </text:list-level-style-bullet>
      <text:list-level-style-bullet text:level="5" text:bullet-char="o">
        <style:list-level-properties text:space-before="2in" text:min-label-width="0.3125in"/>
        <style:text-properties fo:font-family="Courier New" style:font-family-generic="modern" style:font-pitch="fixed" fo:font-size="0.18056in"/>
      </text:list-level-style-bullet>
      <text:list-level-style-bullet text:level="6" text:bullet-char="o">
        <style:list-level-properties text:space-before="2.5in" text:min-label-width="0.3125in"/>
        <style:text-properties fo:font-family="Courier New" style:font-family-generic="modern" style:font-pitch="fixed" fo:font-size="0.18056in"/>
      </text:list-level-style-bullet>
      <text:list-level-style-bullet text:level="7" text:bullet-char="o">
        <style:list-level-properties text:space-before="3in" text:min-label-width="0.3125in"/>
        <style:text-properties fo:font-family="Courier New" style:font-family-generic="modern" style:font-pitch="fixed" fo:font-size="0.18056in"/>
      </text:list-level-style-bullet>
      <text:list-level-style-bullet text:level="8" text:bullet-char="o">
        <style:list-level-properties text:space-before="3.5in" text:min-label-width="0.3125in"/>
        <style:text-properties fo:font-family="Courier New" style:font-family-generic="modern" style:font-pitch="fixed" fo:font-size="0.18056in"/>
      </text:list-level-style-bullet>
      <text:list-level-style-bullet text:level="9" text:bullet-char="o">
        <style:list-level-properties text:space-before="4in" text:min-label-width="0.3125in"/>
        <style:text-properties fo:font-family="Courier New" style:font-family-generic="modern" style:font-pitch="fixed" fo:font-size="0.18056in"/>
      </text:list-level-style-bullet>
    </text:list-style>
    <text:list-style style:name="a2091">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2286">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334">
      <text:list-level-style-bullet text:level="1" text:bullet-char="o">
        <style:list-level-properties text:space-before="0in" text:min-label-width="0.3125in"/>
        <style:text-properties fo:font-family="Courier New" style:font-family-generic="modern" style:font-pitch="fixed" fo:font-size="0.18056in"/>
      </text:list-level-style-bullet>
      <text:list-level-style-bullet text:level="2" text:bullet-char="o">
        <style:list-level-properties text:space-before="0.5in" text:min-label-width="0.3125in"/>
        <style:text-properties fo:font-family="Courier New" style:font-family-generic="modern" style:font-pitch="fixed" fo:font-size="0.18056in"/>
      </text:list-level-style-bullet>
      <text:list-level-style-bullet text:level="3" text:bullet-char="o">
        <style:list-level-properties text:space-before="1in" text:min-label-width="0.3125in"/>
        <style:text-properties fo:font-family="Courier New" style:font-family-generic="modern" style:font-pitch="fixed" fo:font-size="0.18056in"/>
      </text:list-level-style-bullet>
      <text:list-level-style-bullet text:level="4" text:bullet-char="o">
        <style:list-level-properties text:space-before="1.5in" text:min-label-width="0.3125in"/>
        <style:text-properties fo:font-family="Courier New" style:font-family-generic="modern" style:font-pitch="fixed" fo:font-size="0.18056in"/>
      </text:list-level-style-bullet>
      <text:list-level-style-bullet text:level="5" text:bullet-char="o">
        <style:list-level-properties text:space-before="2in" text:min-label-width="0.3125in"/>
        <style:text-properties fo:font-family="Courier New" style:font-family-generic="modern" style:font-pitch="fixed" fo:font-size="0.18056in"/>
      </text:list-level-style-bullet>
      <text:list-level-style-bullet text:level="6" text:bullet-char="o">
        <style:list-level-properties text:space-before="2.5in" text:min-label-width="0.3125in"/>
        <style:text-properties fo:font-family="Courier New" style:font-family-generic="modern" style:font-pitch="fixed" fo:font-size="0.18056in"/>
      </text:list-level-style-bullet>
      <text:list-level-style-bullet text:level="7" text:bullet-char="o">
        <style:list-level-properties text:space-before="3in" text:min-label-width="0.3125in"/>
        <style:text-properties fo:font-family="Courier New" style:font-family-generic="modern" style:font-pitch="fixed" fo:font-size="0.18056in"/>
      </text:list-level-style-bullet>
      <text:list-level-style-bullet text:level="8" text:bullet-char="o">
        <style:list-level-properties text:space-before="3.5in" text:min-label-width="0.3125in"/>
        <style:text-properties fo:font-family="Courier New" style:font-family-generic="modern" style:font-pitch="fixed" fo:font-size="0.18056in"/>
      </text:list-level-style-bullet>
      <text:list-level-style-bullet text:level="9" text:bullet-char="o">
        <style:list-level-properties text:space-before="4in" text:min-label-width="0.3125in"/>
        <style:text-properties fo:font-family="Courier New" style:font-family-generic="modern" style:font-pitch="fixed" fo:font-size="0.18056in"/>
      </text:list-level-style-bullet>
    </text:list-style>
    <text:list-style style:name="a2529">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094">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2289">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337">
      <text:list-level-style-bullet text:level="1" text:bullet-char="o">
        <style:list-level-properties text:space-before="0in" text:min-label-width="0.3125in"/>
        <style:text-properties fo:font-family="Courier New" style:font-family-generic="modern" style:font-pitch="fixed" fo:font-size="0.18056in"/>
      </text:list-level-style-bullet>
      <text:list-level-style-bullet text:level="2" text:bullet-char="o">
        <style:list-level-properties text:space-before="0.5in" text:min-label-width="0.3125in"/>
        <style:text-properties fo:font-family="Courier New" style:font-family-generic="modern" style:font-pitch="fixed" fo:font-size="0.18056in"/>
      </text:list-level-style-bullet>
      <text:list-level-style-bullet text:level="3" text:bullet-char="o">
        <style:list-level-properties text:space-before="1in" text:min-label-width="0.3125in"/>
        <style:text-properties fo:font-family="Courier New" style:font-family-generic="modern" style:font-pitch="fixed" fo:font-size="0.18056in"/>
      </text:list-level-style-bullet>
      <text:list-level-style-bullet text:level="4" text:bullet-char="o">
        <style:list-level-properties text:space-before="1.5in" text:min-label-width="0.3125in"/>
        <style:text-properties fo:font-family="Courier New" style:font-family-generic="modern" style:font-pitch="fixed" fo:font-size="0.18056in"/>
      </text:list-level-style-bullet>
      <text:list-level-style-bullet text:level="5" text:bullet-char="o">
        <style:list-level-properties text:space-before="2in" text:min-label-width="0.3125in"/>
        <style:text-properties fo:font-family="Courier New" style:font-family-generic="modern" style:font-pitch="fixed" fo:font-size="0.18056in"/>
      </text:list-level-style-bullet>
      <text:list-level-style-bullet text:level="6" text:bullet-char="o">
        <style:list-level-properties text:space-before="2.5in" text:min-label-width="0.3125in"/>
        <style:text-properties fo:font-family="Courier New" style:font-family-generic="modern" style:font-pitch="fixed" fo:font-size="0.18056in"/>
      </text:list-level-style-bullet>
      <text:list-level-style-bullet text:level="7" text:bullet-char="o">
        <style:list-level-properties text:space-before="3in" text:min-label-width="0.3125in"/>
        <style:text-properties fo:font-family="Courier New" style:font-family-generic="modern" style:font-pitch="fixed" fo:font-size="0.18056in"/>
      </text:list-level-style-bullet>
      <text:list-level-style-bullet text:level="8" text:bullet-char="o">
        <style:list-level-properties text:space-before="3.5in" text:min-label-width="0.3125in"/>
        <style:text-properties fo:font-family="Courier New" style:font-family-generic="modern" style:font-pitch="fixed" fo:font-size="0.18056in"/>
      </text:list-level-style-bullet>
      <text:list-level-style-bullet text:level="9" text:bullet-char="o">
        <style:list-level-properties text:space-before="4in" text:min-label-width="0.3125in"/>
        <style:text-properties fo:font-family="Courier New" style:font-family-generic="modern" style:font-pitch="fixed" fo:font-size="0.18056in"/>
      </text:list-level-style-bullet>
    </text:list-style>
    <text:list-style style:name="a1722">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87497in" text:min-label-width="0.18749in"/>
        <style:text-properties fo:font-family="Arial" fo:font-size="100%"/>
      </text:list-level-style-bullet>
      <text:list-level-style-bullet text:level="4" text:bullet-char="•">
        <style:list-level-properties text:space-before="1.37497in" text:min-label-width="0.18749in"/>
        <style:text-properties fo:font-family="Arial" fo:font-size="100%"/>
      </text:list-level-style-bullet>
      <text:list-level-style-bullet text:level="5" text:bullet-char="•">
        <style:list-level-properties text:space-before="1.87497in" text:min-label-width="0.18749in"/>
        <style:text-properties fo:font-family="Arial" fo:font-size="100%"/>
      </text:list-level-style-bullet>
      <text:list-level-style-bullet text:level="6" text:bullet-char="•">
        <style:list-level-properties text:space-before="2.37497in" text:min-label-width="0.18749in"/>
        <style:text-properties fo:font-family="Arial" fo:font-size="100%"/>
      </text:list-level-style-bullet>
      <text:list-level-style-bullet text:level="7" text:bullet-char="•">
        <style:list-level-properties text:space-before="2.87497in" text:min-label-width="0.18749in"/>
        <style:text-properties fo:font-family="Arial" fo:font-size="100%"/>
      </text:list-level-style-bullet>
      <text:list-level-style-bullet text:level="8" text:bullet-char="•">
        <style:list-level-properties text:space-before="3.37497in" text:min-label-width="0.18749in"/>
        <style:text-properties fo:font-family="Arial" fo:font-size="100%"/>
      </text:list-level-style-bullet>
      <text:list-level-style-bullet text:level="9" text:bullet-char="•">
        <style:list-level-properties text:space-before="3.87497in" text:min-label-width="0.18749in"/>
        <style:text-properties fo:font-family="Arial" fo:font-size="100%"/>
      </text:list-level-style-bullet>
    </text:list-style>
    <text:list-style style:name="a214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31">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725">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5in" text:min-label-width="0.18749in"/>
        <style:text-properties fo:font-family="Arial" fo:font-size="100%"/>
      </text:list-level-style-bullet>
      <text:list-level-style-bullet text:level="3" text:bullet-char="•">
        <style:list-level-properties text:space-before="1in" text:min-label-width="0.18749in"/>
        <style:text-properties fo:font-family="Arial" fo:font-size="100%"/>
      </text:list-level-style-bullet>
      <text:list-level-style-bullet text:level="4" text:bullet-char="•">
        <style:list-level-properties text:space-before="1.5in" text:min-label-width="0.18749in"/>
        <style:text-properties fo:font-family="Arial" fo:font-size="100%"/>
      </text:list-level-style-bullet>
      <text:list-level-style-bullet text:level="5" text:bullet-char="•">
        <style:list-level-properties text:space-before="2in" text:min-label-width="0.18749in"/>
        <style:text-properties fo:font-family="Arial" fo:font-size="100%"/>
      </text:list-level-style-bullet>
      <text:list-level-style-bullet text:level="6" text:bullet-char="•">
        <style:list-level-properties text:space-before="2.5in" text:min-label-width="0.18749in"/>
        <style:text-properties fo:font-family="Arial" fo:font-size="100%"/>
      </text:list-level-style-bullet>
      <text:list-level-style-bullet text:level="7" text:bullet-char="•">
        <style:list-level-properties text:space-before="3in" text:min-label-width="0.18749in"/>
        <style:text-properties fo:font-family="Arial" fo:font-size="100%"/>
      </text:list-level-style-bullet>
      <text:list-level-style-bullet text:level="8" text:bullet-char="•">
        <style:list-level-properties text:space-before="3.5in" text:min-label-width="0.18749in"/>
        <style:text-properties fo:font-family="Arial" fo:font-size="100%"/>
      </text:list-level-style-bullet>
      <text:list-level-style-bullet text:level="9" text:bullet-char="•">
        <style:list-level-properties text:space-before="4in" text:min-label-width="0.18749in"/>
        <style:text-properties fo:font-family="Arial" fo:font-size="100%"/>
      </text:list-level-style-bullet>
    </text:list-style>
    <text:list-style style:name="a1535">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1488">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729">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5in" text:min-label-width="0.18749in"/>
        <style:text-properties fo:font-family="Arial" fo:font-size="100%"/>
      </text:list-level-style-bullet>
      <text:list-level-style-bullet text:level="3" text:bullet-char="•">
        <style:list-level-properties text:space-before="1in" text:min-label-width="0.18749in"/>
        <style:text-properties fo:font-family="Arial" fo:font-size="100%"/>
      </text:list-level-style-bullet>
      <text:list-level-style-bullet text:level="4" text:bullet-char="•">
        <style:list-level-properties text:space-before="1.5in" text:min-label-width="0.18749in"/>
        <style:text-properties fo:font-family="Arial" fo:font-size="100%"/>
      </text:list-level-style-bullet>
      <text:list-level-style-bullet text:level="5" text:bullet-char="•">
        <style:list-level-properties text:space-before="2in" text:min-label-width="0.18749in"/>
        <style:text-properties fo:font-family="Arial" fo:font-size="100%"/>
      </text:list-level-style-bullet>
      <text:list-level-style-bullet text:level="6" text:bullet-char="•">
        <style:list-level-properties text:space-before="2.5in" text:min-label-width="0.18749in"/>
        <style:text-properties fo:font-family="Arial" fo:font-size="100%"/>
      </text:list-level-style-bullet>
      <text:list-level-style-bullet text:level="7" text:bullet-char="•">
        <style:list-level-properties text:space-before="3in" text:min-label-width="0.18749in"/>
        <style:text-properties fo:font-family="Arial" fo:font-size="100%"/>
      </text:list-level-style-bullet>
      <text:list-level-style-bullet text:level="8" text:bullet-char="•">
        <style:list-level-properties text:space-before="3.5in" text:min-label-width="0.18749in"/>
        <style:text-properties fo:font-family="Arial" fo:font-size="100%"/>
      </text:list-level-style-bullet>
      <text:list-level-style-bullet text:level="9" text:bullet-char="•">
        <style:list-level-properties text:space-before="4in" text:min-label-width="0.18749in"/>
        <style:text-properties fo:font-family="Arial" fo:font-size="100%"/>
      </text:list-level-style-bullet>
    </text:list-style>
    <text:list-style style:name="a28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539">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2009"/>
    <text:list-style style:name="a28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347">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670">
      <text:list-level-style-bullet text:level="1" text:bullet-char="•">
        <style:list-level-properties text:space-before="0in" text:min-label-width="0.1836in"/>
        <style:text-properties fo:font-family="Arial" style:font-family-generic="swiss" style:font-pitch="variable" fo:font-size="100%"/>
      </text:list-level-style-bullet>
      <text:list-level-style-bullet text:level="2" text:bullet-char="•">
        <style:list-level-properties text:space-before="0.5in" text:min-label-width="0.1836in"/>
        <style:text-properties fo:font-family="Arial" style:font-family-generic="swiss" style:font-pitch="variable" fo:font-size="100%"/>
      </text:list-level-style-bullet>
      <text:list-level-style-bullet text:level="3" text:bullet-char="•">
        <style:list-level-properties text:space-before="1in" text:min-label-width="0.1836in"/>
        <style:text-properties fo:font-family="Arial" style:font-family-generic="swiss" style:font-pitch="variable" fo:font-size="100%"/>
      </text:list-level-style-bullet>
      <text:list-level-style-bullet text:level="4" text:bullet-char="•">
        <style:list-level-properties text:space-before="1.5in" text:min-label-width="0.1836in"/>
        <style:text-properties fo:font-family="Arial" style:font-family-generic="swiss" style:font-pitch="variable" fo:font-size="100%"/>
      </text:list-level-style-bullet>
      <text:list-level-style-bullet text:level="5" text:bullet-char="•">
        <style:list-level-properties text:space-before="2in" text:min-label-width="0.1836in"/>
        <style:text-properties fo:font-family="Arial" style:font-family-generic="swiss" style:font-pitch="variable" fo:font-size="100%"/>
      </text:list-level-style-bullet>
      <text:list-level-style-bullet text:level="6" text:bullet-char="•">
        <style:list-level-properties text:space-before="2.5in" text:min-label-width="0.1836in"/>
        <style:text-properties fo:font-family="Arial" style:font-family-generic="swiss" style:font-pitch="variable" fo:font-size="100%"/>
      </text:list-level-style-bullet>
      <text:list-level-style-bullet text:level="7" text:bullet-char="•">
        <style:list-level-properties text:space-before="3in" text:min-label-width="0.1836in"/>
        <style:text-properties fo:font-family="Arial" style:font-family-generic="swiss" style:font-pitch="variable" fo:font-size="100%"/>
      </text:list-level-style-bullet>
      <text:list-level-style-bullet text:level="8" text:bullet-char="•">
        <style:list-level-properties text:space-before="3.5in" text:min-label-width="0.1836in"/>
        <style:text-properties fo:font-family="Arial" style:font-family-generic="swiss" style:font-pitch="variable" fo:font-size="100%"/>
      </text:list-level-style-bullet>
      <text:list-level-style-bullet text:level="9" text:bullet-char="•">
        <style:list-level-properties text:space-before="4in" text:min-label-width="0.1836in"/>
        <style:text-properties fo:font-family="Arial" style:font-family-generic="swiss" style:font-pitch="variable" fo:font-size="100%"/>
      </text:list-level-style-bullet>
    </text:list-style>
    <text:list-style style:name="a28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673">
      <text:list-level-style-bullet text:level="1" text:bullet-char="•">
        <style:list-level-properties text:space-before="0in" text:min-label-width="0.1836in"/>
        <style:text-properties fo:font-family="Arial" style:font-family-generic="swiss" style:font-pitch="variable" fo:font-size="100%"/>
      </text:list-level-style-bullet>
      <text:list-level-style-bullet text:level="2" text:bullet-char="•">
        <style:list-level-properties text:space-before="0.5in" text:min-label-width="0.1836in"/>
        <style:text-properties fo:font-family="Arial" style:font-family-generic="swiss" style:font-pitch="variable" fo:font-size="100%"/>
      </text:list-level-style-bullet>
      <text:list-level-style-bullet text:level="3" text:bullet-char="•">
        <style:list-level-properties text:space-before="1in" text:min-label-width="0.1836in"/>
        <style:text-properties fo:font-family="Arial" style:font-family-generic="swiss" style:font-pitch="variable" fo:font-size="100%"/>
      </text:list-level-style-bullet>
      <text:list-level-style-bullet text:level="4" text:bullet-char="•">
        <style:list-level-properties text:space-before="1.5in" text:min-label-width="0.1836in"/>
        <style:text-properties fo:font-family="Arial" style:font-family-generic="swiss" style:font-pitch="variable" fo:font-size="100%"/>
      </text:list-level-style-bullet>
      <text:list-level-style-bullet text:level="5" text:bullet-char="•">
        <style:list-level-properties text:space-before="2in" text:min-label-width="0.1836in"/>
        <style:text-properties fo:font-family="Arial" style:font-family-generic="swiss" style:font-pitch="variable" fo:font-size="100%"/>
      </text:list-level-style-bullet>
      <text:list-level-style-bullet text:level="6" text:bullet-char="•">
        <style:list-level-properties text:space-before="2.5in" text:min-label-width="0.1836in"/>
        <style:text-properties fo:font-family="Arial" style:font-family-generic="swiss" style:font-pitch="variable" fo:font-size="100%"/>
      </text:list-level-style-bullet>
      <text:list-level-style-bullet text:level="7" text:bullet-char="•">
        <style:list-level-properties text:space-before="3in" text:min-label-width="0.1836in"/>
        <style:text-properties fo:font-family="Arial" style:font-family-generic="swiss" style:font-pitch="variable" fo:font-size="100%"/>
      </text:list-level-style-bullet>
      <text:list-level-style-bullet text:level="8" text:bullet-char="•">
        <style:list-level-properties text:space-before="3.5in" text:min-label-width="0.1836in"/>
        <style:text-properties fo:font-family="Arial" style:font-family-generic="swiss" style:font-pitch="variable" fo:font-size="100%"/>
      </text:list-level-style-bullet>
      <text:list-level-style-bullet text:level="9" text:bullet-char="•">
        <style:list-level-properties text:space-before="4in" text:min-label-width="0.1836in"/>
        <style:text-properties fo:font-family="Arial" style:font-family-generic="swiss" style:font-pitch="variable" fo:font-size="100%"/>
      </text:list-level-style-bullet>
    </text:list-style>
    <text:list-style style:name="a28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676">
      <text:list-level-style-bullet text:level="1" text:bullet-char="•">
        <style:list-level-properties text:space-before="0in" text:min-label-width="0.1836in"/>
        <style:text-properties fo:font-family="Arial" style:font-family-generic="swiss" style:font-pitch="variable" fo:font-size="100%"/>
      </text:list-level-style-bullet>
      <text:list-level-style-bullet text:level="2" text:bullet-char="•">
        <style:list-level-properties text:space-before="0.5in" text:min-label-width="0.1836in"/>
        <style:text-properties fo:font-family="Arial" style:font-family-generic="swiss" style:font-pitch="variable" fo:font-size="100%"/>
      </text:list-level-style-bullet>
      <text:list-level-style-bullet text:level="3" text:bullet-char="•">
        <style:list-level-properties text:space-before="1in" text:min-label-width="0.1836in"/>
        <style:text-properties fo:font-family="Arial" style:font-family-generic="swiss" style:font-pitch="variable" fo:font-size="100%"/>
      </text:list-level-style-bullet>
      <text:list-level-style-bullet text:level="4" text:bullet-char="•">
        <style:list-level-properties text:space-before="1.5in" text:min-label-width="0.1836in"/>
        <style:text-properties fo:font-family="Arial" style:font-family-generic="swiss" style:font-pitch="variable" fo:font-size="100%"/>
      </text:list-level-style-bullet>
      <text:list-level-style-bullet text:level="5" text:bullet-char="•">
        <style:list-level-properties text:space-before="2in" text:min-label-width="0.1836in"/>
        <style:text-properties fo:font-family="Arial" style:font-family-generic="swiss" style:font-pitch="variable" fo:font-size="100%"/>
      </text:list-level-style-bullet>
      <text:list-level-style-bullet text:level="6" text:bullet-char="•">
        <style:list-level-properties text:space-before="2.5in" text:min-label-width="0.1836in"/>
        <style:text-properties fo:font-family="Arial" style:font-family-generic="swiss" style:font-pitch="variable" fo:font-size="100%"/>
      </text:list-level-style-bullet>
      <text:list-level-style-bullet text:level="7" text:bullet-char="•">
        <style:list-level-properties text:space-before="3in" text:min-label-width="0.1836in"/>
        <style:text-properties fo:font-family="Arial" style:font-family-generic="swiss" style:font-pitch="variable" fo:font-size="100%"/>
      </text:list-level-style-bullet>
      <text:list-level-style-bullet text:level="8" text:bullet-char="•">
        <style:list-level-properties text:space-before="3.5in" text:min-label-width="0.1836in"/>
        <style:text-properties fo:font-family="Arial" style:font-family-generic="swiss" style:font-pitch="variable" fo:font-size="100%"/>
      </text:list-level-style-bullet>
      <text:list-level-style-bullet text:level="9" text:bullet-char="•">
        <style:list-level-properties text:space-before="4in" text:min-label-width="0.1836in"/>
        <style:text-properties fo:font-family="Arial" style:font-family-generic="swiss" style:font-pitch="variable" fo:font-size="100%"/>
      </text:list-level-style-bullet>
    </text:list-style>
    <text:list-style style:name="a2679">
      <text:list-level-style-bullet text:level="1" text:bullet-char="•">
        <style:list-level-properties text:space-before="0in" text:min-label-width="0.1836in"/>
        <style:text-properties fo:font-family="Arial" style:font-family-generic="swiss" style:font-pitch="variable" fo:font-size="100%"/>
      </text:list-level-style-bullet>
      <text:list-level-style-bullet text:level="2" text:bullet-char="•">
        <style:list-level-properties text:space-before="0.5in" text:min-label-width="0.1836in"/>
        <style:text-properties fo:font-family="Arial" style:font-family-generic="swiss" style:font-pitch="variable" fo:font-size="100%"/>
      </text:list-level-style-bullet>
      <text:list-level-style-bullet text:level="3" text:bullet-char="•">
        <style:list-level-properties text:space-before="1in" text:min-label-width="0.1836in"/>
        <style:text-properties fo:font-family="Arial" style:font-family-generic="swiss" style:font-pitch="variable" fo:font-size="100%"/>
      </text:list-level-style-bullet>
      <text:list-level-style-bullet text:level="4" text:bullet-char="•">
        <style:list-level-properties text:space-before="1.5in" text:min-label-width="0.1836in"/>
        <style:text-properties fo:font-family="Arial" style:font-family-generic="swiss" style:font-pitch="variable" fo:font-size="100%"/>
      </text:list-level-style-bullet>
      <text:list-level-style-bullet text:level="5" text:bullet-char="•">
        <style:list-level-properties text:space-before="2in" text:min-label-width="0.1836in"/>
        <style:text-properties fo:font-family="Arial" style:font-family-generic="swiss" style:font-pitch="variable" fo:font-size="100%"/>
      </text:list-level-style-bullet>
      <text:list-level-style-bullet text:level="6" text:bullet-char="•">
        <style:list-level-properties text:space-before="2.5in" text:min-label-width="0.1836in"/>
        <style:text-properties fo:font-family="Arial" style:font-family-generic="swiss" style:font-pitch="variable" fo:font-size="100%"/>
      </text:list-level-style-bullet>
      <text:list-level-style-bullet text:level="7" text:bullet-char="•">
        <style:list-level-properties text:space-before="3in" text:min-label-width="0.1836in"/>
        <style:text-properties fo:font-family="Arial" style:font-family-generic="swiss" style:font-pitch="variable" fo:font-size="100%"/>
      </text:list-level-style-bullet>
      <text:list-level-style-bullet text:level="8" text:bullet-char="•">
        <style:list-level-properties text:space-before="3.5in" text:min-label-width="0.1836in"/>
        <style:text-properties fo:font-family="Arial" style:font-family-generic="swiss" style:font-pitch="variable" fo:font-size="100%"/>
      </text:list-level-style-bullet>
      <text:list-level-style-bullet text:level="9" text:bullet-char="•">
        <style:list-level-properties text:space-before="4in" text:min-label-width="0.1836in"/>
        <style:text-properties fo:font-family="Arial" style:font-family-generic="swiss" style:font-pitch="variable" fo:font-size="100%"/>
      </text:list-level-style-bullet>
    </text:list-style>
    <text:list-style style:name="a2534">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340">
      <text:list-level-style-bullet text:level="1" text:bullet-char="Ø">
        <style:list-level-properties text:space-before="0in" text:min-label-width="0.375in"/>
        <style:text-properties fo:color="#595959" fo:font-family="Wingdings" style:font-pitch="variable" fo:font-size="0.14583in"/>
      </text:list-level-style-bullet>
      <text:list-level-style-bullet text:level="2" text:bullet-char="Ø">
        <style:list-level-properties text:space-before="0.5in" text:min-label-width="0.375in"/>
        <style:text-properties fo:color="#595959" fo:font-family="Wingdings" style:font-pitch="variable" fo:font-size="0.14583in"/>
      </text:list-level-style-bullet>
      <text:list-level-style-bullet text:level="3" text:bullet-char="Ø">
        <style:list-level-properties text:space-before="1in" text:min-label-width="0.375in"/>
        <style:text-properties fo:color="#595959" fo:font-family="Wingdings" style:font-pitch="variable" fo:font-size="0.14583in"/>
      </text:list-level-style-bullet>
      <text:list-level-style-bullet text:level="4" text:bullet-char="Ø">
        <style:list-level-properties text:space-before="1.5in" text:min-label-width="0.375in"/>
        <style:text-properties fo:color="#595959" fo:font-family="Wingdings" style:font-pitch="variable" fo:font-size="0.14583in"/>
      </text:list-level-style-bullet>
      <text:list-level-style-bullet text:level="5" text:bullet-char="Ø">
        <style:list-level-properties text:space-before="2in" text:min-label-width="0.375in"/>
        <style:text-properties fo:color="#595959" fo:font-family="Wingdings" style:font-pitch="variable" fo:font-size="0.14583in"/>
      </text:list-level-style-bullet>
      <text:list-level-style-bullet text:level="6" text:bullet-char="Ø">
        <style:list-level-properties text:space-before="2.5in" text:min-label-width="0.375in"/>
        <style:text-properties fo:color="#595959" fo:font-family="Wingdings" style:font-pitch="variable" fo:font-size="0.14583in"/>
      </text:list-level-style-bullet>
      <text:list-level-style-bullet text:level="7" text:bullet-char="Ø">
        <style:list-level-properties text:space-before="3in" text:min-label-width="0.375in"/>
        <style:text-properties fo:color="#595959" fo:font-family="Wingdings" style:font-pitch="variable" fo:font-size="0.14583in"/>
      </text:list-level-style-bullet>
      <text:list-level-style-bullet text:level="8" text:bullet-char="Ø">
        <style:list-level-properties text:space-before="3.5in" text:min-label-width="0.375in"/>
        <style:text-properties fo:color="#595959" fo:font-family="Wingdings" style:font-pitch="variable" fo:font-size="0.14583in"/>
      </text:list-level-style-bullet>
      <text:list-level-style-bullet text:level="9" text:bullet-char="Ø">
        <style:list-level-properties text:space-before="4in" text:min-label-width="0.375in"/>
        <style:text-properties fo:color="#595959" fo:font-family="Wingdings" style:font-pitch="variable" fo:font-size="0.14583in"/>
      </text:list-level-style-bullet>
    </text:list-style>
    <text:list-style style:name="a2294">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537">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343">
      <text:list-level-style-bullet text:level="1" text:bullet-char="o">
        <style:list-level-properties text:space-before="0in" text:min-label-width="0.3125in"/>
        <style:text-properties fo:font-family="Courier New" style:font-family-generic="modern" style:font-pitch="fixed" fo:font-size="0.18056in"/>
      </text:list-level-style-bullet>
      <text:list-level-style-bullet text:level="2" text:bullet-char="o">
        <style:list-level-properties text:space-before="0.5in" text:min-label-width="0.3125in"/>
        <style:text-properties fo:font-family="Courier New" style:font-family-generic="modern" style:font-pitch="fixed" fo:font-size="0.18056in"/>
      </text:list-level-style-bullet>
      <text:list-level-style-bullet text:level="3" text:bullet-char="o">
        <style:list-level-properties text:space-before="1in" text:min-label-width="0.3125in"/>
        <style:text-properties fo:font-family="Courier New" style:font-family-generic="modern" style:font-pitch="fixed" fo:font-size="0.18056in"/>
      </text:list-level-style-bullet>
      <text:list-level-style-bullet text:level="4" text:bullet-char="o">
        <style:list-level-properties text:space-before="1.5in" text:min-label-width="0.3125in"/>
        <style:text-properties fo:font-family="Courier New" style:font-family-generic="modern" style:font-pitch="fixed" fo:font-size="0.18056in"/>
      </text:list-level-style-bullet>
      <text:list-level-style-bullet text:level="5" text:bullet-char="o">
        <style:list-level-properties text:space-before="2in" text:min-label-width="0.3125in"/>
        <style:text-properties fo:font-family="Courier New" style:font-family-generic="modern" style:font-pitch="fixed" fo:font-size="0.18056in"/>
      </text:list-level-style-bullet>
      <text:list-level-style-bullet text:level="6" text:bullet-char="o">
        <style:list-level-properties text:space-before="2.5in" text:min-label-width="0.3125in"/>
        <style:text-properties fo:font-family="Courier New" style:font-family-generic="modern" style:font-pitch="fixed" fo:font-size="0.18056in"/>
      </text:list-level-style-bullet>
      <text:list-level-style-bullet text:level="7" text:bullet-char="o">
        <style:list-level-properties text:space-before="3in" text:min-label-width="0.3125in"/>
        <style:text-properties fo:font-family="Courier New" style:font-family-generic="modern" style:font-pitch="fixed" fo:font-size="0.18056in"/>
      </text:list-level-style-bullet>
      <text:list-level-style-bullet text:level="8" text:bullet-char="o">
        <style:list-level-properties text:space-before="3.5in" text:min-label-width="0.3125in"/>
        <style:text-properties fo:font-family="Courier New" style:font-family-generic="modern" style:font-pitch="fixed" fo:font-size="0.18056in"/>
      </text:list-level-style-bullet>
      <text:list-level-style-bullet text:level="9" text:bullet-char="o">
        <style:list-level-properties text:space-before="4in" text:min-label-width="0.3125in"/>
        <style:text-properties fo:font-family="Courier New" style:font-family-generic="modern" style:font-pitch="fixed" fo:font-size="0.18056in"/>
      </text:list-level-style-bullet>
    </text:list-style>
    <text:list-style style:name="a215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346">
      <text:list-level-style-bullet text:level="1" text:bullet-char="o">
        <style:list-level-properties text:space-before="0in" text:min-label-width="0.3125in"/>
        <style:text-properties fo:font-family="Courier New" style:font-family-generic="modern" style:font-pitch="fixed" fo:font-size="0.18056in"/>
      </text:list-level-style-bullet>
      <text:list-level-style-bullet text:level="2" text:bullet-char="o">
        <style:list-level-properties text:space-before="0.5in" text:min-label-width="0.3125in"/>
        <style:text-properties fo:font-family="Courier New" style:font-family-generic="modern" style:font-pitch="fixed" fo:font-size="0.18056in"/>
      </text:list-level-style-bullet>
      <text:list-level-style-bullet text:level="3" text:bullet-char="o">
        <style:list-level-properties text:space-before="1in" text:min-label-width="0.3125in"/>
        <style:text-properties fo:font-family="Courier New" style:font-family-generic="modern" style:font-pitch="fixed" fo:font-size="0.18056in"/>
      </text:list-level-style-bullet>
      <text:list-level-style-bullet text:level="4" text:bullet-char="o">
        <style:list-level-properties text:space-before="1.5in" text:min-label-width="0.3125in"/>
        <style:text-properties fo:font-family="Courier New" style:font-family-generic="modern" style:font-pitch="fixed" fo:font-size="0.18056in"/>
      </text:list-level-style-bullet>
      <text:list-level-style-bullet text:level="5" text:bullet-char="o">
        <style:list-level-properties text:space-before="2in" text:min-label-width="0.3125in"/>
        <style:text-properties fo:font-family="Courier New" style:font-family-generic="modern" style:font-pitch="fixed" fo:font-size="0.18056in"/>
      </text:list-level-style-bullet>
      <text:list-level-style-bullet text:level="6" text:bullet-char="o">
        <style:list-level-properties text:space-before="2.5in" text:min-label-width="0.3125in"/>
        <style:text-properties fo:font-family="Courier New" style:font-family-generic="modern" style:font-pitch="fixed" fo:font-size="0.18056in"/>
      </text:list-level-style-bullet>
      <text:list-level-style-bullet text:level="7" text:bullet-char="o">
        <style:list-level-properties text:space-before="3in" text:min-label-width="0.3125in"/>
        <style:text-properties fo:font-family="Courier New" style:font-family-generic="modern" style:font-pitch="fixed" fo:font-size="0.18056in"/>
      </text:list-level-style-bullet>
      <text:list-level-style-bullet text:level="8" text:bullet-char="o">
        <style:list-level-properties text:space-before="3.5in" text:min-label-width="0.3125in"/>
        <style:text-properties fo:font-family="Courier New" style:font-family-generic="modern" style:font-pitch="fixed" fo:font-size="0.18056in"/>
      </text:list-level-style-bullet>
      <text:list-level-style-bullet text:level="9" text:bullet-char="o">
        <style:list-level-properties text:space-before="4in" text:min-label-width="0.3125in"/>
        <style:text-properties fo:font-family="Courier New" style:font-family-generic="modern" style:font-pitch="fixed" fo:font-size="0.18056in"/>
      </text:list-level-style-bullet>
    </text:list-style>
    <text:list-style style:name="a215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877"/>
    <text:list-style style:name="a1491">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732">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87497in" text:min-label-width="0.18749in"/>
        <style:text-properties fo:font-family="Arial" fo:font-size="100%"/>
      </text:list-level-style-bullet>
      <text:list-level-style-bullet text:level="4" text:bullet-char="•">
        <style:list-level-properties text:space-before="1.37497in" text:min-label-width="0.18749in"/>
        <style:text-properties fo:font-family="Arial" fo:font-size="100%"/>
      </text:list-level-style-bullet>
      <text:list-level-style-bullet text:level="5" text:bullet-char="•">
        <style:list-level-properties text:space-before="1.87497in" text:min-label-width="0.18749in"/>
        <style:text-properties fo:font-family="Arial" fo:font-size="100%"/>
      </text:list-level-style-bullet>
      <text:list-level-style-bullet text:level="6" text:bullet-char="•">
        <style:list-level-properties text:space-before="2.37497in" text:min-label-width="0.18749in"/>
        <style:text-properties fo:font-family="Arial" fo:font-size="100%"/>
      </text:list-level-style-bullet>
      <text:list-level-style-bullet text:level="7" text:bullet-char="•">
        <style:list-level-properties text:space-before="2.87497in" text:min-label-width="0.18749in"/>
        <style:text-properties fo:font-family="Arial" fo:font-size="100%"/>
      </text:list-level-style-bullet>
      <text:list-level-style-bullet text:level="8" text:bullet-char="•">
        <style:list-level-properties text:space-before="3.37497in" text:min-label-width="0.18749in"/>
        <style:text-properties fo:font-family="Arial" fo:font-size="100%"/>
      </text:list-level-style-bullet>
      <text:list-level-style-bullet text:level="9" text:bullet-char="•">
        <style:list-level-properties text:space-before="3.87497in" text:min-label-width="0.18749in"/>
        <style:text-properties fo:font-family="Arial" fo:font-size="100%"/>
      </text:list-level-style-bullet>
    </text:list-style>
    <text:list-style style:name="a2349">
      <text:list-level-style-bullet text:level="1" text:bullet-char="o">
        <style:list-level-properties text:space-before="0in" text:min-label-width="0.3125in"/>
        <style:text-properties fo:font-family="Courier New" style:font-family-generic="modern" style:font-pitch="fixed" fo:font-size="0.18056in"/>
      </text:list-level-style-bullet>
      <text:list-level-style-bullet text:level="2" text:bullet-char="o">
        <style:list-level-properties text:space-before="0.5in" text:min-label-width="0.3125in"/>
        <style:text-properties fo:font-family="Courier New" style:font-family-generic="modern" style:font-pitch="fixed" fo:font-size="0.18056in"/>
      </text:list-level-style-bullet>
      <text:list-level-style-bullet text:level="3" text:bullet-char="o">
        <style:list-level-properties text:space-before="1in" text:min-label-width="0.3125in"/>
        <style:text-properties fo:font-family="Courier New" style:font-family-generic="modern" style:font-pitch="fixed" fo:font-size="0.18056in"/>
      </text:list-level-style-bullet>
      <text:list-level-style-bullet text:level="4" text:bullet-char="o">
        <style:list-level-properties text:space-before="1.5in" text:min-label-width="0.3125in"/>
        <style:text-properties fo:font-family="Courier New" style:font-family-generic="modern" style:font-pitch="fixed" fo:font-size="0.18056in"/>
      </text:list-level-style-bullet>
      <text:list-level-style-bullet text:level="5" text:bullet-char="o">
        <style:list-level-properties text:space-before="2in" text:min-label-width="0.3125in"/>
        <style:text-properties fo:font-family="Courier New" style:font-family-generic="modern" style:font-pitch="fixed" fo:font-size="0.18056in"/>
      </text:list-level-style-bullet>
      <text:list-level-style-bullet text:level="6" text:bullet-char="o">
        <style:list-level-properties text:space-before="2.5in" text:min-label-width="0.3125in"/>
        <style:text-properties fo:font-family="Courier New" style:font-family-generic="modern" style:font-pitch="fixed" fo:font-size="0.18056in"/>
      </text:list-level-style-bullet>
      <text:list-level-style-bullet text:level="7" text:bullet-char="o">
        <style:list-level-properties text:space-before="3in" text:min-label-width="0.3125in"/>
        <style:text-properties fo:font-family="Courier New" style:font-family-generic="modern" style:font-pitch="fixed" fo:font-size="0.18056in"/>
      </text:list-level-style-bullet>
      <text:list-level-style-bullet text:level="8" text:bullet-char="o">
        <style:list-level-properties text:space-before="3.5in" text:min-label-width="0.3125in"/>
        <style:text-properties fo:font-family="Courier New" style:font-family-generic="modern" style:font-pitch="fixed" fo:font-size="0.18056in"/>
      </text:list-level-style-bullet>
      <text:list-level-style-bullet text:level="9" text:bullet-char="o">
        <style:list-level-properties text:space-before="4in" text:min-label-width="0.3125in"/>
        <style:text-properties fo:font-family="Courier New" style:font-family-generic="modern" style:font-pitch="fixed" fo:font-size="0.18056in"/>
      </text:list-level-style-bullet>
    </text:list-style>
    <text:list-style style:name="a215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86">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494">
      <text:list-level-style-bullet text:level="1" text:bullet-char="•">
        <style:list-level-properties text:space-before="0.01484in" text:min-label-width="0.18267in"/>
        <style:text-properties fo:font-family="Arial" style:font-family-generic="swiss" style:font-pitch="variable" fo:font-size="100%"/>
      </text:list-level-style-bullet>
      <text:list-level-style-bullet text:level="2" text:bullet-char="•">
        <style:list-level-properties text:space-before="0.51484in" text:min-label-width="0.18267in"/>
        <style:text-properties fo:font-family="Arial" style:font-family-generic="swiss" style:font-pitch="variable" fo:font-size="100%"/>
      </text:list-level-style-bullet>
      <text:list-level-style-bullet text:level="3" text:bullet-char="•">
        <style:list-level-properties text:space-before="1.01484in" text:min-label-width="0.18267in"/>
        <style:text-properties fo:font-family="Arial" style:font-family-generic="swiss" style:font-pitch="variable" fo:font-size="100%"/>
      </text:list-level-style-bullet>
      <text:list-level-style-bullet text:level="4" text:bullet-char="•">
        <style:list-level-properties text:space-before="1.51484in" text:min-label-width="0.18267in"/>
        <style:text-properties fo:font-family="Arial" style:font-family-generic="swiss" style:font-pitch="variable" fo:font-size="100%"/>
      </text:list-level-style-bullet>
      <text:list-level-style-bullet text:level="5" text:bullet-char="•">
        <style:list-level-properties text:space-before="2.01484in" text:min-label-width="0.18267in"/>
        <style:text-properties fo:font-family="Arial" style:font-family-generic="swiss" style:font-pitch="variable" fo:font-size="100%"/>
      </text:list-level-style-bullet>
      <text:list-level-style-bullet text:level="6" text:bullet-char="•">
        <style:list-level-properties text:space-before="2.51484in" text:min-label-width="0.18267in"/>
        <style:text-properties fo:font-family="Arial" style:font-family-generic="swiss" style:font-pitch="variable" fo:font-size="100%"/>
      </text:list-level-style-bullet>
      <text:list-level-style-bullet text:level="7" text:bullet-char="•">
        <style:list-level-properties text:space-before="3.01484in" text:min-label-width="0.18267in"/>
        <style:text-properties fo:font-family="Arial" style:font-family-generic="swiss" style:font-pitch="variable" fo:font-size="100%"/>
      </text:list-level-style-bullet>
      <text:list-level-style-bullet text:level="8" text:bullet-char="•">
        <style:list-level-properties text:space-before="3.51484in" text:min-label-width="0.18267in"/>
        <style:text-properties fo:font-family="Arial" style:font-family-generic="swiss" style:font-pitch="variable" fo:font-size="100%"/>
      </text:list-level-style-bullet>
      <text:list-level-style-bullet text:level="9" text:bullet-char="•">
        <style:list-level-properties text:space-before="4.01484in" text:min-label-width="0.18267in"/>
        <style:text-properties fo:font-family="Arial" style:font-family-generic="swiss" style:font-pitch="variable" fo:font-size="100%"/>
      </text:list-level-style-bullet>
    </text:list-style>
    <text:list-style style:name="a1735">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87497in" text:min-label-width="0.18749in"/>
        <style:text-properties fo:font-family="Arial" fo:font-size="100%"/>
      </text:list-level-style-bullet>
      <text:list-level-style-bullet text:level="4" text:bullet-char="•">
        <style:list-level-properties text:space-before="1.37497in" text:min-label-width="0.18749in"/>
        <style:text-properties fo:font-family="Arial" fo:font-size="100%"/>
      </text:list-level-style-bullet>
      <text:list-level-style-bullet text:level="5" text:bullet-char="•">
        <style:list-level-properties text:space-before="1.87497in" text:min-label-width="0.18749in"/>
        <style:text-properties fo:font-family="Arial" fo:font-size="100%"/>
      </text:list-level-style-bullet>
      <text:list-level-style-bullet text:level="6" text:bullet-char="•">
        <style:list-level-properties text:space-before="2.37497in" text:min-label-width="0.18749in"/>
        <style:text-properties fo:font-family="Arial" fo:font-size="100%"/>
      </text:list-level-style-bullet>
      <text:list-level-style-bullet text:level="7" text:bullet-char="•">
        <style:list-level-properties text:space-before="2.87497in" text:min-label-width="0.18749in"/>
        <style:text-properties fo:font-family="Arial" fo:font-size="100%"/>
      </text:list-level-style-bullet>
      <text:list-level-style-bullet text:level="8" text:bullet-char="•">
        <style:list-level-properties text:space-before="3.37497in" text:min-label-width="0.18749in"/>
        <style:text-properties fo:font-family="Arial" fo:font-size="100%"/>
      </text:list-level-style-bullet>
      <text:list-level-style-bullet text:level="9" text:bullet-char="•">
        <style:list-level-properties text:space-before="3.87497in" text:min-label-width="0.18749in"/>
        <style:text-properties fo:font-family="Arial" fo:font-size="100%"/>
      </text:list-level-style-bullet>
    </text:list-style>
    <text:list-style style:name="a1542">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1689">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497">
      <text:list-level-style-bullet text:level="1" text:bullet-char="•">
        <style:list-level-properties text:space-before="0.01484in" text:min-label-width="0.18267in"/>
        <style:text-properties fo:font-family="Arial" style:font-family-generic="swiss" style:font-pitch="variable" fo:font-size="100%"/>
      </text:list-level-style-bullet>
      <text:list-level-style-bullet text:level="2" text:bullet-char="•">
        <style:list-level-properties text:space-before="0.51484in" text:min-label-width="0.18267in"/>
        <style:text-properties fo:font-family="Arial" style:font-family-generic="swiss" style:font-pitch="variable" fo:font-size="100%"/>
      </text:list-level-style-bullet>
      <text:list-level-style-bullet text:level="3" text:bullet-char="•">
        <style:list-level-properties text:space-before="1.01484in" text:min-label-width="0.18267in"/>
        <style:text-properties fo:font-family="Arial" style:font-family-generic="swiss" style:font-pitch="variable" fo:font-size="100%"/>
      </text:list-level-style-bullet>
      <text:list-level-style-bullet text:level="4" text:bullet-char="•">
        <style:list-level-properties text:space-before="1.51484in" text:min-label-width="0.18267in"/>
        <style:text-properties fo:font-family="Arial" style:font-family-generic="swiss" style:font-pitch="variable" fo:font-size="100%"/>
      </text:list-level-style-bullet>
      <text:list-level-style-bullet text:level="5" text:bullet-char="•">
        <style:list-level-properties text:space-before="2.01484in" text:min-label-width="0.18267in"/>
        <style:text-properties fo:font-family="Arial" style:font-family-generic="swiss" style:font-pitch="variable" fo:font-size="100%"/>
      </text:list-level-style-bullet>
      <text:list-level-style-bullet text:level="6" text:bullet-char="•">
        <style:list-level-properties text:space-before="2.51484in" text:min-label-width="0.18267in"/>
        <style:text-properties fo:font-family="Arial" style:font-family-generic="swiss" style:font-pitch="variable" fo:font-size="100%"/>
      </text:list-level-style-bullet>
      <text:list-level-style-bullet text:level="7" text:bullet-char="•">
        <style:list-level-properties text:space-before="3.01484in" text:min-label-width="0.18267in"/>
        <style:text-properties fo:font-family="Arial" style:font-family-generic="swiss" style:font-pitch="variable" fo:font-size="100%"/>
      </text:list-level-style-bullet>
      <text:list-level-style-bullet text:level="8" text:bullet-char="•">
        <style:list-level-properties text:space-before="3.51484in" text:min-label-width="0.18267in"/>
        <style:text-properties fo:font-family="Arial" style:font-family-generic="swiss" style:font-pitch="variable" fo:font-size="100%"/>
      </text:list-level-style-bullet>
      <text:list-level-style-bullet text:level="9" text:bullet-char="•">
        <style:list-level-properties text:space-before="4.01484in" text:min-label-width="0.18267in"/>
        <style:text-properties fo:font-family="Arial" style:font-family-generic="swiss" style:font-pitch="variable" fo:font-size="100%"/>
      </text:list-level-style-bullet>
    </text:list-style>
    <text:list-style style:name="a1738">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87497in" text:min-label-width="0.18749in"/>
        <style:text-properties fo:font-family="Arial" fo:font-size="100%"/>
      </text:list-level-style-bullet>
      <text:list-level-style-bullet text:level="4" text:bullet-char="•">
        <style:list-level-properties text:space-before="1.37497in" text:min-label-width="0.18749in"/>
        <style:text-properties fo:font-family="Arial" fo:font-size="100%"/>
      </text:list-level-style-bullet>
      <text:list-level-style-bullet text:level="5" text:bullet-char="•">
        <style:list-level-properties text:space-before="1.87497in" text:min-label-width="0.18749in"/>
        <style:text-properties fo:font-family="Arial" fo:font-size="100%"/>
      </text:list-level-style-bullet>
      <text:list-level-style-bullet text:level="6" text:bullet-char="•">
        <style:list-level-properties text:space-before="2.37497in" text:min-label-width="0.18749in"/>
        <style:text-properties fo:font-family="Arial" fo:font-size="100%"/>
      </text:list-level-style-bullet>
      <text:list-level-style-bullet text:level="7" text:bullet-char="•">
        <style:list-level-properties text:space-before="2.87497in" text:min-label-width="0.18749in"/>
        <style:text-properties fo:font-family="Arial" fo:font-size="100%"/>
      </text:list-level-style-bullet>
      <text:list-level-style-bullet text:level="8" text:bullet-char="•">
        <style:list-level-properties text:space-before="3.37497in" text:min-label-width="0.18749in"/>
        <style:text-properties fo:font-family="Arial" fo:font-size="100%"/>
      </text:list-level-style-bullet>
      <text:list-level-style-bullet text:level="9" text:bullet-char="•">
        <style:list-level-properties text:space-before="3.87497in" text:min-label-width="0.18749in"/>
        <style:text-properties fo:font-family="Arial" fo:font-size="100%"/>
      </text:list-level-style-bullet>
    </text:list-style>
    <text:list-style style:name="a1350">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017">
      <text:list-level-style-bullet text:level="1" text:bullet-char="•">
        <style:list-level-properties text:space-before="0.00003in" text:min-label-width="0.18681in"/>
        <style:text-properties fo:font-family="Arial" fo:font-size="100%"/>
      </text:list-level-style-bullet>
      <text:list-level-style-bullet text:level="2" text:bullet-char="•">
        <style:list-level-properties text:space-before="0.375in" text:min-label-width="0.18681in"/>
        <style:text-properties fo:font-family="Arial" fo:font-size="100%"/>
      </text:list-level-style-bullet>
      <text:list-level-style-bullet text:level="3" text:bullet-char="•">
        <style:list-level-properties text:space-before="0.74997in" text:min-label-width="0.18681in"/>
        <style:text-properties fo:font-family="Arial" fo:font-size="100%"/>
      </text:list-level-style-bullet>
      <text:list-level-style-bullet text:level="4" text:bullet-char="•">
        <style:list-level-properties text:space-before="1.12494in" text:min-label-width="0.18681in"/>
        <style:text-properties fo:font-family="Arial" fo:font-size="100%"/>
      </text:list-level-style-bullet>
      <text:list-level-style-bullet text:level="5" text:bullet-char="•">
        <style:list-level-properties text:space-before="1.49991in" text:min-label-width="0.18681in"/>
        <style:text-properties fo:font-family="Arial" fo:font-size="100%"/>
      </text:list-level-style-bullet>
      <text:list-level-style-bullet text:level="6" text:bullet-char="•">
        <style:list-level-properties text:space-before="2.56254in" text:min-label-width="0.18681in"/>
        <style:text-properties fo:font-family="Arial" fo:font-size="100%"/>
      </text:list-level-style-bullet>
      <text:list-level-style-bullet text:level="7" text:bullet-char="•">
        <style:list-level-properties text:space-before="3.06254in" text:min-label-width="0.18681in"/>
        <style:text-properties fo:font-family="Arial" fo:font-size="100%"/>
      </text:list-level-style-bullet>
      <text:list-level-style-bullet text:level="8" text:bullet-char="•">
        <style:list-level-properties text:space-before="3.56254in" text:min-label-width="0.18681in"/>
        <style:text-properties fo:font-family="Arial" fo:font-size="100%"/>
      </text:list-level-style-bullet>
      <text:list-level-style-bullet text:level="9" text:bullet-char="•">
        <style:list-level-properties text:space-before="4.06254in" text:min-label-width="0.18681in"/>
        <style:text-properties fo:font-family="Arial" fo:font-size="100%"/>
      </text:list-level-style-bullet>
    </text:list-style>
    <text:list-style style:name="a28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682">
      <text:list-level-style-bullet text:level="1" text:bullet-char="•">
        <style:list-level-properties text:space-before="0in" text:min-label-width="0.1836in"/>
        <style:text-properties fo:font-family="Arial" style:font-family-generic="swiss" style:font-pitch="variable" fo:font-size="100%"/>
      </text:list-level-style-bullet>
      <text:list-level-style-bullet text:level="2" text:bullet-char="•">
        <style:list-level-properties text:space-before="0.5in" text:min-label-width="0.1836in"/>
        <style:text-properties fo:font-family="Arial" style:font-family-generic="swiss" style:font-pitch="variable" fo:font-size="100%"/>
      </text:list-level-style-bullet>
      <text:list-level-style-bullet text:level="3" text:bullet-char="•">
        <style:list-level-properties text:space-before="1in" text:min-label-width="0.1836in"/>
        <style:text-properties fo:font-family="Arial" style:font-family-generic="swiss" style:font-pitch="variable" fo:font-size="100%"/>
      </text:list-level-style-bullet>
      <text:list-level-style-bullet text:level="4" text:bullet-char="•">
        <style:list-level-properties text:space-before="1.5in" text:min-label-width="0.1836in"/>
        <style:text-properties fo:font-family="Arial" style:font-family-generic="swiss" style:font-pitch="variable" fo:font-size="100%"/>
      </text:list-level-style-bullet>
      <text:list-level-style-bullet text:level="5" text:bullet-char="•">
        <style:list-level-properties text:space-before="2in" text:min-label-width="0.1836in"/>
        <style:text-properties fo:font-family="Arial" style:font-family-generic="swiss" style:font-pitch="variable" fo:font-size="100%"/>
      </text:list-level-style-bullet>
      <text:list-level-style-bullet text:level="6" text:bullet-char="•">
        <style:list-level-properties text:space-before="2.5in" text:min-label-width="0.1836in"/>
        <style:text-properties fo:font-family="Arial" style:font-family-generic="swiss" style:font-pitch="variable" fo:font-size="100%"/>
      </text:list-level-style-bullet>
      <text:list-level-style-bullet text:level="7" text:bullet-char="•">
        <style:list-level-properties text:space-before="3in" text:min-label-width="0.1836in"/>
        <style:text-properties fo:font-family="Arial" style:font-family-generic="swiss" style:font-pitch="variable" fo:font-size="100%"/>
      </text:list-level-style-bullet>
      <text:list-level-style-bullet text:level="8" text:bullet-char="•">
        <style:list-level-properties text:space-before="3.5in" text:min-label-width="0.1836in"/>
        <style:text-properties fo:font-family="Arial" style:font-family-generic="swiss" style:font-pitch="variable" fo:font-size="100%"/>
      </text:list-level-style-bullet>
      <text:list-level-style-bullet text:level="9" text:bullet-char="•">
        <style:list-level-properties text:space-before="4in" text:min-label-width="0.1836in"/>
        <style:text-properties fo:font-family="Arial" style:font-family-generic="swiss" style:font-pitch="variable" fo:font-size="100%"/>
      </text:list-level-style-bullet>
    </text:list-style>
    <text:list-style style:name="a2737">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544">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1881"/>
    <text:list-style style:name="a2352">
      <text:list-level-style-bullet text:level="1" text:bullet-char="Ø">
        <style:list-level-properties text:space-before="0in" text:min-label-width="0.375in"/>
        <style:text-properties fo:color="#595959" fo:font-family="Wingdings" style:font-pitch="variable" fo:font-size="0.14583in"/>
      </text:list-level-style-bullet>
      <text:list-level-style-bullet text:level="2" text:bullet-char="Ø">
        <style:list-level-properties text:space-before="0.5in" text:min-label-width="0.375in"/>
        <style:text-properties fo:color="#595959" fo:font-family="Wingdings" style:font-pitch="variable" fo:font-size="0.14583in"/>
      </text:list-level-style-bullet>
      <text:list-level-style-bullet text:level="3" text:bullet-char="Ø">
        <style:list-level-properties text:space-before="1in" text:min-label-width="0.375in"/>
        <style:text-properties fo:color="#595959" fo:font-family="Wingdings" style:font-pitch="variable" fo:font-size="0.14583in"/>
      </text:list-level-style-bullet>
      <text:list-level-style-bullet text:level="4" text:bullet-char="Ø">
        <style:list-level-properties text:space-before="1.5in" text:min-label-width="0.375in"/>
        <style:text-properties fo:color="#595959" fo:font-family="Wingdings" style:font-pitch="variable" fo:font-size="0.14583in"/>
      </text:list-level-style-bullet>
      <text:list-level-style-bullet text:level="5" text:bullet-char="Ø">
        <style:list-level-properties text:space-before="2in" text:min-label-width="0.375in"/>
        <style:text-properties fo:color="#595959" fo:font-family="Wingdings" style:font-pitch="variable" fo:font-size="0.14583in"/>
      </text:list-level-style-bullet>
      <text:list-level-style-bullet text:level="6" text:bullet-char="Ø">
        <style:list-level-properties text:space-before="2.5in" text:min-label-width="0.375in"/>
        <style:text-properties fo:color="#595959" fo:font-family="Wingdings" style:font-pitch="variable" fo:font-size="0.14583in"/>
      </text:list-level-style-bullet>
      <text:list-level-style-bullet text:level="7" text:bullet-char="Ø">
        <style:list-level-properties text:space-before="3in" text:min-label-width="0.375in"/>
        <style:text-properties fo:color="#595959" fo:font-family="Wingdings" style:font-pitch="variable" fo:font-size="0.14583in"/>
      </text:list-level-style-bullet>
      <text:list-level-style-bullet text:level="8" text:bullet-char="Ø">
        <style:list-level-properties text:space-before="3.5in" text:min-label-width="0.375in"/>
        <style:text-properties fo:color="#595959" fo:font-family="Wingdings" style:font-pitch="variable" fo:font-size="0.14583in"/>
      </text:list-level-style-bullet>
      <text:list-level-style-bullet text:level="9" text:bullet-char="Ø">
        <style:list-level-properties text:space-before="4in" text:min-label-width="0.375in"/>
        <style:text-properties fo:color="#595959" fo:font-family="Wingdings" style:font-pitch="variable" fo:font-size="0.14583in"/>
      </text:list-level-style-bullet>
    </text:list-style>
    <text:list-style style:name="a2547">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355">
      <text:list-level-style-bullet text:level="1" text:bullet-char="o">
        <style:list-level-properties text:space-before="0in" text:min-label-width="0.3125in"/>
        <style:text-properties fo:font-family="Courier New" style:font-family-generic="modern" style:font-pitch="fixed" fo:font-size="0.18056in"/>
      </text:list-level-style-bullet>
      <text:list-level-style-bullet text:level="2" text:bullet-char="o">
        <style:list-level-properties text:space-before="0.5in" text:min-label-width="0.3125in"/>
        <style:text-properties fo:font-family="Courier New" style:font-family-generic="modern" style:font-pitch="fixed" fo:font-size="0.18056in"/>
      </text:list-level-style-bullet>
      <text:list-level-style-bullet text:level="3" text:bullet-char="o">
        <style:list-level-properties text:space-before="1in" text:min-label-width="0.3125in"/>
        <style:text-properties fo:font-family="Courier New" style:font-family-generic="modern" style:font-pitch="fixed" fo:font-size="0.18056in"/>
      </text:list-level-style-bullet>
      <text:list-level-style-bullet text:level="4" text:bullet-char="o">
        <style:list-level-properties text:space-before="1.5in" text:min-label-width="0.3125in"/>
        <style:text-properties fo:font-family="Courier New" style:font-family-generic="modern" style:font-pitch="fixed" fo:font-size="0.18056in"/>
      </text:list-level-style-bullet>
      <text:list-level-style-bullet text:level="5" text:bullet-char="o">
        <style:list-level-properties text:space-before="2in" text:min-label-width="0.3125in"/>
        <style:text-properties fo:font-family="Courier New" style:font-family-generic="modern" style:font-pitch="fixed" fo:font-size="0.18056in"/>
      </text:list-level-style-bullet>
      <text:list-level-style-bullet text:level="6" text:bullet-char="o">
        <style:list-level-properties text:space-before="2.5in" text:min-label-width="0.3125in"/>
        <style:text-properties fo:font-family="Courier New" style:font-family-generic="modern" style:font-pitch="fixed" fo:font-size="0.18056in"/>
      </text:list-level-style-bullet>
      <text:list-level-style-bullet text:level="7" text:bullet-char="o">
        <style:list-level-properties text:space-before="3in" text:min-label-width="0.3125in"/>
        <style:text-properties fo:font-family="Courier New" style:font-family-generic="modern" style:font-pitch="fixed" fo:font-size="0.18056in"/>
      </text:list-level-style-bullet>
      <text:list-level-style-bullet text:level="8" text:bullet-char="o">
        <style:list-level-properties text:space-before="3.5in" text:min-label-width="0.3125in"/>
        <style:text-properties fo:font-family="Courier New" style:font-family-generic="modern" style:font-pitch="fixed" fo:font-size="0.18056in"/>
      </text:list-level-style-bullet>
      <text:list-level-style-bullet text:level="9" text:bullet-char="o">
        <style:list-level-properties text:space-before="4in" text:min-label-width="0.3125in"/>
        <style:text-properties fo:font-family="Courier New" style:font-family-generic="modern" style:font-pitch="fixed" fo:font-size="0.18056in"/>
      </text:list-level-style-bullet>
    </text:list-style>
    <text:list-style style:name="a1692">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741">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87497in" text:min-label-width="0.18749in"/>
        <style:text-properties fo:font-family="Arial" fo:font-size="100%"/>
      </text:list-level-style-bullet>
      <text:list-level-style-bullet text:level="4" text:bullet-char="•">
        <style:list-level-properties text:space-before="1.37497in" text:min-label-width="0.18749in"/>
        <style:text-properties fo:font-family="Arial" fo:font-size="100%"/>
      </text:list-level-style-bullet>
      <text:list-level-style-bullet text:level="5" text:bullet-char="•">
        <style:list-level-properties text:space-before="1.87497in" text:min-label-width="0.18749in"/>
        <style:text-properties fo:font-family="Arial" fo:font-size="100%"/>
      </text:list-level-style-bullet>
      <text:list-level-style-bullet text:level="6" text:bullet-char="•">
        <style:list-level-properties text:space-before="2.37497in" text:min-label-width="0.18749in"/>
        <style:text-properties fo:font-family="Arial" fo:font-size="100%"/>
      </text:list-level-style-bullet>
      <text:list-level-style-bullet text:level="7" text:bullet-char="•">
        <style:list-level-properties text:space-before="2.87497in" text:min-label-width="0.18749in"/>
        <style:text-properties fo:font-family="Arial" fo:font-size="100%"/>
      </text:list-level-style-bullet>
      <text:list-level-style-bullet text:level="8" text:bullet-char="•">
        <style:list-level-properties text:space-before="3.37497in" text:min-label-width="0.18749in"/>
        <style:text-properties fo:font-family="Arial" fo:font-size="100%"/>
      </text:list-level-style-bullet>
      <text:list-level-style-bullet text:level="9" text:bullet-char="•">
        <style:list-level-properties text:space-before="3.87497in" text:min-label-width="0.18749in"/>
        <style:text-properties fo:font-family="Arial" fo:font-size="100%"/>
      </text:list-level-style-bullet>
    </text:list-style>
    <text:list-style style:name="a2358">
      <text:list-level-style-bullet text:level="1" text:bullet-char="o">
        <style:list-level-properties text:space-before="0in" text:min-label-width="0.3125in"/>
        <style:text-properties fo:font-family="Courier New" style:font-family-generic="modern" style:font-pitch="fixed" fo:font-size="0.18056in"/>
      </text:list-level-style-bullet>
      <text:list-level-style-bullet text:level="2" text:bullet-char="o">
        <style:list-level-properties text:space-before="0.5in" text:min-label-width="0.3125in"/>
        <style:text-properties fo:font-family="Courier New" style:font-family-generic="modern" style:font-pitch="fixed" fo:font-size="0.18056in"/>
      </text:list-level-style-bullet>
      <text:list-level-style-bullet text:level="3" text:bullet-char="o">
        <style:list-level-properties text:space-before="1in" text:min-label-width="0.3125in"/>
        <style:text-properties fo:font-family="Courier New" style:font-family-generic="modern" style:font-pitch="fixed" fo:font-size="0.18056in"/>
      </text:list-level-style-bullet>
      <text:list-level-style-bullet text:level="4" text:bullet-char="o">
        <style:list-level-properties text:space-before="1.5in" text:min-label-width="0.3125in"/>
        <style:text-properties fo:font-family="Courier New" style:font-family-generic="modern" style:font-pitch="fixed" fo:font-size="0.18056in"/>
      </text:list-level-style-bullet>
      <text:list-level-style-bullet text:level="5" text:bullet-char="o">
        <style:list-level-properties text:space-before="2in" text:min-label-width="0.3125in"/>
        <style:text-properties fo:font-family="Courier New" style:font-family-generic="modern" style:font-pitch="fixed" fo:font-size="0.18056in"/>
      </text:list-level-style-bullet>
      <text:list-level-style-bullet text:level="6" text:bullet-char="o">
        <style:list-level-properties text:space-before="2.5in" text:min-label-width="0.3125in"/>
        <style:text-properties fo:font-family="Courier New" style:font-family-generic="modern" style:font-pitch="fixed" fo:font-size="0.18056in"/>
      </text:list-level-style-bullet>
      <text:list-level-style-bullet text:level="7" text:bullet-char="o">
        <style:list-level-properties text:space-before="3in" text:min-label-width="0.3125in"/>
        <style:text-properties fo:font-family="Courier New" style:font-family-generic="modern" style:font-pitch="fixed" fo:font-size="0.18056in"/>
      </text:list-level-style-bullet>
      <text:list-level-style-bullet text:level="8" text:bullet-char="o">
        <style:list-level-properties text:space-before="3.5in" text:min-label-width="0.3125in"/>
        <style:text-properties fo:font-family="Courier New" style:font-family-generic="modern" style:font-pitch="fixed" fo:font-size="0.18056in"/>
      </text:list-level-style-bullet>
      <text:list-level-style-bullet text:level="9" text:bullet-char="o">
        <style:list-level-properties text:space-before="4in" text:min-label-width="0.3125in"/>
        <style:text-properties fo:font-family="Courier New" style:font-family-generic="modern" style:font-pitch="fixed" fo:font-size="0.18056in"/>
      </text:list-level-style-bullet>
    </text:list-style>
    <text:list-style style:name="a1935"/>
    <text:list-style style:name="a2212">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744">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87497in"/>
      </text:list-level-style-number>
      <text:list-level-style-number text:level="4" style:num-format="" style:num-list-format-name="">
        <style:list-level-properties text:space-before="1.37497in"/>
      </text:list-level-style-number>
      <text:list-level-style-number text:level="5" style:num-format="" style:num-list-format-name="">
        <style:list-level-properties text:space-before="1.87497in"/>
      </text:list-level-style-number>
      <text:list-level-style-number text:level="6" style:num-format="" style:num-list-format-name="">
        <style:list-level-properties text:space-before="2.37497in"/>
      </text:list-level-style-number>
      <text:list-level-style-number text:level="7" style:num-format="" style:num-list-format-name="">
        <style:list-level-properties text:space-before="2.87497in"/>
      </text:list-level-style-number>
      <text:list-level-style-number text:level="8" style:num-format="" style:num-list-format-name="">
        <style:list-level-properties text:space-before="3.37497in"/>
      </text:list-level-style-number>
      <text:list-level-style-number text:level="9" style:num-format="" style:num-list-format-name="">
        <style:list-level-properties text:space-before="3.87497in"/>
      </text:list-level-style-number>
    </text:list-style>
    <text:list-style style:name="a2020">
      <text:list-level-style-bullet text:level="1" text:bullet-char="•">
        <style:list-level-properties text:space-before="0.00003in" text:min-label-width="0.18681in"/>
        <style:text-properties fo:font-family="Arial" fo:font-size="100%"/>
      </text:list-level-style-bullet>
      <text:list-level-style-bullet text:level="2" text:bullet-char="•">
        <style:list-level-properties text:space-before="0.375in" text:min-label-width="0.18681in"/>
        <style:text-properties fo:font-family="Arial" fo:font-size="100%"/>
      </text:list-level-style-bullet>
      <text:list-level-style-bullet text:level="3" text:bullet-char="•">
        <style:list-level-properties text:space-before="0.74997in" text:min-label-width="0.18681in"/>
        <style:text-properties fo:font-family="Arial" fo:font-size="100%"/>
      </text:list-level-style-bullet>
      <text:list-level-style-bullet text:level="4" text:bullet-char="•">
        <style:list-level-properties text:space-before="1.12494in" text:min-label-width="0.18681in"/>
        <style:text-properties fo:font-family="Arial" fo:font-size="100%"/>
      </text:list-level-style-bullet>
      <text:list-level-style-bullet text:level="5" text:bullet-char="•">
        <style:list-level-properties text:space-before="1.49991in" text:min-label-width="0.18681in"/>
        <style:text-properties fo:font-family="Arial" fo:font-size="100%"/>
      </text:list-level-style-bullet>
      <text:list-level-style-bullet text:level="6" text:bullet-char="•">
        <style:list-level-properties text:space-before="2.56254in" text:min-label-width="0.18681in"/>
        <style:text-properties fo:font-family="Arial" fo:font-size="100%"/>
      </text:list-level-style-bullet>
      <text:list-level-style-bullet text:level="7" text:bullet-char="•">
        <style:list-level-properties text:space-before="3.06254in" text:min-label-width="0.18681in"/>
        <style:text-properties fo:font-family="Arial" fo:font-size="100%"/>
      </text:list-level-style-bullet>
      <text:list-level-style-bullet text:level="8" text:bullet-char="•">
        <style:list-level-properties text:space-before="3.56254in" text:min-label-width="0.18681in"/>
        <style:text-properties fo:font-family="Arial" fo:font-size="100%"/>
      </text:list-level-style-bullet>
      <text:list-level-style-bullet text:level="9" text:bullet-char="•">
        <style:list-level-properties text:space-before="4.06254in" text:min-label-width="0.18681in"/>
        <style:text-properties fo:font-family="Arial" fo:font-size="100%"/>
      </text:list-level-style-bullet>
    </text:list-style>
    <text:list-style style:name="a2167">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939"/>
    <text:list-style style:name="a2216">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747">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87497in"/>
      </text:list-level-style-number>
      <text:list-level-style-number text:level="4" style:num-format="" style:num-list-format-name="">
        <style:list-level-properties text:space-before="1.37497in"/>
      </text:list-level-style-number>
      <text:list-level-style-number text:level="5" style:num-format="" style:num-list-format-name="">
        <style:list-level-properties text:space-before="1.87497in"/>
      </text:list-level-style-number>
      <text:list-level-style-number text:level="6" style:num-format="" style:num-list-format-name="">
        <style:list-level-properties text:space-before="2.37497in"/>
      </text:list-level-style-number>
      <text:list-level-style-number text:level="7" style:num-format="" style:num-list-format-name="">
        <style:list-level-properties text:space-before="2.87497in"/>
      </text:list-level-style-number>
      <text:list-level-style-number text:level="8" style:num-format="" style:num-list-format-name="">
        <style:list-level-properties text:space-before="3.37497in"/>
      </text:list-level-style-number>
      <text:list-level-style-number text:level="9" style:num-format="" style:num-list-format-name="">
        <style:list-level-properties text:space-before="3.87497in"/>
      </text:list-level-style-number>
    </text:list-style>
    <text:list-style style:name="a2023">
      <text:list-level-style-bullet text:level="1" text:bullet-char="•">
        <style:list-level-properties text:space-before="0.00003in" text:min-label-width="0.18681in"/>
        <style:text-properties fo:font-family="Arial" fo:font-size="100%"/>
      </text:list-level-style-bullet>
      <text:list-level-style-bullet text:level="2" text:bullet-char="•">
        <style:list-level-properties text:space-before="0.375in" text:min-label-width="0.18681in"/>
        <style:text-properties fo:font-family="Arial" fo:font-size="100%"/>
      </text:list-level-style-bullet>
      <text:list-level-style-bullet text:level="3" text:bullet-char="•">
        <style:list-level-properties text:space-before="0.74997in" text:min-label-width="0.18681in"/>
        <style:text-properties fo:font-family="Arial" fo:font-size="100%"/>
      </text:list-level-style-bullet>
      <text:list-level-style-bullet text:level="4" text:bullet-char="•">
        <style:list-level-properties text:space-before="1.12494in" text:min-label-width="0.18681in"/>
        <style:text-properties fo:font-family="Arial" fo:font-size="100%"/>
      </text:list-level-style-bullet>
      <text:list-level-style-bullet text:level="5" text:bullet-char="•">
        <style:list-level-properties text:space-before="1.49991in" text:min-label-width="0.18681in"/>
        <style:text-properties fo:font-family="Arial" fo:font-size="100%"/>
      </text:list-level-style-bullet>
      <text:list-level-style-bullet text:level="6" text:bullet-char="•">
        <style:list-level-properties text:space-before="2.56254in" text:min-label-width="0.18681in"/>
        <style:text-properties fo:font-family="Arial" fo:font-size="100%"/>
      </text:list-level-style-bullet>
      <text:list-level-style-bullet text:level="7" text:bullet-char="•">
        <style:list-level-properties text:space-before="3.06254in" text:min-label-width="0.18681in"/>
        <style:text-properties fo:font-family="Arial" fo:font-size="100%"/>
      </text:list-level-style-bullet>
      <text:list-level-style-bullet text:level="8" text:bullet-char="•">
        <style:list-level-properties text:space-before="3.56254in" text:min-label-width="0.18681in"/>
        <style:text-properties fo:font-family="Arial" fo:font-size="100%"/>
      </text:list-level-style-bullet>
      <text:list-level-style-bullet text:level="9" text:bullet-char="•">
        <style:list-level-properties text:space-before="4.06254in" text:min-label-width="0.18681in"/>
        <style:text-properties fo:font-family="Arial" fo:font-size="100%"/>
      </text:list-level-style-bullet>
    </text:list-style>
    <text:list-style style:name="a1554">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602">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026">
      <text:list-level-style-bullet text:level="1" text:bullet-char="•">
        <style:list-level-properties text:space-before="0in" text:min-label-width="0.18681in"/>
        <style:text-properties fo:font-family="Arial" fo:font-size="100%"/>
      </text:list-level-style-bullet>
      <text:list-level-style-bullet text:level="2" text:bullet-char="•">
        <style:list-level-properties text:space-before="0.37497in" text:min-label-width="0.18681in"/>
        <style:text-properties fo:font-family="Arial" fo:font-size="100%"/>
      </text:list-level-style-bullet>
      <text:list-level-style-bullet text:level="3" text:bullet-char="•">
        <style:list-level-properties text:space-before="0.74994in" text:min-label-width="0.18681in"/>
        <style:text-properties fo:font-family="Arial" fo:font-size="100%"/>
      </text:list-level-style-bullet>
      <text:list-level-style-bullet text:level="4" text:bullet-char="•">
        <style:list-level-properties text:space-before="1.12491in" text:min-label-width="0.18681in"/>
        <style:text-properties fo:font-family="Arial" fo:font-size="100%"/>
      </text:list-level-style-bullet>
      <text:list-level-style-bullet text:level="5" text:bullet-char="•">
        <style:list-level-properties text:space-before="1.49988in" text:min-label-width="0.18681in"/>
        <style:text-properties fo:font-family="Arial" fo:font-size="100%"/>
      </text:list-level-style-bullet>
      <text:list-level-style-bullet text:level="6" text:bullet-char="•">
        <style:list-level-properties text:space-before="2.56251in" text:min-label-width="0.18681in"/>
        <style:text-properties fo:font-family="Arial" fo:font-size="100%"/>
      </text:list-level-style-bullet>
      <text:list-level-style-bullet text:level="7" text:bullet-char="•">
        <style:list-level-properties text:space-before="3.06251in" text:min-label-width="0.18681in"/>
        <style:text-properties fo:font-family="Arial" fo:font-size="100%"/>
      </text:list-level-style-bullet>
      <text:list-level-style-bullet text:level="8" text:bullet-char="•">
        <style:list-level-properties text:space-before="3.56251in" text:min-label-width="0.18681in"/>
        <style:text-properties fo:font-family="Arial" fo:font-size="100%"/>
      </text:list-level-style-bullet>
      <text:list-level-style-bullet text:level="9" text:bullet-char="•">
        <style:list-level-properties text:space-before="4.06251in" text:min-label-width="0.18681in"/>
        <style:text-properties fo:font-family="Arial" fo:font-size="100%"/>
      </text:list-level-style-bullet>
    </text:list-style>
    <text:list-style style:name="a1362">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557">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605">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365">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1608">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691">
      <text:list-level-style-bullet text:level="1" text:bullet-char="•">
        <style:list-level-properties text:space-before="0in" text:min-label-width="0.30443in"/>
        <style:text-properties fo:font-family="Arial" style:font-family-generic="swiss" style:font-pitch="variable" fo:font-size="100%"/>
      </text:list-level-style-bullet>
      <text:list-level-style-bullet text:level="2" text:bullet-char="•">
        <style:list-level-properties text:space-before="0.5in" text:min-label-width="0.30443in"/>
        <style:text-properties fo:font-family="Arial" style:font-family-generic="swiss" style:font-pitch="variable" fo:font-size="100%"/>
      </text:list-level-style-bullet>
      <text:list-level-style-bullet text:level="3" text:bullet-char="•">
        <style:list-level-properties text:space-before="1in" text:min-label-width="0.30443in"/>
        <style:text-properties fo:font-family="Arial" style:font-family-generic="swiss" style:font-pitch="variable" fo:font-size="100%"/>
      </text:list-level-style-bullet>
      <text:list-level-style-bullet text:level="4" text:bullet-char="•">
        <style:list-level-properties text:space-before="1.5in" text:min-label-width="0.30443in"/>
        <style:text-properties fo:font-family="Arial" style:font-family-generic="swiss" style:font-pitch="variable" fo:font-size="100%"/>
      </text:list-level-style-bullet>
      <text:list-level-style-bullet text:level="5" text:bullet-char="•">
        <style:list-level-properties text:space-before="2in" text:min-label-width="0.30443in"/>
        <style:text-properties fo:font-family="Arial" style:font-family-generic="swiss" style:font-pitch="variable" fo:font-size="100%"/>
      </text:list-level-style-bullet>
      <text:list-level-style-bullet text:level="6" text:bullet-char="•">
        <style:list-level-properties text:space-before="2.5in" text:min-label-width="0.30443in"/>
        <style:text-properties fo:font-family="Arial" style:font-family-generic="swiss" style:font-pitch="variable" fo:font-size="100%"/>
      </text:list-level-style-bullet>
      <text:list-level-style-bullet text:level="7" text:bullet-char="•">
        <style:list-level-properties text:space-before="3in" text:min-label-width="0.30443in"/>
        <style:text-properties fo:font-family="Arial" style:font-family-generic="swiss" style:font-pitch="variable" fo:font-size="100%"/>
      </text:list-level-style-bullet>
      <text:list-level-style-bullet text:level="8" text:bullet-char="•">
        <style:list-level-properties text:space-before="3.5in" text:min-label-width="0.30443in"/>
        <style:text-properties fo:font-family="Arial" style:font-family-generic="swiss" style:font-pitch="variable" fo:font-size="100%"/>
      </text:list-level-style-bullet>
      <text:list-level-style-bullet text:level="9" text:bullet-char="•">
        <style:list-level-properties text:space-before="4in" text:min-label-width="0.30443in"/>
        <style:text-properties fo:font-family="Arial" style:font-family-generic="swiss" style:font-pitch="variable" fo:font-size="100%"/>
      </text:list-level-style-bullet>
    </text:list-style>
    <text:list-style style:name="a1368">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8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694">
      <text:list-level-style-bullet text:level="1" text:bullet-char="•">
        <style:list-level-properties text:space-before="0in" text:min-label-width="0.30443in"/>
        <style:text-properties fo:font-family="Arial" style:font-family-generic="swiss" style:font-pitch="variable" fo:font-size="100%"/>
      </text:list-level-style-bullet>
      <text:list-level-style-bullet text:level="2" text:bullet-char="•">
        <style:list-level-properties text:space-before="0.5in" text:min-label-width="0.30443in"/>
        <style:text-properties fo:font-family="Arial" style:font-family-generic="swiss" style:font-pitch="variable" fo:font-size="100%"/>
      </text:list-level-style-bullet>
      <text:list-level-style-bullet text:level="3" text:bullet-char="•">
        <style:list-level-properties text:space-before="1in" text:min-label-width="0.30443in"/>
        <style:text-properties fo:font-family="Arial" style:font-family-generic="swiss" style:font-pitch="variable" fo:font-size="100%"/>
      </text:list-level-style-bullet>
      <text:list-level-style-bullet text:level="4" text:bullet-char="•">
        <style:list-level-properties text:space-before="1.5in" text:min-label-width="0.30443in"/>
        <style:text-properties fo:font-family="Arial" style:font-family-generic="swiss" style:font-pitch="variable" fo:font-size="100%"/>
      </text:list-level-style-bullet>
      <text:list-level-style-bullet text:level="5" text:bullet-char="•">
        <style:list-level-properties text:space-before="2in" text:min-label-width="0.30443in"/>
        <style:text-properties fo:font-family="Arial" style:font-family-generic="swiss" style:font-pitch="variable" fo:font-size="100%"/>
      </text:list-level-style-bullet>
      <text:list-level-style-bullet text:level="6" text:bullet-char="•">
        <style:list-level-properties text:space-before="2.5in" text:min-label-width="0.30443in"/>
        <style:text-properties fo:font-family="Arial" style:font-family-generic="swiss" style:font-pitch="variable" fo:font-size="100%"/>
      </text:list-level-style-bullet>
      <text:list-level-style-bullet text:level="7" text:bullet-char="•">
        <style:list-level-properties text:space-before="3in" text:min-label-width="0.30443in"/>
        <style:text-properties fo:font-family="Arial" style:font-family-generic="swiss" style:font-pitch="variable" fo:font-size="100%"/>
      </text:list-level-style-bullet>
      <text:list-level-style-bullet text:level="8" text:bullet-char="•">
        <style:list-level-properties text:space-before="3.5in" text:min-label-width="0.30443in"/>
        <style:text-properties fo:font-family="Arial" style:font-family-generic="swiss" style:font-pitch="variable" fo:font-size="100%"/>
      </text:list-level-style-bullet>
      <text:list-level-style-bullet text:level="9" text:bullet-char="•">
        <style:list-level-properties text:space-before="4in" text:min-label-width="0.30443in"/>
        <style:text-properties fo:font-family="Arial" style:font-family-generic="swiss" style:font-pitch="variable" fo:font-size="100%"/>
      </text:list-level-style-bullet>
    </text:list-style>
    <text:list-style style:name="a2742">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553">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1891"/>
    <text:list-style style:name="a2361">
      <text:list-level-style-bullet text:level="1" text:bullet-char="Ø">
        <style:list-level-properties text:space-before="0in" text:min-label-width="0.375in"/>
        <style:text-properties fo:color="#595959" fo:font-family="Wingdings" style:font-pitch="variable" fo:font-size="0.14583in"/>
      </text:list-level-style-bullet>
      <text:list-level-style-bullet text:level="2" text:bullet-char="Ø">
        <style:list-level-properties text:space-before="0.5in" text:min-label-width="0.375in"/>
        <style:text-properties fo:color="#595959" fo:font-family="Wingdings" style:font-pitch="variable" fo:font-size="0.14583in"/>
      </text:list-level-style-bullet>
      <text:list-level-style-bullet text:level="3" text:bullet-char="Ø">
        <style:list-level-properties text:space-before="1in" text:min-label-width="0.375in"/>
        <style:text-properties fo:color="#595959" fo:font-family="Wingdings" style:font-pitch="variable" fo:font-size="0.14583in"/>
      </text:list-level-style-bullet>
      <text:list-level-style-bullet text:level="4" text:bullet-char="Ø">
        <style:list-level-properties text:space-before="1.5in" text:min-label-width="0.375in"/>
        <style:text-properties fo:color="#595959" fo:font-family="Wingdings" style:font-pitch="variable" fo:font-size="0.14583in"/>
      </text:list-level-style-bullet>
      <text:list-level-style-bullet text:level="5" text:bullet-char="Ø">
        <style:list-level-properties text:space-before="2in" text:min-label-width="0.375in"/>
        <style:text-properties fo:color="#595959" fo:font-family="Wingdings" style:font-pitch="variable" fo:font-size="0.14583in"/>
      </text:list-level-style-bullet>
      <text:list-level-style-bullet text:level="6" text:bullet-char="Ø">
        <style:list-level-properties text:space-before="2.5in" text:min-label-width="0.375in"/>
        <style:text-properties fo:color="#595959" fo:font-family="Wingdings" style:font-pitch="variable" fo:font-size="0.14583in"/>
      </text:list-level-style-bullet>
      <text:list-level-style-bullet text:level="7" text:bullet-char="Ø">
        <style:list-level-properties text:space-before="3in" text:min-label-width="0.375in"/>
        <style:text-properties fo:color="#595959" fo:font-family="Wingdings" style:font-pitch="variable" fo:font-size="0.14583in"/>
      </text:list-level-style-bullet>
      <text:list-level-style-bullet text:level="8" text:bullet-char="Ø">
        <style:list-level-properties text:space-before="3.5in" text:min-label-width="0.375in"/>
        <style:text-properties fo:color="#595959" fo:font-family="Wingdings" style:font-pitch="variable" fo:font-size="0.14583in"/>
      </text:list-level-style-bullet>
      <text:list-level-style-bullet text:level="9" text:bullet-char="Ø">
        <style:list-level-properties text:space-before="4in" text:min-label-width="0.375in"/>
        <style:text-properties fo:color="#595959" fo:font-family="Wingdings" style:font-pitch="variable" fo:font-size="0.14583in"/>
      </text:list-level-style-bullet>
    </text:list-style>
    <text:list-style style:name="a2556">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170">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364">
      <text:list-level-style-bullet text:level="1" text:bullet-char="Ø">
        <style:list-level-properties text:space-before="0in" text:min-label-width="0.375in"/>
        <style:text-properties fo:color="#595959" fo:font-family="Wingdings" style:font-pitch="variable" fo:font-size="0.14583in"/>
      </text:list-level-style-bullet>
      <text:list-level-style-bullet text:level="2" text:bullet-char="Ø">
        <style:list-level-properties text:space-before="0.5in" text:min-label-width="0.375in"/>
        <style:text-properties fo:color="#595959" fo:font-family="Wingdings" style:font-pitch="variable" fo:font-size="0.14583in"/>
      </text:list-level-style-bullet>
      <text:list-level-style-bullet text:level="3" text:bullet-char="Ø">
        <style:list-level-properties text:space-before="1in" text:min-label-width="0.375in"/>
        <style:text-properties fo:color="#595959" fo:font-family="Wingdings" style:font-pitch="variable" fo:font-size="0.14583in"/>
      </text:list-level-style-bullet>
      <text:list-level-style-bullet text:level="4" text:bullet-char="Ø">
        <style:list-level-properties text:space-before="1.5in" text:min-label-width="0.375in"/>
        <style:text-properties fo:color="#595959" fo:font-family="Wingdings" style:font-pitch="variable" fo:font-size="0.14583in"/>
      </text:list-level-style-bullet>
      <text:list-level-style-bullet text:level="5" text:bullet-char="Ø">
        <style:list-level-properties text:space-before="2in" text:min-label-width="0.375in"/>
        <style:text-properties fo:color="#595959" fo:font-family="Wingdings" style:font-pitch="variable" fo:font-size="0.14583in"/>
      </text:list-level-style-bullet>
      <text:list-level-style-bullet text:level="6" text:bullet-char="Ø">
        <style:list-level-properties text:space-before="2.5in" text:min-label-width="0.375in"/>
        <style:text-properties fo:color="#595959" fo:font-family="Wingdings" style:font-pitch="variable" fo:font-size="0.14583in"/>
      </text:list-level-style-bullet>
      <text:list-level-style-bullet text:level="7" text:bullet-char="Ø">
        <style:list-level-properties text:space-before="3in" text:min-label-width="0.375in"/>
        <style:text-properties fo:color="#595959" fo:font-family="Wingdings" style:font-pitch="variable" fo:font-size="0.14583in"/>
      </text:list-level-style-bullet>
      <text:list-level-style-bullet text:level="8" text:bullet-char="Ø">
        <style:list-level-properties text:space-before="3.5in" text:min-label-width="0.375in"/>
        <style:text-properties fo:color="#595959" fo:font-family="Wingdings" style:font-pitch="variable" fo:font-size="0.14583in"/>
      </text:list-level-style-bullet>
      <text:list-level-style-bullet text:level="9" text:bullet-char="Ø">
        <style:list-level-properties text:space-before="4in" text:min-label-width="0.375in"/>
        <style:text-properties fo:color="#595959" fo:font-family="Wingdings" style:font-pitch="variable" fo:font-size="0.14583in"/>
      </text:list-level-style-bullet>
    </text:list-style>
    <text:list-style style:name="a1896"/>
    <text:list-style style:name="a1750">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5in" text:min-label-width="0.18749in"/>
        <style:text-properties fo:font-family="Arial" fo:font-size="100%"/>
      </text:list-level-style-bullet>
      <text:list-level-style-bullet text:level="3" text:bullet-char="•">
        <style:list-level-properties text:space-before="1in" text:min-label-width="0.18749in"/>
        <style:text-properties fo:font-family="Arial" fo:font-size="100%"/>
      </text:list-level-style-bullet>
      <text:list-level-style-bullet text:level="4" text:bullet-char="•">
        <style:list-level-properties text:space-before="1.5in" text:min-label-width="0.18749in"/>
        <style:text-properties fo:font-family="Arial" fo:font-size="100%"/>
      </text:list-level-style-bullet>
      <text:list-level-style-bullet text:level="5" text:bullet-char="•">
        <style:list-level-properties text:space-before="2in" text:min-label-width="0.18749in"/>
        <style:text-properties fo:font-family="Arial" fo:font-size="100%"/>
      </text:list-level-style-bullet>
      <text:list-level-style-bullet text:level="6" text:bullet-char="•">
        <style:list-level-properties text:space-before="2.5in" text:min-label-width="0.18749in"/>
        <style:text-properties fo:font-family="Arial" fo:font-size="100%"/>
      </text:list-level-style-bullet>
      <text:list-level-style-bullet text:level="7" text:bullet-char="•">
        <style:list-level-properties text:space-before="3in" text:min-label-width="0.18749in"/>
        <style:text-properties fo:font-family="Arial" fo:font-size="100%"/>
      </text:list-level-style-bullet>
      <text:list-level-style-bullet text:level="8" text:bullet-char="•">
        <style:list-level-properties text:space-before="3.5in" text:min-label-width="0.18749in"/>
        <style:text-properties fo:font-family="Arial" fo:font-size="100%"/>
      </text:list-level-style-bullet>
      <text:list-level-style-bullet text:level="9" text:bullet-char="•">
        <style:list-level-properties text:space-before="4in" text:min-label-width="0.18749in"/>
        <style:text-properties fo:font-family="Arial" fo:font-size="100%"/>
      </text:list-level-style-bullet>
    </text:list-style>
    <text:list-style style:name="a2367">
      <text:list-level-style-bullet text:level="1" text:bullet-char="o">
        <style:list-level-properties text:space-before="0in" text:min-label-width="0.3125in"/>
        <style:text-properties fo:font-family="Courier New" style:font-family-generic="modern" style:font-pitch="fixed" fo:font-size="0.18056in"/>
      </text:list-level-style-bullet>
      <text:list-level-style-bullet text:level="2" text:bullet-char="o">
        <style:list-level-properties text:space-before="0.5in" text:min-label-width="0.3125in"/>
        <style:text-properties fo:font-family="Courier New" style:font-family-generic="modern" style:font-pitch="fixed" fo:font-size="0.18056in"/>
      </text:list-level-style-bullet>
      <text:list-level-style-bullet text:level="3" text:bullet-char="o">
        <style:list-level-properties text:space-before="1in" text:min-label-width="0.3125in"/>
        <style:text-properties fo:font-family="Courier New" style:font-family-generic="modern" style:font-pitch="fixed" fo:font-size="0.18056in"/>
      </text:list-level-style-bullet>
      <text:list-level-style-bullet text:level="4" text:bullet-char="o">
        <style:list-level-properties text:space-before="1.5in" text:min-label-width="0.3125in"/>
        <style:text-properties fo:font-family="Courier New" style:font-family-generic="modern" style:font-pitch="fixed" fo:font-size="0.18056in"/>
      </text:list-level-style-bullet>
      <text:list-level-style-bullet text:level="5" text:bullet-char="o">
        <style:list-level-properties text:space-before="2in" text:min-label-width="0.3125in"/>
        <style:text-properties fo:font-family="Courier New" style:font-family-generic="modern" style:font-pitch="fixed" fo:font-size="0.18056in"/>
      </text:list-level-style-bullet>
      <text:list-level-style-bullet text:level="6" text:bullet-char="o">
        <style:list-level-properties text:space-before="2.5in" text:min-label-width="0.3125in"/>
        <style:text-properties fo:font-family="Courier New" style:font-family-generic="modern" style:font-pitch="fixed" fo:font-size="0.18056in"/>
      </text:list-level-style-bullet>
      <text:list-level-style-bullet text:level="7" text:bullet-char="o">
        <style:list-level-properties text:space-before="3in" text:min-label-width="0.3125in"/>
        <style:text-properties fo:font-family="Courier New" style:font-family-generic="modern" style:font-pitch="fixed" fo:font-size="0.18056in"/>
      </text:list-level-style-bullet>
      <text:list-level-style-bullet text:level="8" text:bullet-char="o">
        <style:list-level-properties text:space-before="3.5in" text:min-label-width="0.3125in"/>
        <style:text-properties fo:font-family="Courier New" style:font-family-generic="modern" style:font-pitch="fixed" fo:font-size="0.18056in"/>
      </text:list-level-style-bullet>
      <text:list-level-style-bullet text:level="9" text:bullet-char="o">
        <style:list-level-properties text:space-before="4in" text:min-label-width="0.3125in"/>
        <style:text-properties fo:font-family="Courier New" style:font-family-generic="modern" style:font-pitch="fixed" fo:font-size="0.18056in"/>
      </text:list-level-style-bullet>
    </text:list-style>
    <text:list-style style:name="a2174">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753">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87497in" text:min-label-width="0.18749in"/>
        <style:text-properties fo:font-family="Arial" fo:font-size="100%"/>
      </text:list-level-style-bullet>
      <text:list-level-style-bullet text:level="4" text:bullet-char="•">
        <style:list-level-properties text:space-before="1.37497in" text:min-label-width="0.18749in"/>
        <style:text-properties fo:font-family="Arial" fo:font-size="100%"/>
      </text:list-level-style-bullet>
      <text:list-level-style-bullet text:level="5" text:bullet-char="•">
        <style:list-level-properties text:space-before="1.87497in" text:min-label-width="0.18749in"/>
        <style:text-properties fo:font-family="Arial" fo:font-size="100%"/>
      </text:list-level-style-bullet>
      <text:list-level-style-bullet text:level="6" text:bullet-char="•">
        <style:list-level-properties text:space-before="2.37497in" text:min-label-width="0.18749in"/>
        <style:text-properties fo:font-family="Arial" fo:font-size="100%"/>
      </text:list-level-style-bullet>
      <text:list-level-style-bullet text:level="7" text:bullet-char="•">
        <style:list-level-properties text:space-before="2.87497in" text:min-label-width="0.18749in"/>
        <style:text-properties fo:font-family="Arial" fo:font-size="100%"/>
      </text:list-level-style-bullet>
      <text:list-level-style-bullet text:level="8" text:bullet-char="•">
        <style:list-level-properties text:space-before="3.37497in" text:min-label-width="0.18749in"/>
        <style:text-properties fo:font-family="Arial" fo:font-size="100%"/>
      </text:list-level-style-bullet>
      <text:list-level-style-bullet text:level="9" text:bullet-char="•">
        <style:list-level-properties text:space-before="3.87497in" text:min-label-width="0.18749in"/>
        <style:text-properties fo:font-family="Arial" fo:font-size="100%"/>
      </text:list-level-style-bullet>
    </text:list-style>
    <text:list-style style:name="a2177">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030">
      <text:list-level-style-bullet text:level="1" text:bullet-char="•">
        <style:list-level-properties text:space-before="0.00003in" text:min-label-width="0.18681in"/>
        <style:text-properties fo:font-family="Arial" fo:font-size="100%"/>
      </text:list-level-style-bullet>
      <text:list-level-style-bullet text:level="2" text:bullet-char="•">
        <style:list-level-properties text:space-before="0.375in" text:min-label-width="0.18681in"/>
        <style:text-properties fo:font-family="Arial" fo:font-size="100%"/>
      </text:list-level-style-bullet>
      <text:list-level-style-bullet text:level="3" text:bullet-char="•">
        <style:list-level-properties text:space-before="0.74997in" text:min-label-width="0.18681in"/>
        <style:text-properties fo:font-family="Arial" fo:font-size="100%"/>
      </text:list-level-style-bullet>
      <text:list-level-style-bullet text:level="4" text:bullet-char="•">
        <style:list-level-properties text:space-before="1.12494in" text:min-label-width="0.18681in"/>
        <style:text-properties fo:font-family="Arial" fo:font-size="100%"/>
      </text:list-level-style-bullet>
      <text:list-level-style-bullet text:level="5" text:bullet-char="•">
        <style:list-level-properties text:space-before="1.49991in" text:min-label-width="0.18681in"/>
        <style:text-properties fo:font-family="Arial" fo:font-size="100%"/>
      </text:list-level-style-bullet>
      <text:list-level-style-bullet text:level="6" text:bullet-char="•">
        <style:list-level-properties text:space-before="2.56254in" text:min-label-width="0.18681in"/>
        <style:text-properties fo:font-family="Arial" fo:font-size="100%"/>
      </text:list-level-style-bullet>
      <text:list-level-style-bullet text:level="7" text:bullet-char="•">
        <style:list-level-properties text:space-before="3.06254in" text:min-label-width="0.18681in"/>
        <style:text-properties fo:font-family="Arial" fo:font-size="100%"/>
      </text:list-level-style-bullet>
      <text:list-level-style-bullet text:level="8" text:bullet-char="•">
        <style:list-level-properties text:space-before="3.56254in" text:min-label-width="0.18681in"/>
        <style:text-properties fo:font-family="Arial" fo:font-size="100%"/>
      </text:list-level-style-bullet>
      <text:list-level-style-bullet text:level="9" text:bullet-char="•">
        <style:list-level-properties text:space-before="4.06254in" text:min-label-width="0.18681in"/>
        <style:text-properties fo:font-family="Arial" fo:font-size="100%"/>
      </text:list-level-style-bullet>
    </text:list-style>
    <text:list-style style:name="a1756">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87497in" text:min-label-width="0.18749in"/>
        <style:text-properties fo:font-family="Arial" fo:font-size="100%"/>
      </text:list-level-style-bullet>
      <text:list-level-style-bullet text:level="4" text:bullet-char="•">
        <style:list-level-properties text:space-before="1.37497in" text:min-label-width="0.18749in"/>
        <style:text-properties fo:font-family="Arial" fo:font-size="100%"/>
      </text:list-level-style-bullet>
      <text:list-level-style-bullet text:level="5" text:bullet-char="•">
        <style:list-level-properties text:space-before="1.87497in" text:min-label-width="0.18749in"/>
        <style:text-properties fo:font-family="Arial" fo:font-size="100%"/>
      </text:list-level-style-bullet>
      <text:list-level-style-bullet text:level="6" text:bullet-char="•">
        <style:list-level-properties text:space-before="2.37497in" text:min-label-width="0.18749in"/>
        <style:text-properties fo:font-family="Arial" fo:font-size="100%"/>
      </text:list-level-style-bullet>
      <text:list-level-style-bullet text:level="7" text:bullet-char="•">
        <style:list-level-properties text:space-before="2.87497in" text:min-label-width="0.18749in"/>
        <style:text-properties fo:font-family="Arial" fo:font-size="100%"/>
      </text:list-level-style-bullet>
      <text:list-level-style-bullet text:level="8" text:bullet-char="•">
        <style:list-level-properties text:space-before="3.37497in" text:min-label-width="0.18749in"/>
        <style:text-properties fo:font-family="Arial" fo:font-size="100%"/>
      </text:list-level-style-bullet>
      <text:list-level-style-bullet text:level="9" text:bullet-char="•">
        <style:list-level-properties text:space-before="3.87497in" text:min-label-width="0.18749in"/>
        <style:text-properties fo:font-family="Arial" fo:font-size="100%"/>
      </text:list-level-style-bullet>
    </text:list-style>
    <text:list-style style:name="a2033">
      <text:list-level-style-bullet text:level="1" text:bullet-char="•">
        <style:list-level-properties text:space-before="0.00003in" text:min-label-width="0.18681in"/>
        <style:text-properties fo:font-family="Arial" fo:font-size="100%"/>
      </text:list-level-style-bullet>
      <text:list-level-style-bullet text:level="2" text:bullet-char="•">
        <style:list-level-properties text:space-before="0.375in" text:min-label-width="0.18681in"/>
        <style:text-properties fo:font-family="Arial" fo:font-size="100%"/>
      </text:list-level-style-bullet>
      <text:list-level-style-bullet text:level="3" text:bullet-char="•">
        <style:list-level-properties text:space-before="0.74997in" text:min-label-width="0.18681in"/>
        <style:text-properties fo:font-family="Arial" fo:font-size="100%"/>
      </text:list-level-style-bullet>
      <text:list-level-style-bullet text:level="4" text:bullet-char="•">
        <style:list-level-properties text:space-before="1.12494in" text:min-label-width="0.18681in"/>
        <style:text-properties fo:font-family="Arial" fo:font-size="100%"/>
      </text:list-level-style-bullet>
      <text:list-level-style-bullet text:level="5" text:bullet-char="•">
        <style:list-level-properties text:space-before="1.49991in" text:min-label-width="0.18681in"/>
        <style:text-properties fo:font-family="Arial" fo:font-size="100%"/>
      </text:list-level-style-bullet>
      <text:list-level-style-bullet text:level="6" text:bullet-char="•">
        <style:list-level-properties text:space-before="2.56254in" text:min-label-width="0.18681in"/>
        <style:text-properties fo:font-family="Arial" fo:font-size="100%"/>
      </text:list-level-style-bullet>
      <text:list-level-style-bullet text:level="7" text:bullet-char="•">
        <style:list-level-properties text:space-before="3.06254in" text:min-label-width="0.18681in"/>
        <style:text-properties fo:font-family="Arial" fo:font-size="100%"/>
      </text:list-level-style-bullet>
      <text:list-level-style-bullet text:level="8" text:bullet-char="•">
        <style:list-level-properties text:space-before="3.56254in" text:min-label-width="0.18681in"/>
        <style:text-properties fo:font-family="Arial" fo:font-size="100%"/>
      </text:list-level-style-bullet>
      <text:list-level-style-bullet text:level="9" text:bullet-char="•">
        <style:list-level-properties text:space-before="4.06254in" text:min-label-width="0.18681in"/>
        <style:text-properties fo:font-family="Arial" fo:font-size="100%"/>
      </text:list-level-style-bullet>
    </text:list-style>
    <text:list-style style:name="a1759">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5in" text:min-label-width="0.18749in"/>
        <style:text-properties fo:font-family="Arial" fo:font-size="100%"/>
      </text:list-level-style-bullet>
      <text:list-level-style-bullet text:level="3" text:bullet-char="•">
        <style:list-level-properties text:space-before="1in" text:min-label-width="0.18749in"/>
        <style:text-properties fo:font-family="Arial" fo:font-size="100%"/>
      </text:list-level-style-bullet>
      <text:list-level-style-bullet text:level="4" text:bullet-char="•">
        <style:list-level-properties text:space-before="1.5in" text:min-label-width="0.18749in"/>
        <style:text-properties fo:font-family="Arial" fo:font-size="100%"/>
      </text:list-level-style-bullet>
      <text:list-level-style-bullet text:level="5" text:bullet-char="•">
        <style:list-level-properties text:space-before="2in" text:min-label-width="0.18749in"/>
        <style:text-properties fo:font-family="Arial" fo:font-size="100%"/>
      </text:list-level-style-bullet>
      <text:list-level-style-bullet text:level="6" text:bullet-char="•">
        <style:list-level-properties text:space-before="2.5in" text:min-label-width="0.18749in"/>
        <style:text-properties fo:font-family="Arial" fo:font-size="100%"/>
      </text:list-level-style-bullet>
      <text:list-level-style-bullet text:level="7" text:bullet-char="•">
        <style:list-level-properties text:space-before="3in" text:min-label-width="0.18749in"/>
        <style:text-properties fo:font-family="Arial" fo:font-size="100%"/>
      </text:list-level-style-bullet>
      <text:list-level-style-bullet text:level="8" text:bullet-char="•">
        <style:list-level-properties text:space-before="3.5in" text:min-label-width="0.18749in"/>
        <style:text-properties fo:font-family="Arial" fo:font-size="100%"/>
      </text:list-level-style-bullet>
      <text:list-level-style-bullet text:level="9" text:bullet-char="•">
        <style:list-level-properties text:space-before="4in" text:min-label-width="0.18749in"/>
        <style:text-properties fo:font-family="Arial" fo:font-size="100%"/>
      </text:list-level-style-bullet>
    </text:list-style>
    <text:list-style style:name="a1565">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2036">
      <text:list-level-style-bullet text:level="1" text:bullet-char="•">
        <style:list-level-properties text:space-before="0.00003in" text:min-label-width="0.18681in"/>
        <style:text-properties fo:font-family="Arial" fo:font-size="100%"/>
      </text:list-level-style-bullet>
      <text:list-level-style-bullet text:level="2" text:bullet-char="•">
        <style:list-level-properties text:space-before="0.375in" text:min-label-width="0.18681in"/>
        <style:text-properties fo:font-family="Arial" fo:font-size="100%"/>
      </text:list-level-style-bullet>
      <text:list-level-style-bullet text:level="3" text:bullet-char="•">
        <style:list-level-properties text:space-before="0.74997in" text:min-label-width="0.18681in"/>
        <style:text-properties fo:font-family="Arial" fo:font-size="100%"/>
      </text:list-level-style-bullet>
      <text:list-level-style-bullet text:level="4" text:bullet-char="•">
        <style:list-level-properties text:space-before="1.12494in" text:min-label-width="0.18681in"/>
        <style:text-properties fo:font-family="Arial" fo:font-size="100%"/>
      </text:list-level-style-bullet>
      <text:list-level-style-bullet text:level="5" text:bullet-char="•">
        <style:list-level-properties text:space-before="1.49991in" text:min-label-width="0.18681in"/>
        <style:text-properties fo:font-family="Arial" fo:font-size="100%"/>
      </text:list-level-style-bullet>
      <text:list-level-style-bullet text:level="6" text:bullet-char="•">
        <style:list-level-properties text:space-before="2.56254in" text:min-label-width="0.18681in"/>
        <style:text-properties fo:font-family="Arial" fo:font-size="100%"/>
      </text:list-level-style-bullet>
      <text:list-level-style-bullet text:level="7" text:bullet-char="•">
        <style:list-level-properties text:space-before="3.06254in" text:min-label-width="0.18681in"/>
        <style:text-properties fo:font-family="Arial" fo:font-size="100%"/>
      </text:list-level-style-bullet>
      <text:list-level-style-bullet text:level="8" text:bullet-char="•">
        <style:list-level-properties text:space-before="3.56254in" text:min-label-width="0.18681in"/>
        <style:text-properties fo:font-family="Arial" fo:font-size="100%"/>
      </text:list-level-style-bullet>
      <text:list-level-style-bullet text:level="9" text:bullet-char="•">
        <style:list-level-properties text:space-before="4.06254in" text:min-label-width="0.18681in"/>
        <style:text-properties fo:font-family="Arial" fo:font-size="100%"/>
      </text:list-level-style-bullet>
    </text:list-style>
    <text:list-style style:name="a28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21">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5in" text:min-label-width="0.18749in"/>
        <style:text-properties fo:font-family="Arial" style:font-family-generic="swiss" style:font-pitch="variable" fo:font-size="100%"/>
      </text:list-level-style-bullet>
      <text:list-level-style-bullet text:level="3" text:bullet-char="•">
        <style:list-level-properties text:space-before="1in" text:min-label-width="0.18749in"/>
        <style:text-properties fo:font-family="Arial" style:font-family-generic="swiss" style:font-pitch="variable" fo:font-size="100%"/>
      </text:list-level-style-bullet>
      <text:list-level-style-bullet text:level="4" text:bullet-char="•">
        <style:list-level-properties text:space-before="1.5in" text:min-label-width="0.18749in"/>
        <style:text-properties fo:font-family="Arial" style:font-family-generic="swiss" style:font-pitch="variable" fo:font-size="100%"/>
      </text:list-level-style-bullet>
      <text:list-level-style-bullet text:level="5" text:bullet-char="•">
        <style:list-level-properties text:space-before="2in" text:min-label-width="0.18749in"/>
        <style:text-properties fo:font-family="Arial" style:font-family-generic="swiss" style:font-pitch="variable" fo:font-size="100%"/>
      </text:list-level-style-bullet>
      <text:list-level-style-bullet text:level="6" text:bullet-char="•">
        <style:list-level-properties text:space-before="2.5in" text:min-label-width="0.18749in"/>
        <style:text-properties fo:font-family="Arial" style:font-family-generic="swiss" style:font-pitch="variable" fo:font-size="100%"/>
      </text:list-level-style-bullet>
      <text:list-level-style-bullet text:level="7" text:bullet-char="•">
        <style:list-level-properties text:space-before="3in" text:min-label-width="0.18749in"/>
        <style:text-properties fo:font-family="Arial" style:font-family-generic="swiss" style:font-pitch="variable" fo:font-size="100%"/>
      </text:list-level-style-bullet>
      <text:list-level-style-bullet text:level="8" text:bullet-char="•">
        <style:list-level-properties text:space-before="3.5in" text:min-label-width="0.18749in"/>
        <style:text-properties fo:font-family="Arial" style:font-family-generic="swiss" style:font-pitch="variable" fo:font-size="100%"/>
      </text:list-level-style-bullet>
      <text:list-level-style-bullet text:level="9" text:bullet-char="•">
        <style:list-level-properties text:space-before="4in" text:min-label-width="0.18749in"/>
        <style:text-properties fo:font-family="Arial" style:font-family-generic="swiss" style:font-pitch="variable" fo:font-size="100%"/>
      </text:list-level-style-bullet>
    </text:list-style>
    <text:list-style style:name="a1568">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2039">
      <text:list-level-style-bullet text:level="1" text:bullet-char="•">
        <style:list-level-properties text:space-before="0in" text:min-label-width="0.18681in"/>
        <style:text-properties fo:font-family="Arial" fo:font-size="100%"/>
      </text:list-level-style-bullet>
      <text:list-level-style-bullet text:level="2" text:bullet-char="•">
        <style:list-level-properties text:space-before="0.37497in" text:min-label-width="0.18681in"/>
        <style:text-properties fo:font-family="Arial" fo:font-size="100%"/>
      </text:list-level-style-bullet>
      <text:list-level-style-bullet text:level="3" text:bullet-char="•">
        <style:list-level-properties text:space-before="0.74994in" text:min-label-width="0.18681in"/>
        <style:text-properties fo:font-family="Arial" fo:font-size="100%"/>
      </text:list-level-style-bullet>
      <text:list-level-style-bullet text:level="4" text:bullet-char="•">
        <style:list-level-properties text:space-before="1.12491in" text:min-label-width="0.18681in"/>
        <style:text-properties fo:font-family="Arial" fo:font-size="100%"/>
      </text:list-level-style-bullet>
      <text:list-level-style-bullet text:level="5" text:bullet-char="•">
        <style:list-level-properties text:space-before="1.49988in" text:min-label-width="0.18681in"/>
        <style:text-properties fo:font-family="Arial" fo:font-size="100%"/>
      </text:list-level-style-bullet>
      <text:list-level-style-bullet text:level="6" text:bullet-char="•">
        <style:list-level-properties text:space-before="2.56251in" text:min-label-width="0.18681in"/>
        <style:text-properties fo:font-family="Arial" fo:font-size="100%"/>
      </text:list-level-style-bullet>
      <text:list-level-style-bullet text:level="7" text:bullet-char="•">
        <style:list-level-properties text:space-before="3.06251in" text:min-label-width="0.18681in"/>
        <style:text-properties fo:font-family="Arial" fo:font-size="100%"/>
      </text:list-level-style-bullet>
      <text:list-level-style-bullet text:level="8" text:bullet-char="•">
        <style:list-level-properties text:space-before="3.56251in" text:min-label-width="0.18681in"/>
        <style:text-properties fo:font-family="Arial" fo:font-size="100%"/>
      </text:list-level-style-bullet>
      <text:list-level-style-bullet text:level="9" text:bullet-char="•">
        <style:list-level-properties text:space-before="4.06251in" text:min-label-width="0.18681in"/>
        <style:text-properties fo:font-family="Arial" fo:font-size="100%"/>
      </text:list-level-style-bullet>
    </text:list-style>
    <text:list-style style:name="a28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5in" text:min-label-width="0.18749in"/>
        <style:text-properties fo:font-family="Arial" style:font-family-generic="swiss" style:font-pitch="variable" fo:font-size="100%"/>
      </text:list-level-style-bullet>
      <text:list-level-style-bullet text:level="3" text:bullet-char="•">
        <style:list-level-properties text:space-before="1in" text:min-label-width="0.18749in"/>
        <style:text-properties fo:font-family="Arial" style:font-family-generic="swiss" style:font-pitch="variable" fo:font-size="100%"/>
      </text:list-level-style-bullet>
      <text:list-level-style-bullet text:level="4" text:bullet-char="•">
        <style:list-level-properties text:space-before="1.5in" text:min-label-width="0.18749in"/>
        <style:text-properties fo:font-family="Arial" style:font-family-generic="swiss" style:font-pitch="variable" fo:font-size="100%"/>
      </text:list-level-style-bullet>
      <text:list-level-style-bullet text:level="5" text:bullet-char="•">
        <style:list-level-properties text:space-before="2in" text:min-label-width="0.18749in"/>
        <style:text-properties fo:font-family="Arial" style:font-family-generic="swiss" style:font-pitch="variable" fo:font-size="100%"/>
      </text:list-level-style-bullet>
      <text:list-level-style-bullet text:level="6" text:bullet-char="•">
        <style:list-level-properties text:space-before="2.5in" text:min-label-width="0.18749in"/>
        <style:text-properties fo:font-family="Arial" style:font-family-generic="swiss" style:font-pitch="variable" fo:font-size="100%"/>
      </text:list-level-style-bullet>
      <text:list-level-style-bullet text:level="7" text:bullet-char="•">
        <style:list-level-properties text:space-before="3in" text:min-label-width="0.18749in"/>
        <style:text-properties fo:font-family="Arial" style:font-family-generic="swiss" style:font-pitch="variable" fo:font-size="100%"/>
      </text:list-level-style-bullet>
      <text:list-level-style-bullet text:level="8" text:bullet-char="•">
        <style:list-level-properties text:space-before="3.5in" text:min-label-width="0.18749in"/>
        <style:text-properties fo:font-family="Arial" style:font-family-generic="swiss" style:font-pitch="variable" fo:font-size="100%"/>
      </text:list-level-style-bullet>
      <text:list-level-style-bullet text:level="9" text:bullet-char="•">
        <style:list-level-properties text:space-before="4in" text:min-label-width="0.18749in"/>
        <style:text-properties fo:font-family="Arial" style:font-family-generic="swiss" style:font-pitch="variable" fo:font-size="100%"/>
      </text:list-level-style-bullet>
    </text:list-style>
    <text:list-style style:name="a28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27">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5in" text:min-label-width="0.18749in"/>
        <style:text-properties fo:font-family="Arial" style:font-family-generic="swiss" style:font-pitch="variable" fo:font-size="100%"/>
      </text:list-level-style-bullet>
      <text:list-level-style-bullet text:level="3" text:bullet-char="•">
        <style:list-level-properties text:space-before="1in" text:min-label-width="0.18749in"/>
        <style:text-properties fo:font-family="Arial" style:font-family-generic="swiss" style:font-pitch="variable" fo:font-size="100%"/>
      </text:list-level-style-bullet>
      <text:list-level-style-bullet text:level="4" text:bullet-char="•">
        <style:list-level-properties text:space-before="1.5in" text:min-label-width="0.18749in"/>
        <style:text-properties fo:font-family="Arial" style:font-family-generic="swiss" style:font-pitch="variable" fo:font-size="100%"/>
      </text:list-level-style-bullet>
      <text:list-level-style-bullet text:level="5" text:bullet-char="•">
        <style:list-level-properties text:space-before="2in" text:min-label-width="0.18749in"/>
        <style:text-properties fo:font-family="Arial" style:font-family-generic="swiss" style:font-pitch="variable" fo:font-size="100%"/>
      </text:list-level-style-bullet>
      <text:list-level-style-bullet text:level="6" text:bullet-char="•">
        <style:list-level-properties text:space-before="2.5in" text:min-label-width="0.18749in"/>
        <style:text-properties fo:font-family="Arial" style:font-family-generic="swiss" style:font-pitch="variable" fo:font-size="100%"/>
      </text:list-level-style-bullet>
      <text:list-level-style-bullet text:level="7" text:bullet-char="•">
        <style:list-level-properties text:space-before="3in" text:min-label-width="0.18749in"/>
        <style:text-properties fo:font-family="Arial" style:font-family-generic="swiss" style:font-pitch="variable" fo:font-size="100%"/>
      </text:list-level-style-bullet>
      <text:list-level-style-bullet text:level="8" text:bullet-char="•">
        <style:list-level-properties text:space-before="3.5in" text:min-label-width="0.18749in"/>
        <style:text-properties fo:font-family="Arial" style:font-family-generic="swiss" style:font-pitch="variable" fo:font-size="100%"/>
      </text:list-level-style-bullet>
      <text:list-level-style-bullet text:level="9" text:bullet-char="•">
        <style:list-level-properties text:space-before="4in" text:min-label-width="0.18749in"/>
        <style:text-properties fo:font-family="Arial" style:font-family-generic="swiss" style:font-pitch="variable" fo:font-size="100%"/>
      </text:list-level-style-bullet>
    </text:list-style>
    <text:list-style style:name="a2756">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5in" text:min-label-width="0.18749in"/>
        <style:text-properties fo:font-family="Arial" fo:font-size="100%"/>
      </text:list-level-style-bullet>
      <text:list-level-style-bullet text:level="3" text:bullet-char="•">
        <style:list-level-properties text:space-before="1in" text:min-label-width="0.18749in"/>
        <style:text-properties fo:font-family="Arial" fo:font-size="100%"/>
      </text:list-level-style-bullet>
      <text:list-level-style-bullet text:level="4" text:bullet-char="•">
        <style:list-level-properties text:space-before="1.5in" text:min-label-width="0.18749in"/>
        <style:text-properties fo:font-family="Arial" fo:font-size="100%"/>
      </text:list-level-style-bullet>
      <text:list-level-style-bullet text:level="5" text:bullet-char="•">
        <style:list-level-properties text:space-before="2in" text:min-label-width="0.18749in"/>
        <style:text-properties fo:font-family="Arial" fo:font-size="100%"/>
      </text:list-level-style-bullet>
      <text:list-level-style-bullet text:level="6" text:bullet-char="•">
        <style:list-level-properties text:space-before="2.5in" text:min-label-width="0.18749in"/>
        <style:text-properties fo:font-family="Arial" fo:font-size="100%"/>
      </text:list-level-style-bullet>
      <text:list-level-style-bullet text:level="7" text:bullet-char="•">
        <style:list-level-properties text:space-before="3in" text:min-label-width="0.18749in"/>
        <style:text-properties fo:font-family="Arial" fo:font-size="100%"/>
      </text:list-level-style-bullet>
      <text:list-level-style-bullet text:level="8" text:bullet-char="•">
        <style:list-level-properties text:space-before="3.5in" text:min-label-width="0.18749in"/>
        <style:text-properties fo:font-family="Arial" fo:font-size="100%"/>
      </text:list-level-style-bullet>
      <text:list-level-style-bullet text:level="9" text:bullet-char="•">
        <style:list-level-properties text:space-before="4in" text:min-label-width="0.18749in"/>
        <style:text-properties fo:font-family="Arial" fo:font-size="100%"/>
      </text:list-level-style-bullet>
    </text:list-style>
    <text:list-style style:name="a2370">
      <text:list-level-style-bullet text:level="1" text:bullet-char="o">
        <style:list-level-properties text:space-before="0in" text:min-label-width="0.3125in"/>
        <style:text-properties fo:font-family="Courier New" style:font-family-generic="modern" style:font-pitch="fixed" fo:font-size="0.18056in"/>
      </text:list-level-style-bullet>
      <text:list-level-style-bullet text:level="2" text:bullet-char="o">
        <style:list-level-properties text:space-before="0.5in" text:min-label-width="0.3125in"/>
        <style:text-properties fo:font-family="Courier New" style:font-family-generic="modern" style:font-pitch="fixed" fo:font-size="0.18056in"/>
      </text:list-level-style-bullet>
      <text:list-level-style-bullet text:level="3" text:bullet-char="o">
        <style:list-level-properties text:space-before="1in" text:min-label-width="0.3125in"/>
        <style:text-properties fo:font-family="Courier New" style:font-family-generic="modern" style:font-pitch="fixed" fo:font-size="0.18056in"/>
      </text:list-level-style-bullet>
      <text:list-level-style-bullet text:level="4" text:bullet-char="o">
        <style:list-level-properties text:space-before="1.5in" text:min-label-width="0.3125in"/>
        <style:text-properties fo:font-family="Courier New" style:font-family-generic="modern" style:font-pitch="fixed" fo:font-size="0.18056in"/>
      </text:list-level-style-bullet>
      <text:list-level-style-bullet text:level="5" text:bullet-char="o">
        <style:list-level-properties text:space-before="2in" text:min-label-width="0.3125in"/>
        <style:text-properties fo:font-family="Courier New" style:font-family-generic="modern" style:font-pitch="fixed" fo:font-size="0.18056in"/>
      </text:list-level-style-bullet>
      <text:list-level-style-bullet text:level="6" text:bullet-char="o">
        <style:list-level-properties text:space-before="2.5in" text:min-label-width="0.3125in"/>
        <style:text-properties fo:font-family="Courier New" style:font-family-generic="modern" style:font-pitch="fixed" fo:font-size="0.18056in"/>
      </text:list-level-style-bullet>
      <text:list-level-style-bullet text:level="7" text:bullet-char="o">
        <style:list-level-properties text:space-before="3in" text:min-label-width="0.3125in"/>
        <style:text-properties fo:font-family="Courier New" style:font-family-generic="modern" style:font-pitch="fixed" fo:font-size="0.18056in"/>
      </text:list-level-style-bullet>
      <text:list-level-style-bullet text:level="8" text:bullet-char="o">
        <style:list-level-properties text:space-before="3.5in" text:min-label-width="0.3125in"/>
        <style:text-properties fo:font-family="Courier New" style:font-family-generic="modern" style:font-pitch="fixed" fo:font-size="0.18056in"/>
      </text:list-level-style-bullet>
      <text:list-level-style-bullet text:level="9" text:bullet-char="o">
        <style:list-level-properties text:space-before="4in" text:min-label-width="0.3125in"/>
        <style:text-properties fo:font-family="Courier New" style:font-family-generic="modern" style:font-pitch="fixed" fo:font-size="0.18056in"/>
      </text:list-level-style-bullet>
    </text:list-style>
    <text:list-style style:name="a2759">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5in" text:min-label-width="0.18749in"/>
        <style:text-properties fo:font-family="Arial" fo:font-size="100%"/>
      </text:list-level-style-bullet>
      <text:list-level-style-bullet text:level="3" text:bullet-char="•">
        <style:list-level-properties text:space-before="1in" text:min-label-width="0.18749in"/>
        <style:text-properties fo:font-family="Arial" fo:font-size="100%"/>
      </text:list-level-style-bullet>
      <text:list-level-style-bullet text:level="4" text:bullet-char="•">
        <style:list-level-properties text:space-before="1.5in" text:min-label-width="0.18749in"/>
        <style:text-properties fo:font-family="Arial" fo:font-size="100%"/>
      </text:list-level-style-bullet>
      <text:list-level-style-bullet text:level="5" text:bullet-char="•">
        <style:list-level-properties text:space-before="2in" text:min-label-width="0.18749in"/>
        <style:text-properties fo:font-family="Arial" fo:font-size="100%"/>
      </text:list-level-style-bullet>
      <text:list-level-style-bullet text:level="6" text:bullet-char="•">
        <style:list-level-properties text:space-before="2.5in" text:min-label-width="0.18749in"/>
        <style:text-properties fo:font-family="Arial" fo:font-size="100%"/>
      </text:list-level-style-bullet>
      <text:list-level-style-bullet text:level="7" text:bullet-char="•">
        <style:list-level-properties text:space-before="3in" text:min-label-width="0.18749in"/>
        <style:text-properties fo:font-family="Arial" fo:font-size="100%"/>
      </text:list-level-style-bullet>
      <text:list-level-style-bullet text:level="8" text:bullet-char="•">
        <style:list-level-properties text:space-before="3.5in" text:min-label-width="0.18749in"/>
        <style:text-properties fo:font-family="Arial" fo:font-size="100%"/>
      </text:list-level-style-bullet>
      <text:list-level-style-bullet text:level="9" text:bullet-char="•">
        <style:list-level-properties text:space-before="4in" text:min-label-width="0.18749in"/>
        <style:text-properties fo:font-family="Arial" fo:font-size="100%"/>
      </text:list-level-style-bullet>
    </text:list-style>
    <text:list-style style:name="a26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75">
      <text:list-level-style-number text:level="1" style:num-format="" style:num-list-format-name="">
        <style:list-level-properties text:space-before="0in" text:min-label-width="0.37497in"/>
      </text:list-level-style-number>
      <text:list-level-style-number text:level="2" style:num-format="" style:num-list-format-name="">
        <style:list-level-properties text:space-before="0.49995in" text:min-label-width="0.37497in"/>
      </text:list-level-style-number>
      <text:list-level-style-number text:level="3" style:num-format="" style:num-list-format-name="">
        <style:list-level-properties text:space-before="0.99995in" text:min-label-width="0.37497in"/>
      </text:list-level-style-number>
      <text:list-level-style-number text:level="4" style:num-format="" style:num-list-format-name="">
        <style:list-level-properties text:space-before="1.49995in" text:min-label-width="0.37497in"/>
      </text:list-level-style-number>
      <text:list-level-style-number text:level="5" style:num-format="" style:num-list-format-name="">
        <style:list-level-properties text:space-before="1.99995in" text:min-label-width="0.37497in"/>
      </text:list-level-style-number>
      <text:list-level-style-number text:level="6" style:num-format="" style:num-list-format-name="">
        <style:list-level-properties text:space-before="2.49995in" text:min-label-width="0.37497in"/>
      </text:list-level-style-number>
      <text:list-level-style-number text:level="7" style:num-format="" style:num-list-format-name="">
        <style:list-level-properties text:space-before="2.99995in" text:min-label-width="0.37497in"/>
      </text:list-level-style-number>
      <text:list-level-style-number text:level="8" style:num-format="" style:num-list-format-name="">
        <style:list-level-properties text:space-before="3.49995in" text:min-label-width="0.37497in"/>
      </text:list-level-style-number>
      <text:list-level-style-number text:level="9" style:num-format="" style:num-list-format-name="">
        <style:list-level-properties text:space-before="3.99995in" text:min-label-width="0.37497in"/>
      </text:list-level-style-number>
    </text:list-style>
    <text:list-style style:name="a26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53"/>
    <text:list-style style:name="a2378">
      <text:list-level-style-number text:level="1" style:num-format="" style:num-list-format-name="">
        <style:list-level-properties text:space-before="0in" text:min-label-width="0.37497in"/>
      </text:list-level-style-number>
      <text:list-level-style-number text:level="2" style:num-format="" style:num-list-format-name="">
        <style:list-level-properties text:space-before="0.49995in" text:min-label-width="0.37497in"/>
      </text:list-level-style-number>
      <text:list-level-style-number text:level="3" style:num-format="" style:num-list-format-name="">
        <style:list-level-properties text:space-before="0.99995in" text:min-label-width="0.37497in"/>
      </text:list-level-style-number>
      <text:list-level-style-number text:level="4" style:num-format="" style:num-list-format-name="">
        <style:list-level-properties text:space-before="1.49995in" text:min-label-width="0.37497in"/>
      </text:list-level-style-number>
      <text:list-level-style-number text:level="5" style:num-format="" style:num-list-format-name="">
        <style:list-level-properties text:space-before="1.99995in" text:min-label-width="0.37497in"/>
      </text:list-level-style-number>
      <text:list-level-style-number text:level="6" style:num-format="" style:num-list-format-name="">
        <style:list-level-properties text:space-before="2.49995in" text:min-label-width="0.37497in"/>
      </text:list-level-style-number>
      <text:list-level-style-number text:level="7" style:num-format="" style:num-list-format-name="">
        <style:list-level-properties text:space-before="2.99995in" text:min-label-width="0.37497in"/>
      </text:list-level-style-number>
      <text:list-level-style-number text:level="8" style:num-format="" style:num-list-format-name="">
        <style:list-level-properties text:space-before="3.49995in" text:min-label-width="0.37497in"/>
      </text:list-level-style-number>
      <text:list-level-style-number text:level="9" style:num-format="" style:num-list-format-name="">
        <style:list-level-properties text:space-before="3.99995in" text:min-label-width="0.37497in"/>
      </text:list-level-style-number>
    </text:list-style>
    <text:list-style style:name="a26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2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957"/>
    <text:list-style style:name="a2428">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571">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62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76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574">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430">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5in" text:min-label-width="0.18749in"/>
        <style:text-properties fo:font-family="Arial" style:font-family-generic="swiss" style:font-pitch="variable" fo:font-size="100%"/>
      </text:list-level-style-bullet>
      <text:list-level-style-bullet text:level="3" text:bullet-char="•">
        <style:list-level-properties text:space-before="1in" text:min-label-width="0.18749in"/>
        <style:text-properties fo:font-family="Arial" style:font-family-generic="swiss" style:font-pitch="variable" fo:font-size="100%"/>
      </text:list-level-style-bullet>
      <text:list-level-style-bullet text:level="4" text:bullet-char="•">
        <style:list-level-properties text:space-before="1.5in" text:min-label-width="0.18749in"/>
        <style:text-properties fo:font-family="Arial" style:font-family-generic="swiss" style:font-pitch="variable" fo:font-size="100%"/>
      </text:list-level-style-bullet>
      <text:list-level-style-bullet text:level="5" text:bullet-char="•">
        <style:list-level-properties text:space-before="2in" text:min-label-width="0.18749in"/>
        <style:text-properties fo:font-family="Arial" style:font-family-generic="swiss" style:font-pitch="variable" fo:font-size="100%"/>
      </text:list-level-style-bullet>
      <text:list-level-style-bullet text:level="6" text:bullet-char="•">
        <style:list-level-properties text:space-before="2.5in" text:min-label-width="0.18749in"/>
        <style:text-properties fo:font-family="Arial" style:font-family-generic="swiss" style:font-pitch="variable" fo:font-size="100%"/>
      </text:list-level-style-bullet>
      <text:list-level-style-bullet text:level="7" text:bullet-char="•">
        <style:list-level-properties text:space-before="3in" text:min-label-width="0.18749in"/>
        <style:text-properties fo:font-family="Arial" style:font-family-generic="swiss" style:font-pitch="variable" fo:font-size="100%"/>
      </text:list-level-style-bullet>
      <text:list-level-style-bullet text:level="8" text:bullet-char="•">
        <style:list-level-properties text:space-before="3.5in" text:min-label-width="0.18749in"/>
        <style:text-properties fo:font-family="Arial" style:font-family-generic="swiss" style:font-pitch="variable" fo:font-size="100%"/>
      </text:list-level-style-bullet>
      <text:list-level-style-bullet text:level="9" text:bullet-char="•">
        <style:list-level-properties text:space-before="4in" text:min-label-width="0.18749in"/>
        <style:text-properties fo:font-family="Arial" style:font-family-generic="swiss" style:font-pitch="variable" fo:font-size="100%"/>
      </text:list-level-style-bullet>
    </text:list-style>
    <text:list-style style:name="a162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78">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433">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5in" text:min-label-width="0.18749in"/>
        <style:text-properties fo:font-family="Arial" style:font-family-generic="swiss" style:font-pitch="variable" fo:font-size="100%"/>
      </text:list-level-style-bullet>
      <text:list-level-style-bullet text:level="3" text:bullet-char="•">
        <style:list-level-properties text:space-before="1in" text:min-label-width="0.18749in"/>
        <style:text-properties fo:font-family="Arial" style:font-family-generic="swiss" style:font-pitch="variable" fo:font-size="100%"/>
      </text:list-level-style-bullet>
      <text:list-level-style-bullet text:level="4" text:bullet-char="•">
        <style:list-level-properties text:space-before="1.5in" text:min-label-width="0.18749in"/>
        <style:text-properties fo:font-family="Arial" style:font-family-generic="swiss" style:font-pitch="variable" fo:font-size="100%"/>
      </text:list-level-style-bullet>
      <text:list-level-style-bullet text:level="5" text:bullet-char="•">
        <style:list-level-properties text:space-before="2in" text:min-label-width="0.18749in"/>
        <style:text-properties fo:font-family="Arial" style:font-family-generic="swiss" style:font-pitch="variable" fo:font-size="100%"/>
      </text:list-level-style-bullet>
      <text:list-level-style-bullet text:level="6" text:bullet-char="•">
        <style:list-level-properties text:space-before="2.5in" text:min-label-width="0.18749in"/>
        <style:text-properties fo:font-family="Arial" style:font-family-generic="swiss" style:font-pitch="variable" fo:font-size="100%"/>
      </text:list-level-style-bullet>
      <text:list-level-style-bullet text:level="7" text:bullet-char="•">
        <style:list-level-properties text:space-before="3in" text:min-label-width="0.18749in"/>
        <style:text-properties fo:font-family="Arial" style:font-family-generic="swiss" style:font-pitch="variable" fo:font-size="100%"/>
      </text:list-level-style-bullet>
      <text:list-level-style-bullet text:level="8" text:bullet-char="•">
        <style:list-level-properties text:space-before="3.5in" text:min-label-width="0.18749in"/>
        <style:text-properties fo:font-family="Arial" style:font-family-generic="swiss" style:font-pitch="variable" fo:font-size="100%"/>
      </text:list-level-style-bullet>
      <text:list-level-style-bullet text:level="9" text:bullet-char="•">
        <style:list-level-properties text:space-before="4in" text:min-label-width="0.18749in"/>
        <style:text-properties fo:font-family="Arial" style:font-family-generic="swiss" style:font-pitch="variable" fo:font-size="100%"/>
      </text:list-level-style-bullet>
    </text:list-style>
    <text:list-style style:name="a1387">
      <text:list-level-style-bullet text:level="1" text:bullet-char="•">
        <style:list-level-properties text:space-before="0in" text:min-label-width="0.18681in"/>
        <style:text-properties fo:font-family="Arial" fo:font-size="100%"/>
      </text:list-level-style-bullet>
      <text:list-level-style-bullet text:level="2" text:bullet-char="•">
        <style:list-level-properties text:space-before="0.5in" text:min-label-width="0.18681in"/>
        <style:text-properties fo:font-family="Arial" fo:font-size="100%"/>
      </text:list-level-style-bullet>
      <text:list-level-style-bullet text:level="3" text:bullet-char="•">
        <style:list-level-properties text:space-before="1in" text:min-label-width="0.18681in"/>
        <style:text-properties fo:font-family="Arial" fo:font-size="100%"/>
      </text:list-level-style-bullet>
      <text:list-level-style-bullet text:level="4" text:bullet-char="•">
        <style:list-level-properties text:space-before="1.5in" text:min-label-width="0.18681in"/>
        <style:text-properties fo:font-family="Arial" fo:font-size="100%"/>
      </text:list-level-style-bullet>
      <text:list-level-style-bullet text:level="5" text:bullet-char="•">
        <style:list-level-properties text:space-before="2in" text:min-label-width="0.18681in"/>
        <style:text-properties fo:font-family="Arial" fo:font-size="100%"/>
      </text:list-level-style-bullet>
      <text:list-level-style-bullet text:level="6" text:bullet-char="•">
        <style:list-level-properties text:space-before="2.5in" text:min-label-width="0.18681in"/>
        <style:text-properties fo:font-family="Arial" fo:font-size="100%"/>
      </text:list-level-style-bullet>
      <text:list-level-style-bullet text:level="7" text:bullet-char="•">
        <style:list-level-properties text:space-before="3in" text:min-label-width="0.18681in"/>
        <style:text-properties fo:font-family="Arial" fo:font-size="100%"/>
      </text:list-level-style-bullet>
      <text:list-level-style-bullet text:level="8" text:bullet-char="•">
        <style:list-level-properties text:space-before="3.5in" text:min-label-width="0.18681in"/>
        <style:text-properties fo:font-family="Arial" fo:font-size="100%"/>
      </text:list-level-style-bullet>
      <text:list-level-style-bullet text:level="9" text:bullet-char="•">
        <style:list-level-properties text:space-before="4in" text:min-label-width="0.18681in"/>
        <style:text-properties fo:font-family="Arial" fo:font-size="100%"/>
      </text:list-level-style-bullet>
    </text:list-style>
    <text:list-style style:name="a162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5in" text:min-label-width="0.18749in"/>
        <style:text-properties fo:font-family="Arial" style:font-family-generic="swiss" style:font-pitch="variable" fo:font-size="100%"/>
      </text:list-level-style-bullet>
      <text:list-level-style-bullet text:level="3" text:bullet-char="•">
        <style:list-level-properties text:space-before="1in" text:min-label-width="0.18749in"/>
        <style:text-properties fo:font-family="Arial" style:font-family-generic="swiss" style:font-pitch="variable" fo:font-size="100%"/>
      </text:list-level-style-bullet>
      <text:list-level-style-bullet text:level="4" text:bullet-char="•">
        <style:list-level-properties text:space-before="1.5in" text:min-label-width="0.18749in"/>
        <style:text-properties fo:font-family="Arial" style:font-family-generic="swiss" style:font-pitch="variable" fo:font-size="100%"/>
      </text:list-level-style-bullet>
      <text:list-level-style-bullet text:level="5" text:bullet-char="•">
        <style:list-level-properties text:space-before="2in" text:min-label-width="0.18749in"/>
        <style:text-properties fo:font-family="Arial" style:font-family-generic="swiss" style:font-pitch="variable" fo:font-size="100%"/>
      </text:list-level-style-bullet>
      <text:list-level-style-bullet text:level="6" text:bullet-char="•">
        <style:list-level-properties text:space-before="2.5in" text:min-label-width="0.18749in"/>
        <style:text-properties fo:font-family="Arial" style:font-family-generic="swiss" style:font-pitch="variable" fo:font-size="100%"/>
      </text:list-level-style-bullet>
      <text:list-level-style-bullet text:level="7" text:bullet-char="•">
        <style:list-level-properties text:space-before="3in" text:min-label-width="0.18749in"/>
        <style:text-properties fo:font-family="Arial" style:font-family-generic="swiss" style:font-pitch="variable" fo:font-size="100%"/>
      </text:list-level-style-bullet>
      <text:list-level-style-bullet text:level="8" text:bullet-char="•">
        <style:list-level-properties text:space-before="3.5in" text:min-label-width="0.18749in"/>
        <style:text-properties fo:font-family="Arial" style:font-family-generic="swiss" style:font-pitch="variable" fo:font-size="100%"/>
      </text:list-level-style-bullet>
      <text:list-level-style-bullet text:level="9" text:bullet-char="•">
        <style:list-level-properties text:space-before="4in" text:min-label-width="0.18749in"/>
        <style:text-properties fo:font-family="Arial" style:font-family-generic="swiss" style:font-pitch="variable" fo:font-size="100%"/>
      </text:list-level-style-bullet>
    </text:list-style>
    <text:list-style style:name="a2762">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5in" text:min-label-width="0.18749in"/>
        <style:text-properties fo:font-family="Arial" fo:font-size="100%"/>
      </text:list-level-style-bullet>
      <text:list-level-style-bullet text:level="3" text:bullet-char="•">
        <style:list-level-properties text:space-before="1in" text:min-label-width="0.18749in"/>
        <style:text-properties fo:font-family="Arial" fo:font-size="100%"/>
      </text:list-level-style-bullet>
      <text:list-level-style-bullet text:level="4" text:bullet-char="•">
        <style:list-level-properties text:space-before="1.5in" text:min-label-width="0.18749in"/>
        <style:text-properties fo:font-family="Arial" fo:font-size="100%"/>
      </text:list-level-style-bullet>
      <text:list-level-style-bullet text:level="5" text:bullet-char="•">
        <style:list-level-properties text:space-before="2in" text:min-label-width="0.18749in"/>
        <style:text-properties fo:font-family="Arial" fo:font-size="100%"/>
      </text:list-level-style-bullet>
      <text:list-level-style-bullet text:level="6" text:bullet-char="•">
        <style:list-level-properties text:space-before="2.5in" text:min-label-width="0.18749in"/>
        <style:text-properties fo:font-family="Arial" fo:font-size="100%"/>
      </text:list-level-style-bullet>
      <text:list-level-style-bullet text:level="7" text:bullet-char="•">
        <style:list-level-properties text:space-before="3in" text:min-label-width="0.18749in"/>
        <style:text-properties fo:font-family="Arial" fo:font-size="100%"/>
      </text:list-level-style-bullet>
      <text:list-level-style-bullet text:level="8" text:bullet-char="•">
        <style:list-level-properties text:space-before="3.5in" text:min-label-width="0.18749in"/>
        <style:text-properties fo:font-family="Arial" fo:font-size="100%"/>
      </text:list-level-style-bullet>
      <text:list-level-style-bullet text:level="9" text:bullet-char="•">
        <style:list-level-properties text:space-before="4in" text:min-label-width="0.18749in"/>
        <style:text-properties fo:font-family="Arial" fo:font-size="100%"/>
      </text:list-level-style-bullet>
    </text:list-style>
    <text:list-style style:name="a2765">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5in" text:min-label-width="0.18749in"/>
        <style:text-properties fo:font-family="Arial" fo:font-size="100%"/>
      </text:list-level-style-bullet>
      <text:list-level-style-bullet text:level="3" text:bullet-char="•">
        <style:list-level-properties text:space-before="1in" text:min-label-width="0.18749in"/>
        <style:text-properties fo:font-family="Arial" fo:font-size="100%"/>
      </text:list-level-style-bullet>
      <text:list-level-style-bullet text:level="4" text:bullet-char="•">
        <style:list-level-properties text:space-before="1.5in" text:min-label-width="0.18749in"/>
        <style:text-properties fo:font-family="Arial" fo:font-size="100%"/>
      </text:list-level-style-bullet>
      <text:list-level-style-bullet text:level="5" text:bullet-char="•">
        <style:list-level-properties text:space-before="2in" text:min-label-width="0.18749in"/>
        <style:text-properties fo:font-family="Arial" fo:font-size="100%"/>
      </text:list-level-style-bullet>
      <text:list-level-style-bullet text:level="6" text:bullet-char="•">
        <style:list-level-properties text:space-before="2.5in" text:min-label-width="0.18749in"/>
        <style:text-properties fo:font-family="Arial" fo:font-size="100%"/>
      </text:list-level-style-bullet>
      <text:list-level-style-bullet text:level="7" text:bullet-char="•">
        <style:list-level-properties text:space-before="3in" text:min-label-width="0.18749in"/>
        <style:text-properties fo:font-family="Arial" fo:font-size="100%"/>
      </text:list-level-style-bullet>
      <text:list-level-style-bullet text:level="8" text:bullet-char="•">
        <style:list-level-properties text:space-before="3.5in" text:min-label-width="0.18749in"/>
        <style:text-properties fo:font-family="Arial" fo:font-size="100%"/>
      </text:list-level-style-bullet>
      <text:list-level-style-bullet text:level="9" text:bullet-char="•">
        <style:list-level-properties text:space-before="4in" text:min-label-width="0.18749in"/>
        <style:text-properties fo:font-family="Arial" fo:font-size="100%"/>
      </text:list-level-style-bullet>
    </text:list-style>
    <text:list-style style:name="a2381">
      <text:list-level-style-number text:level="1" style:num-format="" style:num-list-format-name="">
        <style:list-level-properties text:space-before="0in" text:min-label-width="0.37497in"/>
      </text:list-level-style-number>
      <text:list-level-style-number text:level="2" style:num-format="" style:num-list-format-name="">
        <style:list-level-properties text:space-before="0.49995in" text:min-label-width="0.37497in"/>
      </text:list-level-style-number>
      <text:list-level-style-number text:level="3" style:num-format="" style:num-list-format-name="">
        <style:list-level-properties text:space-before="0.99995in" text:min-label-width="0.37497in"/>
      </text:list-level-style-number>
      <text:list-level-style-number text:level="4" style:num-format="" style:num-list-format-name="">
        <style:list-level-properties text:space-before="1.49995in" text:min-label-width="0.37497in"/>
      </text:list-level-style-number>
      <text:list-level-style-number text:level="5" style:num-format="" style:num-list-format-name="">
        <style:list-level-properties text:space-before="1.99995in" text:min-label-width="0.37497in"/>
      </text:list-level-style-number>
      <text:list-level-style-number text:level="6" style:num-format="" style:num-list-format-name="">
        <style:list-level-properties text:space-before="2.49995in" text:min-label-width="0.37497in"/>
      </text:list-level-style-number>
      <text:list-level-style-number text:level="7" style:num-format="" style:num-list-format-name="">
        <style:list-level-properties text:space-before="2.99995in" text:min-label-width="0.37497in"/>
      </text:list-level-style-number>
      <text:list-level-style-number text:level="8" style:num-format="" style:num-list-format-name="">
        <style:list-level-properties text:space-before="3.49995in" text:min-label-width="0.37497in"/>
      </text:list-level-style-number>
      <text:list-level-style-number text:level="9" style:num-format="" style:num-list-format-name="">
        <style:list-level-properties text:space-before="3.99995in" text:min-label-width="0.37497in"/>
      </text:list-level-style-number>
    </text:list-style>
    <text:list-style style:name="a26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84">
      <text:list-level-style-number text:level="1" style:num-format="" style:num-list-format-name="">
        <style:list-level-properties text:space-before="0in" text:min-label-width="0.37497in"/>
      </text:list-level-style-number>
      <text:list-level-style-number text:level="2" style:num-format="" style:num-list-format-name="">
        <style:list-level-properties text:space-before="0.49995in" text:min-label-width="0.37497in"/>
      </text:list-level-style-number>
      <text:list-level-style-number text:level="3" style:num-format="" style:num-list-format-name="">
        <style:list-level-properties text:space-before="0.99995in" text:min-label-width="0.37497in"/>
      </text:list-level-style-number>
      <text:list-level-style-number text:level="4" style:num-format="" style:num-list-format-name="">
        <style:list-level-properties text:space-before="1.49995in" text:min-label-width="0.37497in"/>
      </text:list-level-style-number>
      <text:list-level-style-number text:level="5" style:num-format="" style:num-list-format-name="">
        <style:list-level-properties text:space-before="1.99995in" text:min-label-width="0.37497in"/>
      </text:list-level-style-number>
      <text:list-level-style-number text:level="6" style:num-format="" style:num-list-format-name="">
        <style:list-level-properties text:space-before="2.49995in" text:min-label-width="0.37497in"/>
      </text:list-level-style-number>
      <text:list-level-style-number text:level="7" style:num-format="" style:num-list-format-name="">
        <style:list-level-properties text:space-before="2.99995in" text:min-label-width="0.37497in"/>
      </text:list-level-style-number>
      <text:list-level-style-number text:level="8" style:num-format="" style:num-list-format-name="">
        <style:list-level-properties text:space-before="3.49995in" text:min-label-width="0.37497in"/>
      </text:list-level-style-number>
      <text:list-level-style-number text:level="9" style:num-format="" style:num-list-format-name="">
        <style:list-level-properties text:space-before="3.99995in" text:min-label-width="0.37497in"/>
      </text:list-level-style-number>
    </text:list-style>
    <text:list-style style:name="a243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2387">
      <text:list-level-style-number text:level="1" style:num-format="" style:num-list-format-name="">
        <style:list-level-properties text:space-before="0in" text:min-label-width="0.37497in"/>
      </text:list-level-style-number>
      <text:list-level-style-number text:level="2" style:num-format="" style:num-list-format-name="">
        <style:list-level-properties text:space-before="0.49995in" text:min-label-width="0.37497in"/>
      </text:list-level-style-number>
      <text:list-level-style-number text:level="3" style:num-format="" style:num-list-format-name="">
        <style:list-level-properties text:space-before="0.99995in" text:min-label-width="0.37497in"/>
      </text:list-level-style-number>
      <text:list-level-style-number text:level="4" style:num-format="" style:num-list-format-name="">
        <style:list-level-properties text:space-before="1.49995in" text:min-label-width="0.37497in"/>
      </text:list-level-style-number>
      <text:list-level-style-number text:level="5" style:num-format="" style:num-list-format-name="">
        <style:list-level-properties text:space-before="1.99995in" text:min-label-width="0.37497in"/>
      </text:list-level-style-number>
      <text:list-level-style-number text:level="6" style:num-format="" style:num-list-format-name="">
        <style:list-level-properties text:space-before="2.49995in" text:min-label-width="0.37497in"/>
      </text:list-level-style-number>
      <text:list-level-style-number text:level="7" style:num-format="" style:num-list-format-name="">
        <style:list-level-properties text:space-before="2.99995in" text:min-label-width="0.37497in"/>
      </text:list-level-style-number>
      <text:list-level-style-number text:level="8" style:num-format="" style:num-list-format-name="">
        <style:list-level-properties text:space-before="3.49995in" text:min-label-width="0.37497in"/>
      </text:list-level-style-number>
      <text:list-level-style-number text:level="9" style:num-format="" style:num-list-format-name="">
        <style:list-level-properties text:space-before="3.99995in" text:min-label-width="0.37497in"/>
      </text:list-level-style-number>
    </text:list-style>
    <text:list-style style:name="a26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7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967"/>
    <text:list-style style:name="a177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77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824"/>
    <text:list-style style:name="a1390">
      <text:list-level-style-bullet text:level="1" text:bullet-char="•">
        <style:list-level-properties text:space-before="0in" text:min-label-width="0.18681in"/>
        <style:text-properties fo:font-family="Arial" fo:font-size="100%"/>
      </text:list-level-style-bullet>
      <text:list-level-style-bullet text:level="2" text:bullet-char="•">
        <style:list-level-properties text:space-before="0.5in" text:min-label-width="0.18681in"/>
        <style:text-properties fo:font-family="Arial" fo:font-size="100%"/>
      </text:list-level-style-bullet>
      <text:list-level-style-bullet text:level="3" text:bullet-char="•">
        <style:list-level-properties text:space-before="1in" text:min-label-width="0.18681in"/>
        <style:text-properties fo:font-family="Arial" fo:font-size="100%"/>
      </text:list-level-style-bullet>
      <text:list-level-style-bullet text:level="4" text:bullet-char="•">
        <style:list-level-properties text:space-before="1.5in" text:min-label-width="0.18681in"/>
        <style:text-properties fo:font-family="Arial" fo:font-size="100%"/>
      </text:list-level-style-bullet>
      <text:list-level-style-bullet text:level="5" text:bullet-char="•">
        <style:list-level-properties text:space-before="2in" text:min-label-width="0.18681in"/>
        <style:text-properties fo:font-family="Arial" fo:font-size="100%"/>
      </text:list-level-style-bullet>
      <text:list-level-style-bullet text:level="6" text:bullet-char="•">
        <style:list-level-properties text:space-before="2.5in" text:min-label-width="0.18681in"/>
        <style:text-properties fo:font-family="Arial" fo:font-size="100%"/>
      </text:list-level-style-bullet>
      <text:list-level-style-bullet text:level="7" text:bullet-char="•">
        <style:list-level-properties text:space-before="3in" text:min-label-width="0.18681in"/>
        <style:text-properties fo:font-family="Arial" fo:font-size="100%"/>
      </text:list-level-style-bullet>
      <text:list-level-style-bullet text:level="8" text:bullet-char="•">
        <style:list-level-properties text:space-before="3.5in" text:min-label-width="0.18681in"/>
        <style:text-properties fo:font-family="Arial" fo:font-size="100%"/>
      </text:list-level-style-bullet>
      <text:list-level-style-bullet text:level="9" text:bullet-char="•">
        <style:list-level-properties text:space-before="4in" text:min-label-width="0.18681in"/>
        <style:text-properties fo:font-family="Arial" fo:font-size="100%"/>
      </text:list-level-style-bullet>
    </text:list-style>
    <text:list-style style:name="a16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393">
      <text:list-level-style-bullet text:level="1" text:bullet-char="•">
        <style:list-level-properties text:space-before="0in" text:min-label-width="0.18681in"/>
        <style:text-properties fo:font-family="Arial" fo:font-size="100%"/>
      </text:list-level-style-bullet>
      <text:list-level-style-bullet text:level="2" text:bullet-char="•">
        <style:list-level-properties text:space-before="0.375in" text:min-label-width="0.18681in"/>
        <style:text-properties fo:font-family="Arial" fo:font-size="100%"/>
      </text:list-level-style-bullet>
      <text:list-level-style-bullet text:level="3" text:bullet-char="•">
        <style:list-level-properties text:space-before="0.875in" text:min-label-width="0.18681in"/>
        <style:text-properties fo:font-family="Arial" fo:font-size="100%"/>
      </text:list-level-style-bullet>
      <text:list-level-style-bullet text:level="4" text:bullet-char="•">
        <style:list-level-properties text:space-before="1.375in" text:min-label-width="0.18681in"/>
        <style:text-properties fo:font-family="Arial" fo:font-size="100%"/>
      </text:list-level-style-bullet>
      <text:list-level-style-bullet text:level="5" text:bullet-char="•">
        <style:list-level-properties text:space-before="1.875in" text:min-label-width="0.18681in"/>
        <style:text-properties fo:font-family="Arial" fo:font-size="100%"/>
      </text:list-level-style-bullet>
      <text:list-level-style-bullet text:level="6" text:bullet-char="•">
        <style:list-level-properties text:space-before="2.375in" text:min-label-width="0.18681in"/>
        <style:text-properties fo:font-family="Arial" fo:font-size="100%"/>
      </text:list-level-style-bullet>
      <text:list-level-style-bullet text:level="7" text:bullet-char="•">
        <style:list-level-properties text:space-before="2.875in" text:min-label-width="0.18681in"/>
        <style:text-properties fo:font-family="Arial" fo:font-size="100%"/>
      </text:list-level-style-bullet>
      <text:list-level-style-bullet text:level="8" text:bullet-char="•">
        <style:list-level-properties text:space-before="3.375in" text:min-label-width="0.18681in"/>
        <style:text-properties fo:font-family="Arial" fo:font-size="100%"/>
      </text:list-level-style-bullet>
      <text:list-level-style-bullet text:level="9" text:bullet-char="•">
        <style:list-level-properties text:space-before="3.875in" text:min-label-width="0.18681in"/>
        <style:text-properties fo:font-family="Arial" fo:font-size="100%"/>
      </text:list-level-style-bullet>
    </text:list-style>
    <text:list-style style:name="a163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396">
      <text:list-level-style-bullet text:level="1" text:bullet-char="•">
        <style:list-level-properties text:space-before="0in" text:min-label-width="0.18681in"/>
        <style:text-properties fo:font-family="Arial" fo:font-size="100%"/>
      </text:list-level-style-bullet>
      <text:list-level-style-bullet text:level="2" text:bullet-char="•">
        <style:list-level-properties text:space-before="0.375in" text:min-label-width="0.18681in"/>
        <style:text-properties fo:font-family="Arial" fo:font-size="100%"/>
      </text:list-level-style-bullet>
      <text:list-level-style-bullet text:level="3" text:bullet-char="•">
        <style:list-level-properties text:space-before="0.875in" text:min-label-width="0.18681in"/>
        <style:text-properties fo:font-family="Arial" fo:font-size="100%"/>
      </text:list-level-style-bullet>
      <text:list-level-style-bullet text:level="4" text:bullet-char="•">
        <style:list-level-properties text:space-before="1.375in" text:min-label-width="0.18681in"/>
        <style:text-properties fo:font-family="Arial" fo:font-size="100%"/>
      </text:list-level-style-bullet>
      <text:list-level-style-bullet text:level="5" text:bullet-char="•">
        <style:list-level-properties text:space-before="1.875in" text:min-label-width="0.18681in"/>
        <style:text-properties fo:font-family="Arial" fo:font-size="100%"/>
      </text:list-level-style-bullet>
      <text:list-level-style-bullet text:level="6" text:bullet-char="•">
        <style:list-level-properties text:space-before="2.375in" text:min-label-width="0.18681in"/>
        <style:text-properties fo:font-family="Arial" fo:font-size="100%"/>
      </text:list-level-style-bullet>
      <text:list-level-style-bullet text:level="7" text:bullet-char="•">
        <style:list-level-properties text:space-before="2.875in" text:min-label-width="0.18681in"/>
        <style:text-properties fo:font-family="Arial" fo:font-size="100%"/>
      </text:list-level-style-bullet>
      <text:list-level-style-bullet text:level="8" text:bullet-char="•">
        <style:list-level-properties text:space-before="3.375in" text:min-label-width="0.18681in"/>
        <style:text-properties fo:font-family="Arial" fo:font-size="100%"/>
      </text:list-level-style-bullet>
      <text:list-level-style-bullet text:level="9" text:bullet-char="•">
        <style:list-level-properties text:space-before="3.875in" text:min-label-width="0.18681in"/>
        <style:text-properties fo:font-family="Arial" fo:font-size="100%"/>
      </text:list-level-style-bullet>
    </text:list-style>
    <text:list-style style:name="a1447">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5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5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90">
      <text:list-level-style-number text:level="1" style:num-format="" style:num-list-format-name="">
        <style:list-level-properties text:space-before="0in" text:min-label-width="0.37497in"/>
      </text:list-level-style-number>
      <text:list-level-style-number text:level="2" style:num-format="" style:num-list-format-name="">
        <style:list-level-properties text:space-before="0.49995in" text:min-label-width="0.37497in"/>
      </text:list-level-style-number>
      <text:list-level-style-number text:level="3" style:num-format="" style:num-list-format-name="">
        <style:list-level-properties text:space-before="0.99995in" text:min-label-width="0.37497in"/>
      </text:list-level-style-number>
      <text:list-level-style-number text:level="4" style:num-format="" style:num-list-format-name="">
        <style:list-level-properties text:space-before="1.49995in" text:min-label-width="0.37497in"/>
      </text:list-level-style-number>
      <text:list-level-style-number text:level="5" style:num-format="" style:num-list-format-name="">
        <style:list-level-properties text:space-before="1.99995in" text:min-label-width="0.37497in"/>
      </text:list-level-style-number>
      <text:list-level-style-number text:level="6" style:num-format="" style:num-list-format-name="">
        <style:list-level-properties text:space-before="2.49995in" text:min-label-width="0.37497in"/>
      </text:list-level-style-number>
      <text:list-level-style-number text:level="7" style:num-format="" style:num-list-format-name="">
        <style:list-level-properties text:space-before="2.99995in" text:min-label-width="0.37497in"/>
      </text:list-level-style-number>
      <text:list-level-style-number text:level="8" style:num-format="" style:num-list-format-name="">
        <style:list-level-properties text:space-before="3.49995in" text:min-label-width="0.37497in"/>
      </text:list-level-style-number>
      <text:list-level-style-number text:level="9" style:num-format="" style:num-list-format-name="">
        <style:list-level-properties text:space-before="3.99995in" text:min-label-width="0.37497in"/>
      </text:list-level-style-number>
    </text:list-style>
    <text:list-style style:name="a26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5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93">
      <text:list-level-style-number text:level="1" style:num-format="" style:num-list-format-name="">
        <style:list-level-properties text:space-before="0in" text:min-label-width="0.37497in"/>
      </text:list-level-style-number>
      <text:list-level-style-number text:level="2" style:num-format="" style:num-list-format-name="">
        <style:list-level-properties text:space-before="0.49995in" text:min-label-width="0.37497in"/>
      </text:list-level-style-number>
      <text:list-level-style-number text:level="3" style:num-format="" style:num-list-format-name="">
        <style:list-level-properties text:space-before="0.99995in" text:min-label-width="0.37497in"/>
      </text:list-level-style-number>
      <text:list-level-style-number text:level="4" style:num-format="" style:num-list-format-name="">
        <style:list-level-properties text:space-before="1.49995in" text:min-label-width="0.37497in"/>
      </text:list-level-style-number>
      <text:list-level-style-number text:level="5" style:num-format="" style:num-list-format-name="">
        <style:list-level-properties text:space-before="1.99995in" text:min-label-width="0.37497in"/>
      </text:list-level-style-number>
      <text:list-level-style-number text:level="6" style:num-format="" style:num-list-format-name="">
        <style:list-level-properties text:space-before="2.49995in" text:min-label-width="0.37497in"/>
      </text:list-level-style-number>
      <text:list-level-style-number text:level="7" style:num-format="" style:num-list-format-name="">
        <style:list-level-properties text:space-before="2.99995in" text:min-label-width="0.37497in"/>
      </text:list-level-style-number>
      <text:list-level-style-number text:level="8" style:num-format="" style:num-list-format-name="">
        <style:list-level-properties text:space-before="3.49995in" text:min-label-width="0.37497in"/>
      </text:list-level-style-number>
      <text:list-level-style-number text:level="9" style:num-format="" style:num-list-format-name="">
        <style:list-level-properties text:space-before="3.99995in" text:min-label-width="0.37497in"/>
      </text:list-level-style-number>
    </text:list-style>
    <text:list-style style:name="a1972"/>
    <text:list-style style:name="a26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80">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976"/>
    <text:list-style style:name="a2060">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64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063">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206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450">
      <text:list-level-style-bullet text:level="1" text:bullet-char="•">
        <style:list-level-properties text:space-before="0in" text:min-label-width="0.18267in"/>
        <style:text-properties fo:font-family="Arial" style:font-family-generic="swiss" style:font-pitch="variable" fo:font-size="100%"/>
      </text:list-level-style-bullet>
      <text:list-level-style-bullet text:level="2" text:bullet-char="•">
        <style:list-level-properties text:space-before="0.5in" text:min-label-width="0.18267in"/>
        <style:text-properties fo:font-family="Arial" style:font-family-generic="swiss" style:font-pitch="variable" fo:font-size="100%"/>
      </text:list-level-style-bullet>
      <text:list-level-style-bullet text:level="3" text:bullet-char="•">
        <style:list-level-properties text:space-before="1in" text:min-label-width="0.18267in"/>
        <style:text-properties fo:font-family="Arial" style:font-family-generic="swiss" style:font-pitch="variable" fo:font-size="100%"/>
      </text:list-level-style-bullet>
      <text:list-level-style-bullet text:level="4" text:bullet-char="•">
        <style:list-level-properties text:space-before="1.5in" text:min-label-width="0.18267in"/>
        <style:text-properties fo:font-family="Arial" style:font-family-generic="swiss" style:font-pitch="variable" fo:font-size="100%"/>
      </text:list-level-style-bullet>
      <text:list-level-style-bullet text:level="5" text:bullet-char="•">
        <style:list-level-properties text:space-before="2in" text:min-label-width="0.18267in"/>
        <style:text-properties fo:font-family="Arial" style:font-family-generic="swiss" style:font-pitch="variable" fo:font-size="100%"/>
      </text:list-level-style-bullet>
      <text:list-level-style-bullet text:level="6" text:bullet-char="•">
        <style:list-level-properties text:space-before="2.5in" text:min-label-width="0.18267in"/>
        <style:text-properties fo:font-family="Arial" style:font-family-generic="swiss" style:font-pitch="variable" fo:font-size="100%"/>
      </text:list-level-style-bullet>
      <text:list-level-style-bullet text:level="7" text:bullet-char="•">
        <style:list-level-properties text:space-before="3in" text:min-label-width="0.18267in"/>
        <style:text-properties fo:font-family="Arial" style:font-family-generic="swiss" style:font-pitch="variable" fo:font-size="100%"/>
      </text:list-level-style-bullet>
      <text:list-level-style-bullet text:level="8" text:bullet-char="•">
        <style:list-level-properties text:space-before="3.5in" text:min-label-width="0.18267in"/>
        <style:text-properties fo:font-family="Arial" style:font-family-generic="swiss" style:font-pitch="variable" fo:font-size="100%"/>
      </text:list-level-style-bullet>
      <text:list-level-style-bullet text:level="9" text:bullet-char="•">
        <style:list-level-properties text:space-before="4in" text:min-label-width="0.18267in"/>
        <style:text-properties fo:font-family="Arial" style:font-family-generic="swiss" style:font-pitch="variable" fo:font-size="100%"/>
      </text:list-level-style-bullet>
    </text:list-style>
    <text:list-style style:name="a206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500">
      <text:list-level-style-bullet text:level="1" text:bullet-char="•">
        <style:list-level-properties text:space-before="0.01484in" text:min-label-width="0.18267in"/>
        <style:text-properties fo:font-family="Arial" style:font-family-generic="swiss" style:font-pitch="variable" fo:font-size="100%"/>
      </text:list-level-style-bullet>
      <text:list-level-style-bullet text:level="2" text:bullet-char="•">
        <style:list-level-properties text:space-before="0.51484in" text:min-label-width="0.18267in"/>
        <style:text-properties fo:font-family="Arial" style:font-family-generic="swiss" style:font-pitch="variable" fo:font-size="100%"/>
      </text:list-level-style-bullet>
      <text:list-level-style-bullet text:level="3" text:bullet-char="•">
        <style:list-level-properties text:space-before="1.01484in" text:min-label-width="0.18267in"/>
        <style:text-properties fo:font-family="Arial" style:font-family-generic="swiss" style:font-pitch="variable" fo:font-size="100%"/>
      </text:list-level-style-bullet>
      <text:list-level-style-bullet text:level="4" text:bullet-char="•">
        <style:list-level-properties text:space-before="1.51484in" text:min-label-width="0.18267in"/>
        <style:text-properties fo:font-family="Arial" style:font-family-generic="swiss" style:font-pitch="variable" fo:font-size="100%"/>
      </text:list-level-style-bullet>
      <text:list-level-style-bullet text:level="5" text:bullet-char="•">
        <style:list-level-properties text:space-before="2.01484in" text:min-label-width="0.18267in"/>
        <style:text-properties fo:font-family="Arial" style:font-family-generic="swiss" style:font-pitch="variable" fo:font-size="100%"/>
      </text:list-level-style-bullet>
      <text:list-level-style-bullet text:level="6" text:bullet-char="•">
        <style:list-level-properties text:space-before="2.51484in" text:min-label-width="0.18267in"/>
        <style:text-properties fo:font-family="Arial" style:font-family-generic="swiss" style:font-pitch="variable" fo:font-size="100%"/>
      </text:list-level-style-bullet>
      <text:list-level-style-bullet text:level="7" text:bullet-char="•">
        <style:list-level-properties text:space-before="3.01484in" text:min-label-width="0.18267in"/>
        <style:text-properties fo:font-family="Arial" style:font-family-generic="swiss" style:font-pitch="variable" fo:font-size="100%"/>
      </text:list-level-style-bullet>
      <text:list-level-style-bullet text:level="8" text:bullet-char="•">
        <style:list-level-properties text:space-before="3.51484in" text:min-label-width="0.18267in"/>
        <style:text-properties fo:font-family="Arial" style:font-family-generic="swiss" style:font-pitch="variable" fo:font-size="100%"/>
      </text:list-level-style-bullet>
      <text:list-level-style-bullet text:level="9" text:bullet-char="•">
        <style:list-level-properties text:space-before="4.01484in" text:min-label-width="0.18267in"/>
        <style:text-properties fo:font-family="Arial" style:font-family-generic="swiss" style:font-pitch="variable" fo:font-size="100%"/>
      </text:list-level-style-bullet>
    </text:list-style>
    <text:list-style style:name="a1503">
      <text:list-level-style-bullet text:level="1" text:bullet-char="•">
        <style:list-level-properties text:space-before="0.01484in" text:min-label-width="0.18267in"/>
        <style:text-properties fo:font-family="Arial" style:font-family-generic="swiss" style:font-pitch="variable" fo:font-size="100%"/>
      </text:list-level-style-bullet>
      <text:list-level-style-bullet text:level="2" text:bullet-char="•">
        <style:list-level-properties text:space-before="0.51484in" text:min-label-width="0.18267in"/>
        <style:text-properties fo:font-family="Arial" style:font-family-generic="swiss" style:font-pitch="variable" fo:font-size="100%"/>
      </text:list-level-style-bullet>
      <text:list-level-style-bullet text:level="3" text:bullet-char="•">
        <style:list-level-properties text:space-before="1.01484in" text:min-label-width="0.18267in"/>
        <style:text-properties fo:font-family="Arial" style:font-family-generic="swiss" style:font-pitch="variable" fo:font-size="100%"/>
      </text:list-level-style-bullet>
      <text:list-level-style-bullet text:level="4" text:bullet-char="•">
        <style:list-level-properties text:space-before="1.51484in" text:min-label-width="0.18267in"/>
        <style:text-properties fo:font-family="Arial" style:font-family-generic="swiss" style:font-pitch="variable" fo:font-size="100%"/>
      </text:list-level-style-bullet>
      <text:list-level-style-bullet text:level="5" text:bullet-char="•">
        <style:list-level-properties text:space-before="2.01484in" text:min-label-width="0.18267in"/>
        <style:text-properties fo:font-family="Arial" style:font-family-generic="swiss" style:font-pitch="variable" fo:font-size="100%"/>
      </text:list-level-style-bullet>
      <text:list-level-style-bullet text:level="6" text:bullet-char="•">
        <style:list-level-properties text:space-before="2.51484in" text:min-label-width="0.18267in"/>
        <style:text-properties fo:font-family="Arial" style:font-family-generic="swiss" style:font-pitch="variable" fo:font-size="100%"/>
      </text:list-level-style-bullet>
      <text:list-level-style-bullet text:level="7" text:bullet-char="•">
        <style:list-level-properties text:space-before="3.01484in" text:min-label-width="0.18267in"/>
        <style:text-properties fo:font-family="Arial" style:font-family-generic="swiss" style:font-pitch="variable" fo:font-size="100%"/>
      </text:list-level-style-bullet>
      <text:list-level-style-bullet text:level="8" text:bullet-char="•">
        <style:list-level-properties text:space-before="3.51484in" text:min-label-width="0.18267in"/>
        <style:text-properties fo:font-family="Arial" style:font-family-generic="swiss" style:font-pitch="variable" fo:font-size="100%"/>
      </text:list-level-style-bullet>
      <text:list-level-style-bullet text:level="9" text:bullet-char="•">
        <style:list-level-properties text:space-before="4.01484in" text:min-label-width="0.18267in"/>
        <style:text-properties fo:font-family="Arial" style:font-family-generic="swiss" style:font-pitch="variable" fo:font-size="100%"/>
      </text:list-level-style-bullet>
    </text:list-style>
    <text:list-style style:name="a25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5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8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5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8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6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6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86"/>
    <text:list-style style:name="a207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847"/>
    <text:list-style style:name="a207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462">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5in" text:min-label-width="0.18749in"/>
        <style:text-properties fo:font-family="Arial" style:font-family-generic="swiss" style:font-pitch="variable" fo:font-size="100%"/>
      </text:list-level-style-bullet>
      <text:list-level-style-bullet text:level="3" text:bullet-char="•">
        <style:list-level-properties text:space-before="1in" text:min-label-width="0.18749in"/>
        <style:text-properties fo:font-family="Arial" style:font-family-generic="swiss" style:font-pitch="variable" fo:font-size="100%"/>
      </text:list-level-style-bullet>
      <text:list-level-style-bullet text:level="4" text:bullet-char="•">
        <style:list-level-properties text:space-before="1.5in" text:min-label-width="0.18749in"/>
        <style:text-properties fo:font-family="Arial" style:font-family-generic="swiss" style:font-pitch="variable" fo:font-size="100%"/>
      </text:list-level-style-bullet>
      <text:list-level-style-bullet text:level="5" text:bullet-char="•">
        <style:list-level-properties text:space-before="2in" text:min-label-width="0.18749in"/>
        <style:text-properties fo:font-family="Arial" style:font-family-generic="swiss" style:font-pitch="variable" fo:font-size="100%"/>
      </text:list-level-style-bullet>
      <text:list-level-style-bullet text:level="6" text:bullet-char="•">
        <style:list-level-properties text:space-before="2.5in" text:min-label-width="0.18749in"/>
        <style:text-properties fo:font-family="Arial" style:font-family-generic="swiss" style:font-pitch="variable" fo:font-size="100%"/>
      </text:list-level-style-bullet>
      <text:list-level-style-bullet text:level="7" text:bullet-char="•">
        <style:list-level-properties text:space-before="3in" text:min-label-width="0.18749in"/>
        <style:text-properties fo:font-family="Arial" style:font-family-generic="swiss" style:font-pitch="variable" fo:font-size="100%"/>
      </text:list-level-style-bullet>
      <text:list-level-style-bullet text:level="8" text:bullet-char="•">
        <style:list-level-properties text:space-before="3.5in" text:min-label-width="0.18749in"/>
        <style:text-properties fo:font-family="Arial" style:font-family-generic="swiss" style:font-pitch="variable" fo:font-size="100%"/>
      </text:list-level-style-bullet>
      <text:list-level-style-bullet text:level="9" text:bullet-char="•">
        <style:list-level-properties text:space-before="4in" text:min-label-width="0.18749in"/>
        <style:text-properties fo:font-family="Arial" style:font-family-generic="swiss" style:font-pitch="variable" fo:font-size="100%"/>
      </text:list-level-style-bullet>
    </text:list-style>
    <text:list-style style:name="a1657">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2127">
      <text:list-level-style-bullet text:level="1" text:bullet-char="•">
        <style:list-level-properties text:space-before="0.02778in" text:min-label-width="0.3125in"/>
        <style:text-properties fo:font-family="Arial" style:font-family-generic="swiss" style:font-pitch="variable" fo:font-size="100%"/>
      </text:list-level-style-bullet>
      <text:list-level-style-bullet text:level="2" text:bullet-char="•">
        <style:list-level-properties text:space-before="0.52778in" text:min-label-width="0.3125in"/>
        <style:text-properties fo:font-family="Arial" style:font-family-generic="swiss" style:font-pitch="variable" fo:font-size="100%"/>
      </text:list-level-style-bullet>
      <text:list-level-style-bullet text:level="3" text:bullet-char="•">
        <style:list-level-properties text:space-before="1.02778in" text:min-label-width="0.3125in"/>
        <style:text-properties fo:font-family="Arial" style:font-family-generic="swiss" style:font-pitch="variable" fo:font-size="100%"/>
      </text:list-level-style-bullet>
      <text:list-level-style-bullet text:level="4" text:bullet-char="•">
        <style:list-level-properties text:space-before="1.52778in" text:min-label-width="0.3125in"/>
        <style:text-properties fo:font-family="Arial" style:font-family-generic="swiss" style:font-pitch="variable" fo:font-size="100%"/>
      </text:list-level-style-bullet>
      <text:list-level-style-bullet text:level="5" text:bullet-char="•">
        <style:list-level-properties text:space-before="2.02778in" text:min-label-width="0.3125in"/>
        <style:text-properties fo:font-family="Arial" style:font-family-generic="swiss" style:font-pitch="variable" fo:font-size="100%"/>
      </text:list-level-style-bullet>
      <text:list-level-style-bullet text:level="6" text:bullet-char="•">
        <style:list-level-properties text:space-before="2.52778in" text:min-label-width="0.3125in"/>
        <style:text-properties fo:font-family="Arial" style:font-family-generic="swiss" style:font-pitch="variable" fo:font-size="100%"/>
      </text:list-level-style-bullet>
      <text:list-level-style-bullet text:level="7" text:bullet-char="•">
        <style:list-level-properties text:space-before="3.02778in" text:min-label-width="0.3125in"/>
        <style:text-properties fo:font-family="Arial" style:font-family-generic="swiss" style:font-pitch="variable" fo:font-size="100%"/>
      </text:list-level-style-bullet>
      <text:list-level-style-bullet text:level="8" text:bullet-char="•">
        <style:list-level-properties text:space-before="3.52778in" text:min-label-width="0.3125in"/>
        <style:text-properties fo:font-family="Arial" style:font-family-generic="swiss" style:font-pitch="variable" fo:font-size="100%"/>
      </text:list-level-style-bullet>
      <text:list-level-style-bullet text:level="9" text:bullet-char="•">
        <style:list-level-properties text:space-before="4.02778in" text:min-label-width="0.31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37497in" text:min-label-width="0.18749in"/>
        <style:text-properties fo:font-family="Arial" style:font-family-generic="swiss" style:font-pitch="variable" fo:font-size="100%"/>
      </text:list-level-style-bullet>
      <text:list-level-style-bullet text:level="3" text:bullet-char="•">
        <style:list-level-properties text:space-before="0.87497in" text:min-label-width="0.18749in"/>
        <style:text-properties fo:font-family="Arial" style:font-family-generic="swiss" style:font-pitch="variable" fo:font-size="100%"/>
      </text:list-level-style-bullet>
      <text:list-level-style-bullet text:level="4" text:bullet-char="•">
        <style:list-level-properties text:space-before="1.37497in" text:min-label-width="0.18749in"/>
        <style:text-properties fo:font-family="Arial" style:font-family-generic="swiss" style:font-pitch="variable" fo:font-size="100%"/>
      </text:list-level-style-bullet>
      <text:list-level-style-bullet text:level="5" text:bullet-char="•">
        <style:list-level-properties text:space-before="1.87497in" text:min-label-width="0.18749in"/>
        <style:text-properties fo:font-family="Arial" style:font-family-generic="swiss" style:font-pitch="variable" fo:font-size="100%"/>
      </text:list-level-style-bullet>
      <text:list-level-style-bullet text:level="6" text:bullet-char="•">
        <style:list-level-properties text:space-before="2.37497in" text:min-label-width="0.18749in"/>
        <style:text-properties fo:font-family="Arial" style:font-family-generic="swiss" style:font-pitch="variable" fo:font-size="100%"/>
      </text:list-level-style-bullet>
      <text:list-level-style-bullet text:level="7" text:bullet-char="•">
        <style:list-level-properties text:space-before="2.87497in" text:min-label-width="0.18749in"/>
        <style:text-properties fo:font-family="Arial" style:font-family-generic="swiss" style:font-pitch="variable" fo:font-size="100%"/>
      </text:list-level-style-bullet>
      <text:list-level-style-bullet text:level="8" text:bullet-char="•">
        <style:list-level-properties text:space-before="3.37497in" text:min-label-width="0.18749in"/>
        <style:text-properties fo:font-family="Arial" style:font-family-generic="swiss" style:font-pitch="variable" fo:font-size="100%"/>
      </text:list-level-style-bullet>
      <text:list-level-style-bullet text:level="9" text:bullet-char="•">
        <style:list-level-properties text:space-before="3.87497in" text:min-label-width="0.18749in"/>
        <style:text-properties fo:font-family="Arial" style:font-family-generic="swiss" style:font-pitch="variable" fo:font-size="100%"/>
      </text:list-level-style-bullet>
    </text:list-style>
    <text:list-style style:name="a1707">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5in" text:min-label-width="0.18749in"/>
        <style:text-properties fo:font-family="Arial" fo:font-size="100%"/>
      </text:list-level-style-bullet>
      <text:list-level-style-bullet text:level="3" text:bullet-char="•">
        <style:list-level-properties text:space-before="1in" text:min-label-width="0.18749in"/>
        <style:text-properties fo:font-family="Arial" fo:font-size="100%"/>
      </text:list-level-style-bullet>
      <text:list-level-style-bullet text:level="4" text:bullet-char="•">
        <style:list-level-properties text:space-before="1.5in" text:min-label-width="0.18749in"/>
        <style:text-properties fo:font-family="Arial" fo:font-size="100%"/>
      </text:list-level-style-bullet>
      <text:list-level-style-bullet text:level="5" text:bullet-char="•">
        <style:list-level-properties text:space-before="2in" text:min-label-width="0.18749in"/>
        <style:text-properties fo:font-family="Arial" fo:font-size="100%"/>
      </text:list-level-style-bullet>
      <text:list-level-style-bullet text:level="6" text:bullet-char="•">
        <style:list-level-properties text:space-before="2.5in" text:min-label-width="0.18749in"/>
        <style:text-properties fo:font-family="Arial" fo:font-size="100%"/>
      </text:list-level-style-bullet>
      <text:list-level-style-bullet text:level="7" text:bullet-char="•">
        <style:list-level-properties text:space-before="3in" text:min-label-width="0.18749in"/>
        <style:text-properties fo:font-family="Arial" fo:font-size="100%"/>
      </text:list-level-style-bullet>
      <text:list-level-style-bullet text:level="8" text:bullet-char="•">
        <style:list-level-properties text:space-before="3.5in" text:min-label-width="0.18749in"/>
        <style:text-properties fo:font-family="Arial" fo:font-size="100%"/>
      </text:list-level-style-bullet>
      <text:list-level-style-bullet text:level="9" text:bullet-char="•">
        <style:list-level-properties text:space-before="4in" text:min-label-width="0.18749in"/>
        <style:text-properties fo:font-family="Arial" fo:font-size="100%"/>
      </text:list-level-style-bullet>
    </text:list-style>
    <text:list-style style:name="a1514">
      <text:list-level-style-number text:level="1" style:num-format="" style:num-list-format-name="">
        <style:list-level-properties text:space-before="0in"/>
      </text:list-level-style-number>
      <text:list-level-style-number text:level="2" style:num-format="" style:num-list-format-name="">
        <style:list-level-properties text:space-before="0.37497in"/>
      </text:list-level-style-number>
      <text:list-level-style-number text:level="3" style:num-format="" style:num-list-format-name="">
        <style:list-level-properties text:space-before="0.74994in"/>
      </text:list-level-style-number>
      <text:list-level-style-number text:level="4" style:num-format="" style:num-list-format-name="">
        <style:list-level-properties text:space-before="1.12491in"/>
      </text:list-level-style-number>
      <text:list-level-style-number text:level="5" style:num-format="" style:num-list-format-name="">
        <style:list-level-properties text:space-before="1.49988in"/>
      </text:list-level-style-number>
      <text:list-level-style-number text:level="6" style:num-format="" style:num-list-format-name="">
        <style:list-level-properties text:space-before="2.56251in"/>
      </text:list-level-style-number>
      <text:list-level-style-number text:level="7" style:num-format="" style:num-list-format-name="">
        <style:list-level-properties text:space-before="3.06251in"/>
      </text:list-level-style-number>
      <text:list-level-style-number text:level="8" style:num-format="" style:num-list-format-name="">
        <style:list-level-properties text:space-before="3.56251in"/>
      </text:list-level-style-number>
      <text:list-level-style-number text:level="9" style:num-format="" style:num-list-format-name="">
        <style:list-level-properties text:space-before="4.06251in"/>
      </text:list-level-style-number>
    </text:list-style>
    <text:list-style style:name="a1468">
      <text:list-level-style-bullet text:level="1" text:bullet-char="•">
        <style:list-level-properties text:space-before="0in" text:min-label-width="0.18749in"/>
        <style:text-properties fo:font-family="Arial" style:font-family-generic="swiss" style:font-pitch="variable" fo:font-size="100%"/>
      </text:list-level-style-bullet>
      <text:list-level-style-bullet text:level="2" text:bullet-char="•">
        <style:list-level-properties text:space-before="0.37497in" text:min-label-width="0.18749in"/>
        <style:text-properties fo:font-family="Arial" style:font-family-generic="swiss" style:font-pitch="variable" fo:font-size="100%"/>
      </text:list-level-style-bullet>
      <text:list-level-style-bullet text:level="3" text:bullet-char="•">
        <style:list-level-properties text:space-before="0.87497in" text:min-label-width="0.18749in"/>
        <style:text-properties fo:font-family="Arial" style:font-family-generic="swiss" style:font-pitch="variable" fo:font-size="100%"/>
      </text:list-level-style-bullet>
      <text:list-level-style-bullet text:level="4" text:bullet-char="•">
        <style:list-level-properties text:space-before="1.37497in" text:min-label-width="0.18749in"/>
        <style:text-properties fo:font-family="Arial" style:font-family-generic="swiss" style:font-pitch="variable" fo:font-size="100%"/>
      </text:list-level-style-bullet>
      <text:list-level-style-bullet text:level="5" text:bullet-char="•">
        <style:list-level-properties text:space-before="1.87497in" text:min-label-width="0.18749in"/>
        <style:text-properties fo:font-family="Arial" style:font-family-generic="swiss" style:font-pitch="variable" fo:font-size="100%"/>
      </text:list-level-style-bullet>
      <text:list-level-style-bullet text:level="6" text:bullet-char="•">
        <style:list-level-properties text:space-before="2.37497in" text:min-label-width="0.18749in"/>
        <style:text-properties fo:font-family="Arial" style:font-family-generic="swiss" style:font-pitch="variable" fo:font-size="100%"/>
      </text:list-level-style-bullet>
      <text:list-level-style-bullet text:level="7" text:bullet-char="•">
        <style:list-level-properties text:space-before="2.87497in" text:min-label-width="0.18749in"/>
        <style:text-properties fo:font-family="Arial" style:font-family-generic="swiss" style:font-pitch="variable" fo:font-size="100%"/>
      </text:list-level-style-bullet>
      <text:list-level-style-bullet text:level="8" text:bullet-char="•">
        <style:list-level-properties text:space-before="3.37497in" text:min-label-width="0.18749in"/>
        <style:text-properties fo:font-family="Arial" style:font-family-generic="swiss" style:font-pitch="variable" fo:font-size="100%"/>
      </text:list-level-style-bullet>
      <text:list-level-style-bullet text:level="9" text:bullet-char="•">
        <style:list-level-properties text:space-before="3.87497in" text:min-label-width="0.18749in"/>
        <style:text-properties fo:font-family="Arial" style:font-family-generic="swiss" style:font-pitch="variable" fo:font-size="100%"/>
      </text:list-level-style-bullet>
    </text:list-style>
  </office:automatic-styles>
  <office:body>
    <office:presentation>
      <draw:page draw:name="Slide2" draw:style-name="a1341" draw:master-page-name="Master1-Layout2-cust-4_Title-Slide-Texture,-SBA-Only" presentation:presentation-page-layout-name="Master1-PPL2" draw:id="Slide-257">
        <draw:frame draw:id="id232" presentation:style-name="a1344" draw:name="Title 1" svg:x="1.25in" svg:y="1.67069in" svg:width="7.5in" svg:height="2.336in" presentation:class="title" presentation:placeholder="false">
          <draw:text-box>
            <text:p text:style-name="a1343" text:class-names="" text:cond-style-name=""><text:span text:style-name="a1342" text:class-names="">Boots to Business Module 3</text:span></text:p>
          </draw:text-box>
          <svg:title/>
          <svg:desc/>
        </draw:frame>
        <draw:frame draw:id="id233" presentation:style-name="a1351" draw:name="Text Placeholder 2" svg:x="1.25in" svg:y="4.15206in" svg:width="7.5in" svg:height="1.80035in" presentation:class="outline" presentation:placeholder="false">
          <draw:text-box>
            <text:list text:style-name="a1347">
              <text:list-item>
                <text:p text:style-name="a1346" text:class-names="" text:cond-style-name=""><text:span text:style-name="a1345" text:class-names="">Understanding Markets &amp; Your Competitive Space</text:span></text:p>
              </text:list-item>
            </text:list>
            <text:list text:style-name="a1350">
              <text:list-item>
                <text:p text:style-name="a1349" text:class-names="" text:cond-style-name=""><text:span text:style-name="a1348" text:class-names=""/></text:p>
              </text:list-item>
            </text:list>
          </draw:text-box>
          <svg:title/>
          <svg:desc/>
        </draw:frame>
        <draw:frame draw:id="id234" draw:style-name="a1354" draw:name="TextBox 2" svg:x="8.38481in" svg:y="5.66495in" svg:width="1.61875in" svg:height="0.38371in">
          <draw:text-box>
            <text:p text:style-name="a1353" text:class-names="" text:cond-style-name=""><text:span text:style-name="a1352" text:class-names="">Version 5.3</text:span></text:p>
          </draw:text-box>
          <svg:title/>
          <svg:desc/>
        </draw:frame>
        <presentation:notes draw:style-name="a1379">
          <draw:page-thumbnail draw:page-number="1" svg:x="1.54688in" svg:y="1.27083in" svg:width="4.57292in" svg:height="3.43056in" presentation:class="page" draw:id="id235" presentation:style-name="a1355" draw:name="Slide Image Placeholder 1">
            <svg:title/>
            <svg:desc/>
          </draw:page-thumbnail>
          <draw:frame draw:id="id236" presentation:style-name="a1378" draw:name="Notes Placeholder 2" svg:x="0.76667in" svg:y="4.89271in" svg:width="6.13333in" svg:height="4.00313in" presentation:class="notes" presentation:placeholder="false">
            <draw:text-box>
              <text:p text:style-name="a1357" text:class-names="" text:cond-style-name=""><text:span text:style-name="a1356" text:class-names="">Instructor Notes:</text:span></text:p>
              <text:p text:style-name="a1359" text:class-names="" text:cond-style-name=""><text:span text:style-name="a1358" text:class-names=""/></text:p>
              <text:list text:style-name="a1362">
                <text:list-item>
                  <text:p text:style-name="a1361" text:class-names="" text:cond-style-name=""><text:span text:style-name="a1360" text:class-names="">Begin by recapping of what was talked about in the previous two modules.<text:s text:c="1"/></text:span></text:p>
                </text:list-item>
              </text:list>
              <text:list text:style-name="a1365">
                <text:list-item>
                  <text:p text:style-name="a1364" text:class-names="" text:cond-style-name=""><text:span text:style-name="a1363" text:class-names="">We have completed a basic introduction to entrepreneurship and talked about where to look for ideas and how you figure out if that idea can be turned into a business concept.<text:s text:c="1"/></text:span></text:p>
                </text:list-item>
              </text:list>
              <text:list text:style-name="a1368">
                <text:list-item>
                  <text:p text:style-name="a1367" text:class-names="" text:cond-style-name=""><text:span text:style-name="a1366" text:class-names="">Now, we need to figure out who you are going to sell that product or service to and begin to think about your potential competition.</text:span></text:p>
                </text:list-item>
              </text:list>
              <text:p text:style-name="a1370" text:class-names="" text:cond-style-name=""><text:span text:style-name="a1369" text:class-names=""/></text:p>
              <text:p text:style-name="a1375" text:class-names="" text:cond-style-name=""><text:span text:style-name="a1371" text:class-names="">Business Model Canvas:<text:s text:c="1"/></text:span><text:span text:style-name="a1372" text:class-names="">At the end of the module the students will work on filling out the<text:s text:c="1"/></text:span><text:span text:style-name="a1373" text:class-names="">Customer Segments, Channels, and Customer Relationships<text:s text:c="1"/></text:span><text:span text:style-name="a1374" text:class-names="">sections of their Business Model Canvas (Page 56 &amp; 57 in the Printed workbook, page 192 in the Virtual workbook).</text:span></text:p>
              <text:p text:style-name="a1377" text:class-names="" text:cond-style-name=""><text:span text:style-name="a1376" text:class-names=""/></text:p>
            </draw:text-box>
            <svg:title/>
            <svg:desc/>
          </draw:frame>
        </presentation:notes>
      </draw:page>
      <draw:page draw:name="Slide3" draw:style-name="a1380" draw:master-page-name="Master1-Layout9-cust-Title-only" presentation:presentation-page-layout-name="Master1-PPL9" draw:id="Slide-258">
        <draw:frame draw:id="id237" presentation:style-name="a1383" draw:name="Title 3" svg:x="1.30303in" svg:y="0.40138in" svg:width="7.2018in" svg:height="0.79856in" presentation:class="title" presentation:placeholder="false">
          <draw:text-box>
            <text:p text:style-name="a1382" text:class-names="" text:cond-style-name=""><text:span text:style-name="a1381" text:class-names="">Objectives</text:span></text:p>
          </draw:text-box>
          <svg:title/>
          <svg:desc/>
        </draw:frame>
        <draw:frame draw:id="id238" draw:style-name="a1399" draw:name="Content Placeholder 3" svg:x="0.6875in" svg:y="1.22667in" svg:width="8.625in" svg:height="5.37029in">
          <draw:text-box>
            <text:list text:style-name="a1387">
              <text:list-item>
                <text:p text:style-name="a1386" text:class-names="" text:cond-style-name=""><text:span text:style-name="a1384" text:class-names="">Understand</text:span><text:span text:style-name="a1385" text:class-names=""> how to conduct market research, the importance of market research, and the basics of competitive strategy/analysis.​</text:span></text:p>
              </text:list-item>
            </text:list>
            <text:list text:style-name="a1390">
              <text:list-item>
                <text:p text:style-name="a1389" text:class-names="" text:cond-style-name=""><text:span text:style-name="a1388" text:class-names="">Additionally:​</text:span></text:p>
              </text:list-item>
            </text:list>
            <text:list text:style-name="a1393">
              <text:list-item>
                <text:list text:style-name="a1393">
                  <text:list-item>
                    <text:p text:style-name="a1392" text:class-names="" text:cond-style-name=""><text:span text:style-name="a1391" text:class-names="">Understand ways to conduct low-cost customer validation and market research.​</text:span></text:p>
                  </text:list-item>
                </text:list>
              </text:list-item>
            </text:list>
            <text:list text:style-name="a1396">
              <text:list-item>
                <text:list text:style-name="a1396">
                  <text:list-item>
                    <text:p text:style-name="a1395" text:class-names="" text:cond-style-name=""><text:span text:style-name="a1394" text:class-names="">Understand how to evaluate an industry.​</text:span></text:p>
                  </text:list-item>
                </text:list>
              </text:list-item>
            </text:list>
            <text:p text:style-name="a1398" text:class-names="" text:cond-style-name=""><text:span text:style-name="a1397" text:class-names=""/></text:p>
          </draw:text-box>
          <svg:title/>
          <svg:desc/>
        </draw:frame>
        <presentation:notes draw:style-name="a1411">
          <draw:page-thumbnail draw:page-number="2" svg:x="1.54688in" svg:y="1.27083in" svg:width="4.57292in" svg:height="3.43056in" presentation:class="page" draw:id="id239" presentation:style-name="a1400" draw:name="Slide Image Placeholder 1">
            <svg:title/>
            <svg:desc/>
          </draw:page-thumbnail>
          <draw:frame draw:id="id240" presentation:style-name="a1410" draw:name="Notes Placeholder 2" svg:x="0.76667in" svg:y="4.89271in" svg:width="6.13333in" svg:height="4.00313in" presentation:class="notes" presentation:placeholder="false">
            <draw:text-box>
              <text:p text:style-name="a1402" text:class-names="" text:cond-style-name=""><text:span text:style-name="a1401" text:class-names="">Instructor Notes:</text:span></text:p>
              <text:p text:style-name="a1404" text:class-names="" text:cond-style-name=""><text:span text:style-name="a1403" text:class-names=""/></text:p>
              <text:p text:style-name="a1407" text:class-names="" text:cond-style-name=""><text:span text:style-name="a1405" text:class-names="">Module Learning Objective(s):<text:s text:c="1"/></text:span><text:span text:style-name="a1406" text:class-names="">These do not need to be expanded upon other than to ensure that the students understand what the module will cover.</text:span></text:p>
              <text:p text:style-name="a1409" text:class-names="" text:cond-style-name=""><text:span text:style-name="a1408" text:class-names=""/></text:p>
            </draw:text-box>
            <svg:title/>
            <svg:desc/>
          </draw:frame>
        </presentation:notes>
      </draw:page>
      <draw:page draw:name="Slide4" draw:style-name="a1412" draw:master-page-name="Master1-Layout9-cust-Title-only" presentation:presentation-page-layout-name="Master1-PPL9" draw:id="Slide-259">
        <draw:frame draw:id="id241" presentation:style-name="a1415" draw:name="Title 3" svg:x="1.30303in" svg:y="0.40138in" svg:width="7.2018in" svg:height="0.79856in" presentation:class="title" presentation:placeholder="false">
          <draw:text-box>
            <text:p text:style-name="a1414" text:class-names="" text:cond-style-name=""><text:span text:style-name="a1413" text:class-names="">Agenda</text:span></text:p>
          </draw:text-box>
          <svg:title/>
          <svg:desc/>
        </draw:frame>
        <draw:frame draw:id="id242" draw:style-name="a1439" draw:name="Content Placeholder 3" svg:x="0.6875in" svg:y="1.43764in" svg:width="8.625in" svg:height="4.86276in">
          <draw:text-box>
            <text:list text:style-name="a1421">
              <text:list-item>
                <text:p text:style-name="a1420" text:class-names="" text:cond-style-name=""><text:span text:style-name="a1416" text:class-names="">Understanding<text:s text:c="1"/></text:span><text:span text:style-name="a1417" text:class-names="">Markets</text:span><text:span text:style-name="a1418" text:class-names=""> vs<text:s text:c="1"/></text:span><text:span text:style-name="a1419" text:class-names="">Industries​</text:span></text:p>
              </text:list-item>
            </text:list>
            <text:list text:style-name="a1424">
              <text:list-item>
                <text:p text:style-name="a1423" text:class-names="" text:cond-style-name=""><text:span text:style-name="a1422" text:class-names="">Market Analysis​</text:span></text:p>
              </text:list-item>
            </text:list>
            <text:list text:style-name="a1427">
              <text:list-item>
                <text:p text:style-name="a1426" text:class-names="" text:cond-style-name=""><text:span text:style-name="a1425" text:class-names="">Industry Analysis​</text:span></text:p>
              </text:list-item>
            </text:list>
            <text:list text:style-name="a1430">
              <text:list-item>
                <text:p text:style-name="a1429" text:class-names="" text:cond-style-name=""><text:span text:style-name="a1428" text:class-names="">Competitive Strategy​</text:span></text:p>
              </text:list-item>
            </text:list>
            <text:list text:style-name="a1433">
              <text:list-item>
                <text:p text:style-name="a1432" text:class-names="" text:cond-style-name=""><text:span text:style-name="a1431" text:class-names="">Marketing Plan​</text:span></text:p>
              </text:list-item>
            </text:list>
            <text:list text:style-name="a1436">
              <text:list-item>
                <text:p text:style-name="a1435" text:class-names="" text:cond-style-name=""><text:span text:style-name="a1434" text:class-names="">Government Contracting</text:span></text:p>
              </text:list-item>
            </text:list>
            <text:p text:style-name="a1438" text:class-names="" text:cond-style-name=""><text:span text:style-name="a1437" text:class-names=""/></text:p>
          </draw:text-box>
          <svg:title/>
          <svg:desc/>
        </draw:frame>
        <presentation:notes draw:style-name="a1454">
          <draw:page-thumbnail draw:page-number="3" svg:x="1.54688in" svg:y="1.27083in" svg:width="4.57292in" svg:height="3.43056in" presentation:class="page" draw:id="id243" presentation:style-name="a1440" draw:name="Slide Image Placeholder 1">
            <svg:title/>
            <svg:desc/>
          </draw:page-thumbnail>
          <draw:frame draw:id="id244" presentation:style-name="a1453" draw:name="Notes Placeholder 2" svg:x="0.76667in" svg:y="4.89271in" svg:width="6.13333in" svg:height="4.00313in" presentation:class="notes" presentation:placeholder="false">
            <draw:text-box>
              <text:p text:style-name="a1442" text:class-names="" text:cond-style-name=""><text:span text:style-name="a1441" text:class-names="">Instructor Notes:</text:span></text:p>
              <text:p text:style-name="a1444" text:class-names="" text:cond-style-name=""><text:span text:style-name="a1443" text:class-names=""/></text:p>
              <text:list text:style-name="a1447">
                <text:list-item>
                  <text:p text:style-name="a1446" text:class-names="" text:cond-style-name=""><text:span text:style-name="a1445" text:class-names="">You do not need to expand on these too much, these are the topics that will be covered in this module.<text:s text:c="1"/></text:span></text:p>
                </text:list-item>
              </text:list>
              <text:list text:style-name="a1450">
                <text:list-item>
                  <text:p text:style-name="a1449" text:class-names="" text:cond-style-name=""><text:span text:style-name="a1448" text:class-names="">We will start by talking about the difference between markets and industries and then go into more depth on the analysis of both and finish by beginning to talk (very briefly) about starting to determine your competitive strategy.</text:span></text:p>
                </text:list-item>
              </text:list>
              <text:p text:style-name="a1452" text:class-names="" text:cond-style-name=""><text:span text:style-name="a1451" text:class-names=""/></text:p>
            </draw:text-box>
            <svg:title/>
            <svg:desc/>
          </draw:frame>
        </presentation:notes>
      </draw:page>
      <draw:page draw:name="Slide5" draw:style-name="a1455" draw:master-page-name="Master1-Layout9-cust-Title-only" presentation:presentation-page-layout-name="Master1-PPL9" draw:id="Slide-260">
        <draw:frame draw:id="id245" presentation:style-name="a1458" draw:name="Title 8" svg:x="1.30303in" svg:y="0.40138in" svg:width="7.2018in" svg:height="0.79856in" presentation:class="title" presentation:placeholder="false">
          <draw:text-box>
            <text:p text:style-name="a1457" text:class-names="" text:cond-style-name=""><text:span text:style-name="a1456" text:class-names="">The Big Picture</text:span></text:p>
          </draw:text-box>
          <svg:title/>
          <svg:desc/>
        </draw:frame>
        <draw:frame draw:id="id246" draw:style-name="a1480" draw:name="Content Placeholder 3" svg:x="0.6875in" svg:y="1.22667in" svg:width="8.625in" svg:height="5.37029in">
          <draw:text-box>
            <text:list text:style-name="a1462">
              <text:list-item>
                <text:p text:style-name="a1461" text:class-names="" text:cond-style-name=""><text:span text:style-name="a1459" text:class-names="">Identify Target Market</text:span><text:span text:style-name="a1460" text:class-names="">​</text:span></text:p>
              </text:list-item>
            </text:list>
            <text:list text:style-name="a1465">
              <text:list-item>
                <text:list text:style-name="a1465">
                  <text:list-item>
                    <text:p text:style-name="a1464" text:class-names="" text:cond-style-name=""><text:span text:style-name="a1463" text:class-names="">Conduct market research (size, behavior)​</text:span></text:p>
                  </text:list-item>
                </text:list>
              </text:list-item>
            </text:list>
            <text:list text:style-name="a1468">
              <text:list-item>
                <text:list text:style-name="a1468">
                  <text:list-item>
                    <text:p text:style-name="a1467" text:class-names="" text:cond-style-name=""><text:span text:style-name="a1466" text:class-names="">Set sales projections​</text:span></text:p>
                  </text:list-item>
                </text:list>
              </text:list-item>
            </text:list>
            <text:list text:style-name="a1471">
              <text:list-item>
                <text:p text:style-name="a1470" text:class-names="" text:cond-style-name=""><text:span text:style-name="a1469" text:class-names="">Identify Competitive Industry​</text:span></text:p>
              </text:list-item>
            </text:list>
            <text:list text:style-name="a1474">
              <text:list-item>
                <text:list text:style-name="a1474">
                  <text:list-item>
                    <text:p text:style-name="a1473" text:class-names="" text:cond-style-name=""><text:span text:style-name="a1472" text:class-names="">Analyze key competitors​</text:span></text:p>
                  </text:list-item>
                </text:list>
              </text:list-item>
            </text:list>
            <text:list text:style-name="a1477">
              <text:list-item>
                <text:list text:style-name="a1477">
                  <text:list-item>
                    <text:p text:style-name="a1476" text:class-names="" text:cond-style-name=""><text:span text:style-name="a1475" text:class-names="">Formulate competitive strategy</text:span></text:p>
                  </text:list-item>
                </text:list>
              </text:list-item>
            </text:list>
            <text:p text:style-name="a1479" text:class-names="" text:cond-style-name=""><text:span text:style-name="a1478" text:class-names=""/></text:p>
          </draw:text-box>
          <svg:title/>
          <svg:desc/>
        </draw:frame>
        <presentation:notes draw:style-name="a1507">
          <draw:page-thumbnail draw:page-number="4" svg:x="1.54688in" svg:y="1.27083in" svg:width="4.57292in" svg:height="3.43056in" presentation:class="page" draw:id="id247" presentation:style-name="a1481" draw:name="Slide Image Placeholder 1">
            <svg:title/>
            <svg:desc/>
          </draw:page-thumbnail>
          <draw:frame draw:id="id248" presentation:style-name="a1506" draw:name="Notes Placeholder 2" svg:x="0.76667in" svg:y="4.89271in" svg:width="6.13333in" svg:height="4.00313in" presentation:class="notes" presentation:placeholder="false">
            <draw:text-box>
              <text:p text:style-name="a1483" text:class-names="" text:cond-style-name=""><text:span text:style-name="a1482" text:class-names="">Instructor Notes:</text:span></text:p>
              <text:p text:style-name="a1485" text:class-names="" text:cond-style-name=""><text:span text:style-name="a1484" text:class-names=""/></text:p>
              <text:list text:style-name="a1488">
                <text:list-item>
                  <text:p text:style-name="a1487" text:class-names="" text:cond-style-name=""><text:span text:style-name="a1486" text:class-names="">After defining the two topics you want to bring it back to the big picture and talk about why we conduct market research and industry analysis. From this slide we will start to go into detail on both topics.</text:span></text:p>
                </text:list-item>
              </text:list>
              <text:list text:style-name="a1491">
                <text:list-item>
                  <text:p text:style-name="a1490" text:class-names="" text:cond-style-name=""><text:span text:style-name="a1489" text:class-names="">In this slide instructors should provide two to three specific examples, i.e.:<text:s text:c="1"/></text:span></text:p>
                </text:list-item>
              </text:list>
              <text:list text:style-name="a1494">
                <text:list-item>
                  <text:list text:style-name="a1494">
                    <text:list-item>
                      <text:p text:style-name="a1493" text:class-names="" text:cond-style-name=""><text:span text:style-name="a1492" text:class-names="">Pizza Shop</text:span></text:p>
                    </text:list-item>
                  </text:list>
                </text:list-item>
              </text:list>
              <text:list text:style-name="a1497">
                <text:list-item>
                  <text:list text:style-name="a1497">
                    <text:list-item>
                      <text:p text:style-name="a1496" text:class-names="" text:cond-style-name=""><text:span text:style-name="a1495" text:class-names="">Bike Shop</text:span></text:p>
                    </text:list-item>
                  </text:list>
                </text:list-item>
              </text:list>
              <text:list text:style-name="a1500">
                <text:list-item>
                  <text:list text:style-name="a1500">
                    <text:list-item>
                      <text:p text:style-name="a1499" text:class-names="" text:cond-style-name=""><text:span text:style-name="a1498" text:class-names="">Local Example</text:span></text:p>
                    </text:list-item>
                  </text:list>
                </text:list-item>
              </text:list>
              <text:list text:style-name="a1503">
                <text:list-item>
                  <text:list text:style-name="a1503">
                    <text:list-item>
                      <text:p text:style-name="a1502" text:class-names="" text:cond-style-name=""><text:span text:style-name="a1501" text:class-names="">Example from Class</text:span></text:p>
                    </text:list-item>
                  </text:list>
                </text:list-item>
              </text:list>
              <text:p text:style-name="a1505" text:class-names="" text:cond-style-name=""><text:span text:style-name="a1504" text:class-names=""/></text:p>
            </draw:text-box>
            <svg:title/>
            <svg:desc/>
          </draw:frame>
        </presentation:notes>
      </draw:page>
      <draw:page draw:name="Slide7" draw:style-name="a1508" draw:master-page-name="Master1-Layout11-cust-Comparison,-header" presentation:presentation-page-layout-name="Master1-PPL11" draw:id="Slide-262">
        <draw:frame draw:id="id249" draw:style-name="a1511" draw:name="Slide Number Placeholder 3" svg:x="4.89868in" svg:y="6.77418in" svg:width="0.51437in" svg:height="0.39931in">
          <draw:text-box>
            <text:p text:style-name="a1510" text:class-names="" text:cond-style-name=""><text:span text:style-name="a1509" text:class-names=""><text:page-number style:num-format="1" text:fixed="false"/></text:span></text:p>
          </draw:text-box>
          <svg:title/>
          <svg:desc/>
        </draw:frame>
        <draw:frame draw:id="id250" presentation:style-name="a1515" draw:name="Text Placeholder 5" svg:x="0.6376in" svg:y="1.68205in" svg:width="4.23047in" svg:height="0.64185in" presentation:class="outline" presentation:placeholder="false">
          <draw:text-box>
            <text:list text:style-name="a1514">
              <text:list-item>
                <text:p text:style-name="a1513" text:class-names="" text:cond-style-name=""><text:span text:style-name="a1512" text:class-names="">The Market = Customers</text:span></text:p>
              </text:list-item>
            </text:list>
          </draw:text-box>
          <svg:title/>
          <svg:desc/>
        </draw:frame>
        <draw:frame draw:id="id251" presentation:style-name="a1532" draw:name="Content Placeholder 6" svg:x="0.7267in" svg:y="2.51402in" svg:width="4.07026in" svg:height="3.84085in" presentation:class="outline" presentation:placeholder="false">
          <draw:text-box>
            <text:list text:style-name="a1518">
              <text:list-item>
                <text:list text:style-name="a1518">
                  <text:list-item>
                    <text:p text:style-name="a1517" text:class-names="" text:cond-style-name=""><text:span text:style-name="a1516" text:class-names="">Customers are the ones that give you the money​</text:span></text:p>
                  </text:list-item>
                </text:list>
              </text:list-item>
            </text:list>
            <text:list text:style-name="a1521">
              <text:list-item>
                <text:list text:style-name="a1521">
                  <text:list-item>
                    <text:p text:style-name="a1520" text:class-names="" text:cond-style-name=""><text:span text:style-name="a1519" text:class-names="">May be different than those that end up using your product (otherwise called End Users)​</text:span></text:p>
                  </text:list-item>
                </text:list>
              </text:list-item>
            </text:list>
            <text:list text:style-name="a1528">
              <text:list-item>
                <text:list text:style-name="a1528">
                  <text:list-item>
                    <text:p text:style-name="a1527" text:class-names="" text:cond-style-name=""><text:span text:style-name="a1522" text:class-names="">Example: Toyota Automotive dealers are Toyota’s </text:span><text:span text:style-name="a1523" text:class-names="">customers</text:span><text:span text:style-name="a1524" text:class-names="">, people buying the cars are </text:span><text:span text:style-name="a1525" text:class-names="">end users</text:span><text:span text:style-name="a1526" text:class-names=""> ​</text:span></text:p>
                  </text:list-item>
                </text:list>
              </text:list-item>
            </text:list>
            <text:list text:style-name="a1531">
              <text:list-item>
                <text:p text:style-name="a1530" text:class-names="" text:cond-style-name=""><text:span text:style-name="a1529" text:class-names=""/></text:p>
              </text:list-item>
            </text:list>
          </draw:text-box>
          <svg:title/>
          <svg:desc/>
        </draw:frame>
        <draw:frame draw:id="id252" presentation:style-name="a1536" draw:name="Text Placeholder 7" svg:x="5.12121in" svg:y="1.68205in" svg:width="4.23047in" svg:height="0.64185in" presentation:class="outline" presentation:placeholder="false">
          <draw:text-box>
            <text:list text:style-name="a1535">
              <text:list-item>
                <text:p text:style-name="a1534" text:class-names="" text:cond-style-name=""><text:span text:style-name="a1533" text:class-names="">The Industry = Other sellers</text:span></text:p>
              </text:list-item>
            </text:list>
          </draw:text-box>
          <svg:title/>
          <svg:desc/>
        </draw:frame>
        <draw:frame draw:id="id253" presentation:style-name="a1543" draw:name="Content Placeholder 8" svg:x="5.2103in" svg:y="2.51402in" svg:width="4.07026in" svg:height="3.84085in" presentation:class="outline" presentation:placeholder="false">
          <draw:text-box>
            <text:list text:style-name="a1539">
              <text:list-item>
                <text:p text:style-name="a1538" text:class-names="" text:cond-style-name=""><text:span text:style-name="a1537" text:class-names="">Includes competitors, suppliers, and other support sales companies (distribution, packaging, etc.)</text:span></text:p>
              </text:list-item>
            </text:list>
            <text:list text:style-name="a1542">
              <text:list-item>
                <text:p text:style-name="a1541" text:class-names="" text:cond-style-name=""><text:span text:style-name="a1540" text:class-names=""/></text:p>
              </text:list-item>
            </text:list>
          </draw:text-box>
          <svg:title/>
          <svg:desc/>
        </draw:frame>
        <draw:frame draw:id="id254" presentation:style-name="a1546" draw:name="Title 4" svg:x="1.30303in" svg:y="0.40138in" svg:width="7.2018in" svg:height="0.79856in" presentation:class="title" presentation:placeholder="false">
          <draw:text-box>
            <text:p text:style-name="a1545" text:class-names="" text:cond-style-name=""><text:span text:style-name="a1544" text:class-names="">Some Quick Distinctions</text:span></text:p>
          </draw:text-box>
          <svg:title/>
          <svg:desc/>
        </draw:frame>
        <presentation:notes draw:style-name="a1561">
          <draw:page-thumbnail draw:page-number="5" svg:x="1.54688in" svg:y="1.27083in" svg:width="4.57292in" svg:height="3.43056in" presentation:class="page" draw:id="id255" presentation:style-name="a1547" draw:name="Slide Image Placeholder 1">
            <svg:title/>
            <svg:desc/>
          </draw:page-thumbnail>
          <draw:frame draw:id="id256" presentation:style-name="a1560" draw:name="Notes Placeholder 2" svg:x="0.76667in" svg:y="4.89271in" svg:width="6.13333in" svg:height="4.00313in" presentation:class="notes" presentation:placeholder="false">
            <draw:text-box>
              <text:p text:style-name="a1549" text:class-names="" text:cond-style-name=""><text:span text:style-name="a1548" text:class-names="">Instructor Notes:</text:span></text:p>
              <text:p text:style-name="a1551" text:class-names="" text:cond-style-name=""><text:span text:style-name="a1550" text:class-names=""/></text:p>
              <text:list text:style-name="a1554">
                <text:list-item>
                  <text:p text:style-name="a1553" text:class-names="" text:cond-style-name=""><text:span text:style-name="a1552" text:class-names="">You want to start by defining very generally the difference between “Market” and “Industry”. Many of the students will have heard both terms but will not understand them. For this intro class we define The Market as “Customers” and The Industry as “Other Sellers”</text:span></text:p>
                </text:list-item>
              </text:list>
              <text:list text:style-name="a1557">
                <text:list-item>
                  <text:p text:style-name="a1556" text:class-names="" text:cond-style-name=""><text:span text:style-name="a1555" text:class-names="">Use this to validate your business plan and help to determine if there is a legitimate demand the market for your product or service</text:span></text:p>
                </text:list-item>
              </text:list>
              <text:p text:style-name="a1559" text:class-names="" text:cond-style-name=""><text:span text:style-name="a1558" text:class-names=""/></text:p>
            </draw:text-box>
            <svg:title/>
            <svg:desc/>
          </draw:frame>
        </presentation:notes>
      </draw:page>
      <draw:page draw:name="Slide8" draw:style-name="a1562" draw:master-page-name="Master1-Layout8-cust-Title-and-Content-with-Subtitle" presentation:presentation-page-layout-name="Master1-PPL8" draw:id="Slide-263">
        <draw:frame draw:id="id257" presentation:style-name="a1579" draw:name="Content Placeholder 1" svg:x="0.6875in" svg:y="2.09798in" svg:width="8.625in" svg:height="4.07644in" presentation:class="outline" presentation:placeholder="false">
          <draw:text-box>
            <text:list text:style-name="a1565">
              <text:list-item>
                <text:p text:style-name="a1564" text:class-names="" text:cond-style-name=""><text:span text:style-name="a1563" text:class-names="">Market size</text:span></text:p>
              </text:list-item>
            </text:list>
            <text:list text:style-name="a1568">
              <text:list-item>
                <text:p text:style-name="a1567" text:class-names="" text:cond-style-name=""><text:span text:style-name="a1566" text:class-names="">Demographics</text:span></text:p>
              </text:list-item>
            </text:list>
            <text:list text:style-name="a1571">
              <text:list-item>
                <text:p text:style-name="a1570" text:class-names="" text:cond-style-name=""><text:span text:style-name="a1569" text:class-names="">Geographic</text:span></text:p>
              </text:list-item>
            </text:list>
            <text:list text:style-name="a1574">
              <text:list-item>
                <text:p text:style-name="a1573" text:class-names="" text:cond-style-name=""><text:span text:style-name="a1572" text:class-names="">Trends</text:span></text:p>
              </text:list-item>
            </text:list>
            <text:list text:style-name="a1578">
              <text:list-item>
                <text:p text:style-name="a1577" text:class-names="" text:cond-style-name=""><text:span text:style-name="a1575" text:class-names="">Psychographics</text:span><text:span text:style-name="a1576" text:class-names=""/></text:p>
              </text:list-item>
            </text:list>
          </draw:text-box>
          <svg:title/>
          <svg:desc/>
        </draw:frame>
        <draw:frame draw:id="id258" draw:style-name="a1582" draw:name="Slide Number Placeholder 3" svg:x="4.89868in" svg:y="6.77418in" svg:width="0.51437in" svg:height="0.39931in">
          <draw:text-box>
            <text:p text:style-name="a1581" text:class-names="" text:cond-style-name=""><text:span text:style-name="a1580" text:class-names=""><text:page-number style:num-format="1" text:fixed="false"/></text:span></text:p>
          </draw:text-box>
          <svg:title/>
          <svg:desc/>
        </draw:frame>
        <draw:frame draw:id="id259" presentation:style-name="a1586" draw:name="Title 4" svg:x="1.30303in" svg:y="0.40138in" svg:width="7.2018in" svg:height="0.79856in" presentation:class="title" presentation:placeholder="false">
          <draw:text-box>
            <text:p text:style-name="a1585" text:class-names="" text:cond-style-name=""><text:span text:style-name="a1583" text:class-names="">Market Analysis:<text:s text:c="1"/></text:span><text:span text:style-name="a1584" text:class-names="">Your Objectives</text:span></text:p>
          </draw:text-box>
          <svg:title/>
          <svg:desc/>
        </draw:frame>
        <draw:custom-shape svg:x="4.2289in" svg:y="1.02552in" svg:width="1.03299in" svg:height="4.39931in" draw:id="id260" draw:style-name="a1589" draw:name="Rectangle 11">
          <svg:title/>
          <svg:desc/>
          <text:p text:style-name="a1588" text:class-names="" text:cond-style-name=""><text:span text:style-name="a1587" text:class-names="">}</text:span></text:p>
          <draw:enhanced-geometry xmlns:dr3d="urn:oasis:names:tc:opendocument:xmlns:dr3d:1.0" draw:type="non-primitive" svg:viewBox="0 0 21600 21600" draw:enhanced-path="M 0 0 L 21600 0 21600 21600 0 21600 Z N"/>
        </draw:custom-shape>
        <draw:frame draw:id="id261" draw:style-name="a1594" draw:name="TextBox 5" svg:x="5.60056in" svg:y="2.98979in" svg:width="3.37326in" svg:height="0.91456in">
          <draw:text-box>
            <text:p text:style-name="a1591" text:class-names="" text:cond-style-name=""><text:span text:style-name="a1590" text:class-names="">Helps evaluate<text:s text:c="1"/></text:span></text:p>
            <text:p text:style-name="a1593" text:class-names="" text:cond-style-name=""><text:span text:style-name="a1592" text:class-names="">Potential customers</text:span></text:p>
          </draw:text-box>
          <svg:title/>
          <svg:desc/>
        </draw:frame>
        <presentation:notes draw:style-name="a1653">
          <draw:page-thumbnail draw:page-number="6" svg:x="1.54688in" svg:y="1.27083in" svg:width="4.57292in" svg:height="3.43056in" presentation:class="page" draw:id="id262" presentation:style-name="a1595" draw:name="Slide Image Placeholder 1">
            <svg:title/>
            <svg:desc/>
          </draw:page-thumbnail>
          <draw:frame draw:id="id263" presentation:style-name="a1652" draw:name="Notes Placeholder 2" svg:x="0.76667in" svg:y="4.89271in" svg:width="6.13333in" svg:height="4.00313in" presentation:class="notes" presentation:placeholder="false">
            <draw:text-box>
              <text:p text:style-name="a1597" text:class-names="" text:cond-style-name=""><text:span text:style-name="a1596" text:class-names="">Instructor Notes:</text:span></text:p>
              <text:p text:style-name="a1599" text:class-names="" text:cond-style-name=""><text:span text:style-name="a1598" text:class-names=""/></text:p>
              <text:list text:style-name="a1602">
                <text:list-item>
                  <text:p text:style-name="a1601" text:class-names="" text:cond-style-name=""><text:span text:style-name="a1600" text:class-names="">On this slide we move into talking about what entrepreneurs want to accomplish with market research.<text:s text:c="1"/></text:span></text:p>
                </text:list-item>
              </text:list>
              <text:list text:style-name="a1605">
                <text:list-item>
                  <text:p text:style-name="a1604" text:class-names="" text:cond-style-name=""><text:span text:style-name="a1603" text:class-names="">You can refer back module 1 when we discussed that entrepreneurs are actually risk adverse.<text:s text:c="1"/></text:span></text:p>
                </text:list-item>
              </text:list>
              <text:list text:style-name="a1608">
                <text:list-item>
                  <text:p text:style-name="a1607" text:class-names="" text:cond-style-name=""><text:span text:style-name="a1606" text:class-names="">This is the reason why they are risk adverse – they do all of this research and by the time they are ready to launch they have mitigated a great deal of risk involved.</text:span></text:p>
                </text:list-item>
              </text:list>
              <text:p text:style-name="a1610" text:class-names="" text:cond-style-name=""><text:span text:style-name="a1609" text:class-names=""/></text:p>
              <text:p text:style-name="a1612" text:class-names="" text:cond-style-name=""><text:span text:style-name="a1611" text:class-names="">It’s crucial to understand your consumer base from the outset. Market research lets you reduce risks even while your business is still just a gleam in your eye.</text:span></text:p>
              <text:p text:style-name="a1614" text:class-names="" text:cond-style-name=""><text:span text:style-name="a1613" text:class-names="">Gather demographic information to better understand opportunities and limitations for gaining customers. This could include population data on age, wealth, family, interests, or anything else that’s relevant for your business.</text:span></text:p>
              <text:p text:style-name="a1616" text:class-names="" text:cond-style-name=""><text:span text:style-name="a1615" text:class-names="">Then answer these questions to get a good sense of your market.</text:span></text:p>
              <text:list text:style-name="a1620">
                <text:list-item>
                  <text:list text:style-name="a1620">
                    <text:list-item>
                      <text:p text:style-name="a1619" text:class-names="" text:cond-style-name=""><text:span text:style-name="a1617" text:class-names="">Demand: </text:span><text:span text:style-name="a1618" text:class-names="">Is there a desire for your product or service?</text:span></text:p>
                    </text:list-item>
                  </text:list>
                </text:list-item>
              </text:list>
              <text:list text:style-name="a1624">
                <text:list-item>
                  <text:list text:style-name="a1624">
                    <text:list-item>
                      <text:p text:style-name="a1623" text:class-names="" text:cond-style-name=""><text:span text:style-name="a1621" text:class-names="">Market size:</text:span><text:span text:style-name="a1622" text:class-names=""> How many people would be interested in your offering?</text:span></text:p>
                    </text:list-item>
                  </text:list>
                </text:list-item>
              </text:list>
              <text:list text:style-name="a1628">
                <text:list-item>
                  <text:list text:style-name="a1628">
                    <text:list-item>
                      <text:p text:style-name="a1627" text:class-names="" text:cond-style-name=""><text:span text:style-name="a1625" text:class-names="">Economic indicators: </text:span><text:span text:style-name="a1626" text:class-names="">What is the income range and employment rate?</text:span></text:p>
                    </text:list-item>
                  </text:list>
                </text:list-item>
              </text:list>
              <text:list text:style-name="a1632">
                <text:list-item>
                  <text:list text:style-name="a1632">
                    <text:list-item>
                      <text:p text:style-name="a1631" text:class-names="" text:cond-style-name=""><text:span text:style-name="a1629" text:class-names="">Location: </text:span><text:span text:style-name="a1630" text:class-names="">Where do your customers live and where can your business reach?</text:span></text:p>
                    </text:list-item>
                  </text:list>
                </text:list-item>
              </text:list>
              <text:list text:style-name="a1636">
                <text:list-item>
                  <text:list text:style-name="a1636">
                    <text:list-item>
                      <text:p text:style-name="a1635" text:class-names="" text:cond-style-name=""><text:span text:style-name="a1633" text:class-names="">Market saturation:</text:span><text:span text:style-name="a1634" text:class-names=""> How many similar options are already available to consumers?</text:span></text:p>
                    </text:list-item>
                  </text:list>
                </text:list-item>
              </text:list>
              <text:list text:style-name="a1640">
                <text:list-item>
                  <text:list text:style-name="a1640">
                    <text:list-item>
                      <text:p text:style-name="a1639" text:class-names="" text:cond-style-name=""><text:span text:style-name="a1637" text:class-names="">Pricing:</text:span><text:span text:style-name="a1638" text:class-names=""> What do potential customers pay for these alternatives?</text:span></text:p>
                    </text:list-item>
                  </text:list>
                </text:list-item>
              </text:list>
              <text:p text:style-name="a1642" text:class-names="" text:cond-style-name=""><text:span text:style-name="a1641" text:class-names="">You’ll also want to keep up with the latest small business trends. It’s important to gain a sense of the specific market share that will impact your profits.</text:span></text:p>
              <text:p text:style-name="a1644" text:class-names="" text:cond-style-name=""><text:span text:style-name="a1643" text:class-names="">You can do market research using existing sources, or you can do the research yourself and go direct to consumers.</text:span></text:p>
              <text:p text:style-name="a1649" text:class-names="" text:cond-style-name=""><text:span text:style-name="a1645" text:class-names="">Psychographics</text:span><text:span text:style-name="a1646" text:class-names=""><text:s text:c="1"/>– Definition:<text:s text:c="1"/></text:span><text:span text:style-name="a1647" text:class-names="">the study and classification of people according to their attitudes, aspirations, and other psychological criteria, especially in market research.</text:span><text:span text:style-name="a1648" text:class-names=""><text:s text:c="1"/></text:span></text:p>
              <text:p text:style-name="a1651" text:class-names="" text:cond-style-name=""><text:span text:style-name="a1650" text:class-names=""/></text:p>
            </draw:text-box>
            <svg:title/>
            <svg:desc/>
          </draw:frame>
        </presentation:notes>
      </draw:page>
      <draw:page draw:name="Slide6" draw:style-name="a1654" draw:master-page-name="Master1-Layout19-cust-Title,-Vertical-Icon,-Header,-Paragraph" presentation:presentation-page-layout-name="Master1-PPL19" draw:id="Slide-261">
        <draw:frame draw:id="id264" presentation:style-name="a1658" draw:name="Text Placeholder 4" svg:x="2.38086in" svg:y="2.17294in" svg:width="6.60856in" svg:height="0.5567in" presentation:class="outline" presentation:placeholder="false">
          <draw:text-box>
            <text:list text:style-name="a1657">
              <text:list-item>
                <text:p text:style-name="a1656" text:class-names="" text:cond-style-name=""><text:span text:style-name="a1655" text:class-names="">Who, very precisely, are the customers?</text:span></text:p>
              </text:list-item>
            </text:list>
          </draw:text-box>
          <svg:title/>
          <svg:desc/>
        </draw:frame>
        <draw:frame draw:id="id265" presentation:style-name="a1663" draw:name="Text Placeholder 7" svg:x="2.49684in" svg:y="3.54491in" svg:width="6.60856in" svg:height="0.5567in" presentation:class="outline" presentation:placeholder="false">
          <draw:text-box>
            <text:list text:style-name="a1662">
              <text:list-item>
                <text:p text:style-name="a1661" text:class-names="" text:cond-style-name=""><text:span text:style-name="a1659" text:class-names="">How strong an incentive do customers have to give you their money? <text:s text:c="1"/>Where is the pain?</text:span><text:span text:style-name="a1660" text:class-names=""/></text:p>
              </text:list-item>
            </text:list>
          </draw:text-box>
          <svg:title/>
          <svg:desc/>
        </draw:frame>
        <draw:frame draw:id="id266" presentation:style-name="a1670" draw:name="Text Placeholder 10" svg:x="2.49684in" svg:y="5.05878in" svg:width="6.60856in" svg:height="1.10163in" presentation:class="outline" presentation:placeholder="false">
          <draw:text-box>
            <text:list text:style-name="a1666">
              <text:list-item>
                <text:p text:style-name="a1665" text:class-names="" text:cond-style-name=""><text:span text:style-name="a1664" text:class-names="">What evidence can you provide that the market will grow? Is there sustainable demand?<text:s text:c="1"/></text:span></text:p>
              </text:list-item>
            </text:list>
            <text:list text:style-name="a1669">
              <text:list-item>
                <text:p text:style-name="a1668" text:class-names="" text:cond-style-name=""><text:span text:style-name="a1667" text:class-names=""/></text:p>
              </text:list-item>
            </text:list>
          </draw:text-box>
          <svg:title/>
          <svg:desc/>
        </draw:frame>
        <draw:frame draw:id="id267" presentation:style-name="a1675" draw:name="Title 3" svg:x="1.30303in" svg:y="0.40138in" svg:width="7.2018in" svg:height="0.79856in" presentation:class="title" presentation:placeholder="false">
          <draw:text-box>
            <text:p text:style-name="a1674" text:class-names="" text:cond-style-name=""><text:span text:style-name="a1671" text:class-names="">Market Analysis:<text:s text:c="1"/></text:span><text:span text:style-name="a1672" text:class-names="">Key Questions</text:span><text:span text:style-name="a1673" text:class-names=""/></text:p>
          </draw:text-box>
          <svg:title/>
          <svg:desc/>
        </draw:frame>
        <draw:frame draw:id="id268" presentation:style-name="a1676" draw:name="Picture 2" svg:x="0.88194in" svg:y="1.84159in" svg:width="1.16457in" svg:height="1.22423in" style:rel-width="scale" style:rel-height="scale" presentation:class="graphic" presentation:placeholder="false">
          <draw:image xlink:href="media/image1.jpeg" xlink:type="simple" xlink:show="embed" xlink:actuate="onLoad"/>
          <office:event-listeners>
            <presentation:event-listener script:event-name="dom:click" presentation:action="show" xlink:href="http://images.google.com/imgres?imgurl=http://www.ktjusd.k12.ca.us/Parent%20Resources/Images/Parent&amp;Child.jpg&amp;imgrefurl=http://www.ktjusd.k12.ca.us/Parent%20Resources/parent_resources.html&amp;usg=__RdUSg7I89XOf028DvGAnWA3-Y2Y=&amp;h=1024&amp;w=1024&amp;sz=80&amp;hl=en&amp;start=22&amp;um=1&amp;tbnid=8XYgdgO-L8f8eM:&amp;tbnh=150&amp;tbnw=150&amp;prev=/images?q=parent+child&amp;ndsp=18&amp;hl=en&amp;rlz=1T4GGLL_enUS332US333&amp;sa=N&amp;start=18&amp;um=1" xlink:type="simple" xlink:show="embed" xlink:actuate="onRequest"/>
          </office:event-listeners>
          <svg:title/>
          <svg:desc>http://t0.gstatic.com/images?q=tbn:8XYgdgO-L8f8eM:http://www.ktjusd.k12.ca.us/Parent%2520Resources/Images/Parent%26Child.jpg</svg:desc>
        </draw:frame>
        <draw:frame draw:id="id269" presentation:style-name="a1677" draw:name="Picture 12" svg:x="0.88194in" svg:y="3.36888in" svg:width="1.16457in" svg:height="1.22423in" style:rel-width="scale" style:rel-height="scale" presentation:class="graphic" presentation:placeholder="false">
          <draw:image xlink:href="media/image2.jpeg" xlink:type="simple" xlink:show="embed" xlink:actuate="onLoad"/>
          <svg:title/>
          <svg:desc/>
        </draw:frame>
        <draw:frame draw:id="id270" presentation:style-name="a1678" draw:name="Picture 2" svg:x="0.88194in" svg:y="4.9317in" svg:width="1.16456in" svg:height="1.22423in" style:rel-width="scale" style:rel-height="scale" presentation:class="graphic" presentation:placeholder="false">
          <draw:image xlink:href="media/image3.jpeg" xlink:type="simple" xlink:show="embed" xlink:actuate="onLoad"/>
          <office:event-listeners>
            <presentation:event-listener script:event-name="dom:click" presentation:action="show" xlink:href="http://images.google.com/imgres?imgurl=http://trak.in/wp-content/uploads/2007/09/indian-growth-graph-best.gif&amp;imgrefurl=http://trak.in/tags/business/2007/09/20/indian-rupee-sensex-growth-economy/&amp;usg=___p04WJXYQjfO7SN3gQXB9t6dMLE=&amp;h=346&amp;w=347&amp;sz=142&amp;hl=en&amp;start=3&amp;um=1&amp;tbnid=jmEnwAjOOJeY-M:&amp;tbnh=120&amp;tbnw=120&amp;prev=/images?q=market+growth&amp;hl=en&amp;rlz=1T4GGLL_enUS332US333&amp;sa=N&amp;um=1" xlink:type="simple" xlink:show="embed" xlink:actuate="onRequest"/>
          </office:event-listeners>
          <svg:title/>
          <svg:desc>http://t3.gstatic.com/images?q=tbn:jmEnwAjOOJeY-M:http://trak.in/wp-content/uploads/2007/09/indian-growth-graph-best.gif</svg:desc>
        </draw:frame>
        <presentation:notes draw:style-name="a1696">
          <draw:page-thumbnail draw:page-number="7" svg:x="1.54688in" svg:y="1.27083in" svg:width="4.57292in" svg:height="3.43056in" presentation:class="page" draw:id="id271" presentation:style-name="a1679" draw:name="Slide Image Placeholder 1">
            <svg:title/>
            <svg:desc/>
          </draw:page-thumbnail>
          <draw:frame draw:id="id272" presentation:style-name="a1695" draw:name="Notes Placeholder 2" svg:x="0.76667in" svg:y="4.89271in" svg:width="6.13333in" svg:height="4.00313in" presentation:class="notes" presentation:placeholder="false">
            <draw:text-box>
              <text:p text:style-name="a1681" text:class-names="" text:cond-style-name=""><text:span text:style-name="a1680" text:class-names="">Instructor Notes:</text:span></text:p>
              <text:p text:style-name="a1683" text:class-names="" text:cond-style-name=""><text:span text:style-name="a1682" text:class-names=""/></text:p>
              <text:list text:style-name="a1686">
                <text:list-item>
                  <text:p text:style-name="a1685" text:class-names="" text:cond-style-name=""><text:span text:style-name="a1684" text:class-names="">This is one of the most important things to get out of market research.<text:s text:c="1"/></text:span></text:p>
                </text:list-item>
              </text:list>
              <text:list text:style-name="a1689">
                <text:list-item>
                  <text:p text:style-name="a1688" text:class-names="" text:cond-style-name=""><text:span text:style-name="a1687" text:class-names="">You should talk about how you need to figure out who you are going to be selling your product or service to. It’s important to ensure that you try to get this as precisely as possible – i.e.: Males, 18-24, who live in Central New York and make more than $50,000/year. <text:s text:c="1"/></text:span></text:p>
                </text:list-item>
              </text:list>
              <text:list text:style-name="a1692">
                <text:list-item>
                  <text:p text:style-name="a1691" text:class-names="" text:cond-style-name=""><text:span text:style-name="a1690" text:class-names="">For those who have ideas, ask them to talk about who their customer might be.</text:span></text:p>
                </text:list-item>
              </text:list>
              <text:p text:style-name="a1694" text:class-names="" text:cond-style-name=""><text:span text:style-name="a1693" text:class-names=""/></text:p>
            </draw:text-box>
            <svg:title/>
            <svg:desc/>
          </draw:frame>
        </presentation:notes>
      </draw:page>
      <draw:page draw:name="Slide9" draw:style-name="a1697" draw:master-page-name="Master1-Layout9-cust-Title-only" presentation:presentation-page-layout-name="Master1-PPL9" draw:id="Slide-264">
        <draw:frame draw:id="id273" draw:style-name="a1698" draw:name="Picture 2" svg:x="0.7692in" svg:y="3.89435in" svg:width="5.2066in" svg:height="2.99653in" style:rel-width="scale" style:rel-height="scale">
          <draw:image xlink:href="media/image4.jpeg" xlink:type="simple" xlink:show="embed" xlink:actuate="onLoad"/>
          <svg:title/>
          <svg:desc/>
        </draw:frame>
        <draw:frame draw:id="id274" draw:style-name="a1701" draw:name="Slide Number Placeholder 1" svg:x="4.89868in" svg:y="6.77418in" svg:width="0.51437in" svg:height="0.39931in">
          <draw:text-box>
            <text:p text:style-name="a1700" text:class-names="" text:cond-style-name=""><text:span text:style-name="a1699" text:class-names=""><text:page-number style:num-format="1" text:fixed="false"/></text:span></text:p>
          </draw:text-box>
          <svg:title/>
          <svg:desc/>
        </draw:frame>
        <draw:frame draw:id="id275" presentation:style-name="a1704" draw:name="Title 3" svg:x="1.30303in" svg:y="0.40138in" svg:width="7.2018in" svg:height="0.79856in" presentation:class="title" presentation:placeholder="false">
          <draw:text-box>
            <text:p text:style-name="a1703" text:class-names="" text:cond-style-name=""><text:span text:style-name="a1702" text:class-names="">Market Research</text:span></text:p>
          </draw:text-box>
          <svg:title/>
          <svg:desc/>
        </draw:frame>
        <draw:frame draw:id="id276" draw:style-name="a1726" draw:name="Content Placeholder 2" svg:x="0.51698in" svg:y="1.34612in" svg:width="4.63889in" svg:height="5.27951in">
          <draw:text-box>
            <text:list text:style-name="a1707">
              <text:list-item>
                <text:p text:style-name="a1706" text:class-names="" text:cond-style-name=""><text:span text:style-name="a1705" text:class-names="">Secondary Market Research</text:span></text:p>
              </text:list-item>
            </text:list>
            <text:list text:style-name="a1710">
              <text:list-item>
                <text:list text:style-name="a1710">
                  <text:list-item>
                    <text:p text:style-name="a1709" text:class-names="" text:cond-style-name=""><text:span text:style-name="a1708" text:class-names="">Company Annual Reports</text:span></text:p>
                  </text:list-item>
                </text:list>
              </text:list-item>
            </text:list>
            <text:list text:style-name="a1713">
              <text:list-item>
                <text:list text:style-name="a1713">
                  <text:list-item>
                    <text:p text:style-name="a1712" text:class-names="" text:cond-style-name=""><text:span text:style-name="a1711" text:class-names="">Google (Search Engines)</text:span></text:p>
                  </text:list-item>
                </text:list>
              </text:list-item>
            </text:list>
            <text:list text:style-name="a1716">
              <text:list-item>
                <text:list text:style-name="a1716">
                  <text:list-item>
                    <text:p text:style-name="a1715" text:class-names="" text:cond-style-name=""><text:span text:style-name="a1714" text:class-names="">News Reports</text:span></text:p>
                  </text:list-item>
                </text:list>
              </text:list-item>
            </text:list>
            <text:list text:style-name="a1719">
              <text:list-item>
                <text:p text:style-name="a1718" text:class-names="" text:cond-style-name=""><text:span text:style-name="a1717" text:class-names=""/></text:p>
              </text:list-item>
            </text:list>
            <text:list text:style-name="a1722">
              <text:list-item>
                <text:list text:style-name="a1722">
                  <text:list-item>
                    <text:p text:style-name="a1721" text:class-names="" text:cond-style-name=""><text:span text:style-name="a1720" text:class-names=""/></text:p>
                  </text:list-item>
                </text:list>
              </text:list-item>
            </text:list>
            <text:list text:style-name="a1725">
              <text:list-item>
                <text:p text:style-name="a1724" text:class-names="" text:cond-style-name=""><text:span text:style-name="a1723" text:class-names=""/></text:p>
              </text:list-item>
            </text:list>
          </draw:text-box>
          <svg:title/>
          <svg:desc/>
        </draw:frame>
        <draw:frame draw:id="id277" draw:style-name="a1760" draw:name="Content Placeholder 1" svg:x="5.24584in" svg:y="1.25459in" svg:width="4.63889in" svg:height="5.27951in">
          <draw:text-box>
            <text:list text:style-name="a1729">
              <text:list-item>
                <text:p text:style-name="a1728" text:class-names="" text:cond-style-name=""><text:span text:style-name="a1727" text:class-names="">Primary Market <text:line-break/>Research<text:s text:c="1"/></text:span></text:p>
              </text:list-item>
            </text:list>
            <text:list text:style-name="a1732">
              <text:list-item>
                <text:list text:style-name="a1732">
                  <text:list-item>
                    <text:p text:style-name="a1731" text:class-names="" text:cond-style-name=""><text:span text:style-name="a1730" text:class-names="">Focus Groups</text:span></text:p>
                  </text:list-item>
                </text:list>
              </text:list-item>
            </text:list>
            <text:list text:style-name="a1735">
              <text:list-item>
                <text:list text:style-name="a1735">
                  <text:list-item>
                    <text:p text:style-name="a1734" text:class-names="" text:cond-style-name=""><text:span text:style-name="a1733" text:class-names="">Interviews</text:span></text:p>
                  </text:list-item>
                </text:list>
              </text:list-item>
            </text:list>
            <text:list text:style-name="a1738">
              <text:list-item>
                <text:list text:style-name="a1738">
                  <text:list-item>
                    <text:p text:style-name="a1737" text:class-names="" text:cond-style-name=""><text:span text:style-name="a1736" text:class-names="">Surveys</text:span></text:p>
                  </text:list-item>
                </text:list>
              </text:list-item>
            </text:list>
            <text:list text:style-name="a1741">
              <text:list-item>
                <text:list text:style-name="a1741">
                  <text:list-item>
                    <text:p text:style-name="a1740" text:class-names="" text:cond-style-name=""><text:span text:style-name="a1739" text:class-names="">Blogs</text:span></text:p>
                  </text:list-item>
                </text:list>
              </text:list-item>
            </text:list>
            <text:list text:style-name="a1744">
              <text:list-item>
                <text:list text:style-name="a1744">
                  <text:list-item>
                    <text:p text:style-name="a1743" text:class-names="" text:cond-style-name=""><text:span text:style-name="a1742" text:class-names=""/></text:p>
                  </text:list-item>
                </text:list>
              </text:list-item>
            </text:list>
            <text:list text:style-name="a1747">
              <text:list-item>
                <text:list text:style-name="a1747">
                  <text:list-item>
                    <text:p text:style-name="a1746" text:class-names="" text:cond-style-name=""><text:span text:style-name="a1745" text:class-names=""/></text:p>
                  </text:list-item>
                </text:list>
              </text:list-item>
            </text:list>
            <text:list text:style-name="a1750">
              <text:list-item>
                <text:p text:style-name="a1749" text:class-names="" text:cond-style-name=""><text:span text:style-name="a1748" text:class-names="">Test Marketing</text:span></text:p>
              </text:list-item>
            </text:list>
            <text:list text:style-name="a1753">
              <text:list-item>
                <text:list text:style-name="a1753">
                  <text:list-item>
                    <text:p text:style-name="a1752" text:class-names="" text:cond-style-name=""><text:span text:style-name="a1751" text:class-names="">Rapid Prototyping</text:span></text:p>
                  </text:list-item>
                </text:list>
              </text:list-item>
            </text:list>
            <text:list text:style-name="a1756">
              <text:list-item>
                <text:list text:style-name="a1756">
                  <text:list-item>
                    <text:p text:style-name="a1755" text:class-names="" text:cond-style-name=""><text:span text:style-name="a1754" text:class-names="">Market Product Sampling</text:span></text:p>
                  </text:list-item>
                </text:list>
              </text:list-item>
            </text:list>
            <text:list text:style-name="a1759">
              <text:list-item>
                <text:p text:style-name="a1758" text:class-names="" text:cond-style-name=""><text:span text:style-name="a1757" text:class-names=""/></text:p>
              </text:list-item>
            </text:list>
          </draw:text-box>
          <svg:title/>
          <svg:desc/>
        </draw:frame>
        <presentation:notes draw:style-name="a1786">
          <draw:page-thumbnail draw:page-number="8" svg:x="1.54688in" svg:y="1.27083in" svg:width="4.57292in" svg:height="3.43056in" presentation:class="page" draw:id="id278" presentation:style-name="a1761" draw:name="Slide Image Placeholder 1">
            <svg:title/>
            <svg:desc/>
          </draw:page-thumbnail>
          <draw:frame draw:id="id279" presentation:style-name="a1785" draw:name="Notes Placeholder 2" svg:x="0.76667in" svg:y="4.89271in" svg:width="6.13333in" svg:height="4.00313in" presentation:class="notes" presentation:placeholder="false">
            <draw:text-box>
              <text:p text:style-name="a1763" text:class-names="" text:cond-style-name=""><text:span text:style-name="a1762" text:class-names="">Instructor Notes:</text:span></text:p>
              <text:p text:style-name="a1765" text:class-names="" text:cond-style-name=""><text:span text:style-name="a1764" text:class-names=""/></text:p>
              <text:list text:style-name="a1768">
                <text:list-item>
                  <text:p text:style-name="a1767" text:class-names="" text:cond-style-name=""><text:span text:style-name="a1766" text:class-names="">Secondary research: you can use libraries, Google, databases, news outlets and other search engines to find as much information as you possibly can.<text:s text:c="1"/></text:span></text:p>
                </text:list-item>
              </text:list>
              <text:list text:style-name="a1771">
                <text:list-item>
                  <text:p text:style-name="a1770" text:class-names="" text:cond-style-name=""><text:span text:style-name="a1769" text:class-names="">You should keep in mind that you will not be able to find all of the information that you need in one place. You will have to draw from different sources to paint the picture or put the puzzle together.</text:span></text:p>
                </text:list-item>
              </text:list>
              <text:list text:style-name="a1774">
                <text:list-item>
                  <text:p text:style-name="a1773" text:class-names="" text:cond-style-name=""><text:span text:style-name="a1772" text:class-names="">Primary research: is the more time consuming research that you need to do. But, at the same time, it is the most useful and appropriate for what you are trying to do.<text:s text:c="1"/></text:span></text:p>
                </text:list-item>
              </text:list>
              <text:list text:style-name="a1777">
                <text:list-item>
                  <text:p text:style-name="a1776" text:class-names="" text:cond-style-name=""><text:span text:style-name="a1775" text:class-names="">At the end of the day, your entire business plan rests upon the shoulders of your primary research, and, in particular, your ability to prove that there is a market for what you’re trying to do.<text:s text:c="1"/></text:span></text:p>
                </text:list-item>
              </text:list>
              <text:list text:style-name="a1780">
                <text:list-item>
                  <text:p text:style-name="a1779" text:class-names="" text:cond-style-name=""><text:span text:style-name="a1778" text:class-names="">So the main focus will be of today will be on primary research and getting at the things that you’ll want to know!</text:span></text:p>
                </text:list-item>
              </text:list>
              <text:p text:style-name="a1782" text:class-names="" text:cond-style-name=""><text:span text:style-name="a1781" text:class-names=""/></text:p>
              <text:p text:style-name="a1784" text:class-names="" text:cond-style-name=""><text:span text:style-name="a1783" text:class-names=""/></text:p>
            </draw:text-box>
            <svg:title/>
            <svg:desc/>
          </draw:frame>
        </presentation:notes>
      </draw:page>
      <draw:page draw:name="Slide41" draw:style-name="a1787" draw:master-page-name="Master1-Layout9-cust-Title-only" presentation:presentation-page-layout-name="Master1-PPL9" draw:id="Slide-296">
        <draw:frame draw:id="id280" draw:style-name="a1790" draw:name="Slide Number Placeholder 1" svg:x="4.89868in" svg:y="6.77418in" svg:width="0.51437in" svg:height="0.39931in">
          <draw:text-box>
            <text:p text:style-name="a1789" text:class-names="" text:cond-style-name=""><text:span text:style-name="a1788" text:class-names=""><text:page-number style:num-format="1" text:fixed="false"/></text:span></text:p>
          </draw:text-box>
          <svg:title/>
          <svg:desc/>
        </draw:frame>
        <draw:frame draw:id="id281" presentation:style-name="a1794" draw:name="Title 2" svg:x="1.30303in" svg:y="0.40138in" svg:width="7.2018in" svg:height="0.79856in" presentation:class="title" presentation:placeholder="false">
          <draw:text-box>
            <text:p text:style-name="a1793" text:class-names="" text:cond-style-name=""><text:span text:style-name="a1791" text:class-names="">Free Market Research Sources</text:span><text:span text:style-name="a1792" text:class-names=""/></text:p>
          </draw:text-box>
          <svg:title/>
          <svg:desc/>
        </draw:frame>
        <draw:frame draw:id="id282" draw:name="Table 3" svg:x="0.38861in" svg:y="1.687in" svg:width="9.22277in" svg:height="3.96366in">
          <table:table table:style-name="a1795" table:template-name="{17292A2E-F333-43FB-9621-5CBBE7FDCDCB}" table:use-banding-columns-styles="false" table:use-banding-rows-styles="true" table:use-first-column-styles="false" table:use-first-row-styles="true" table:use-last-column-styles="false" table:use-last-row-styles="false">
            <table:table-column table:style-name="a1796" table:default-cell-style-name=""/>
            <table:table-column table:style-name="a1797" table:default-cell-style-name=""/>
            <table:table-column table:style-name="a1798" table:default-cell-style-name=""/>
            <table:table-row table:style-name="a1799" table:default-cell-style-name="">
              <table:table-cell table:style-name="a1803">
                <text:p text:style-name="a1802" text:class-names="" text:cond-style-name=""><text:span text:style-name="a1800" text:class-names="">Focus</text:span><text:span text:style-name="a1801" text:class-names=""/></text:p>
              </table:table-cell>
              <table:table-cell table:style-name="a1807">
                <text:p text:style-name="a1806" text:class-names="" text:cond-style-name=""><text:span text:style-name="a1804" text:class-names="">Goal</text:span><text:span text:style-name="a1805" text:class-names=""/></text:p>
              </table:table-cell>
              <table:table-cell table:style-name="a1811">
                <text:p text:style-name="a1810" text:class-names="" text:cond-style-name=""><text:span text:style-name="a1808" text:class-names="">Reference</text:span><text:span text:style-name="a1809" text:class-names=""/></text:p>
              </table:table-cell>
            </table:table-row>
            <table:table-row table:style-name="a1812" table:default-cell-style-name="">
              <table:table-cell table:style-name="a1816">
                <text:p text:style-name="a1815" text:class-names="" text:cond-style-name=""><text:span text:style-name="a1813" text:class-names="">General business statistics</text:span><text:span text:style-name="a1814" text:class-names=""/></text:p>
              </table:table-cell>
              <table:table-cell table:style-name="a1820">
                <text:p text:style-name="a1819" text:class-names="" text:cond-style-name=""><text:span text:style-name="a1817" text:class-names="">Find statistics on industries, business conditions.</text:span><text:span text:style-name="a1818" text:class-names=""/></text:p>
              </table:table-cell>
              <table:table-cell table:style-name="a1831">
                <text:list text:style-name="a1824">
                  <text:list-item>
                    <text:p text:style-name="a1823" text:class-names="" text:cond-style-name=""><text:span text:style-name="a1821" text:class-names=""><text:a xlink:href="https://www.census.gov/naics/" text:style-name="" text:visited-style-name="">NAICS</text:a></text:span><text:span text:style-name="a1822" text:class-names=""/></text:p>
                  </text:list-item>
                </text:list>
                <text:p text:style-name="a1827" text:class-names="" text:cond-style-name=""><text:span text:style-name="a1825" text:class-names=""><text:a xlink:href="https://www.usa.gov/census-data" text:style-name="" text:visited-style-name="">USA.gov Statistics</text:a></text:span><text:span text:style-name="a1826" text:class-names=""/></text:p>
                <text:p text:style-name="a1830" text:class-names="" text:cond-style-name=""><text:span text:style-name="a1828" text:class-names=""><text:a xlink:href="https://cbb.census.gov/cbb" text:style-name="" text:visited-style-name="">U.S. Census Business Builder</text:a></text:span><text:span text:style-name="a1829" text:class-names=""/></text:p>
              </table:table-cell>
            </table:table-row>
            <table:table-row table:style-name="a1832" table:default-cell-style-name="">
              <table:table-cell table:style-name="a1836">
                <text:p text:style-name="a1835" text:class-names="" text:cond-style-name=""><text:span text:style-name="a1833" text:class-names="">Consumer statistics</text:span><text:span text:style-name="a1834" text:class-names=""/></text:p>
              </table:table-cell>
              <table:table-cell table:style-name="a1840">
                <text:p text:style-name="a1839" text:class-names="" text:cond-style-name=""><text:span text:style-name="a1837" text:class-names="">Gain info on potential customers, consumer markets.</text:span><text:span text:style-name="a1838" text:class-names=""/></text:p>
              </table:table-cell>
              <table:table-cell table:style-name="a1848">
                <text:p text:style-name="a1843" text:class-names="" text:cond-style-name=""><text:span text:style-name="a1841" text:class-names=""><text:a xlink:href="https://www.federalreserve.gov/releases/G19/" text:style-name="" text:visited-style-name="">Consumer Credit Data</text:a></text:span><text:span text:style-name="a1842" text:class-names=""/></text:p>
                <text:list text:style-name="a1847">
                  <text:list-item>
                    <text:p text:style-name="a1846" text:class-names="" text:cond-style-name=""><text:span text:style-name="a1844" text:class-names=""><text:a xlink:href="https://www.cpsc.gov/research-and-reports-overview" text:style-name="" text:visited-style-name="">Consumer Product Safety</text:a></text:span><text:span text:style-name="a1845" text:class-names=""/></text:p>
                  </text:list-item>
                </text:list>
              </table:table-cell>
            </table:table-row>
            <table:table-row table:style-name="a1849" table:default-cell-style-name="">
              <table:table-cell table:style-name="a1853">
                <text:p text:style-name="a1852" text:class-names="" text:cond-style-name=""><text:span text:style-name="a1850" text:class-names="">Demographics</text:span><text:span text:style-name="a1851" text:class-names=""/></text:p>
              </table:table-cell>
              <table:table-cell table:style-name="a1857">
                <text:p text:style-name="a1856" text:class-names="" text:cond-style-name=""><text:span text:style-name="a1854" text:class-names="">Segment the population for targeting customers.</text:span><text:span text:style-name="a1855" text:class-names=""/></text:p>
              </table:table-cell>
              <table:table-cell table:style-name="a1864">
                <text:p text:style-name="a1860" text:class-names="" text:cond-style-name=""><text:span text:style-name="a1858" text:class-names=""><text:a xlink:href="https://data.census.gov/" text:style-name="" text:visited-style-name="">U.S. Census Bureau</text:a></text:span><text:span text:style-name="a1859" text:class-names=""/></text:p>
                <text:p text:style-name="a1863" text:class-names="" text:cond-style-name=""><text:span text:style-name="a1861" text:class-names=""><text:a xlink:href="https://www.bls.gov/bls/demographics.htm" text:style-name="" text:visited-style-name="">Bureau of Labor Statistics</text:a></text:span><text:span text:style-name="a1862" text:class-names=""/></text:p>
              </table:table-cell>
            </table:table-row>
            <table:table-row table:style-name="a1865" table:default-cell-style-name="">
              <table:table-cell table:style-name="a1869">
                <text:p text:style-name="a1868" text:class-names="" text:cond-style-name=""><text:span text:style-name="a1866" text:class-names="">Economic indicators</text:span><text:span text:style-name="a1867" text:class-names=""/></text:p>
              </table:table-cell>
              <table:table-cell table:style-name="a1873">
                <text:p text:style-name="a1872" text:class-names="" text:cond-style-name=""><text:span text:style-name="a1870" text:class-names="">Know unemployment rates, loans granted land more.</text:span><text:span text:style-name="a1871" text:class-names=""/></text:p>
              </table:table-cell>
              <table:table-cell table:style-name="a1882">
                <text:list text:style-name="a1877">
                  <text:list-item>
                    <text:p text:style-name="a1876" text:class-names="" text:cond-style-name=""><text:span text:style-name="a1874" text:class-names=""><text:a xlink:href="https://www.bls.gov/cpi/" text:style-name="" text:visited-style-name="">Consumer Price Index</text:a></text:span><text:span text:style-name="a1875" text:class-names=""/></text:p>
                  </text:list-item>
                </text:list>
                <text:list text:style-name="a1881">
                  <text:list-item>
                    <text:p text:style-name="a1880" text:class-names="" text:cond-style-name=""><text:span text:style-name="a1878" text:class-names=""><text:a xlink:href="https://www.bea.gov/" text:style-name="" text:visited-style-name="">Bureau of Economic Analysis</text:a></text:span><text:span text:style-name="a1879" text:class-names=""/></text:p>
                  </text:list-item>
                </text:list>
              </table:table-cell>
            </table:table-row>
            <table:table-row table:style-name="a1883" table:default-cell-style-name="">
              <table:table-cell table:style-name="a1887">
                <text:p text:style-name="a1886" text:class-names="" text:cond-style-name=""><text:span text:style-name="a1884" text:class-names="">Employment statistics</text:span><text:span text:style-name="a1885" text:class-names=""/></text:p>
              </table:table-cell>
              <table:table-cell table:style-name="a1892">
                <text:list text:style-name="a1891">
                  <text:list-item>
                    <text:p text:style-name="a1890" text:class-names="" text:cond-style-name=""><text:span text:style-name="a1888" text:class-names="">Dig deeper into employment trends for your market.</text:span><text:span text:style-name="a1889" text:class-names=""/></text:p>
                  </text:list-item>
                </text:list>
              </table:table-cell>
              <table:table-cell table:style-name="a1897">
                <text:list text:style-name="a1896">
                  <text:list-item>
                    <text:p text:style-name="a1895" text:class-names="" text:cond-style-name=""><text:span text:style-name="a1893" text:class-names=""><text:a xlink:href="https://stats.bls.gov/bls/employment.htm" text:style-name="" text:visited-style-name="">Employment and Unemployment Statistics</text:a></text:span><text:span text:style-name="a1894" text:class-names=""/></text:p>
                  </text:list-item>
                </text:list>
              </table:table-cell>
            </table:table-row>
          </table:table>
          <draw:image xlink:href="media/image5.png" xlink:type="simple" xlink:show="embed" xlink:actuate="onLoad"/>
          <svg:title/>
          <svg:desc/>
        </draw:frame>
      </draw:page>
      <draw:page draw:name="Slide42" draw:style-name="a1898" draw:master-page-name="Master1-Layout9-cust-Title-only" presentation:presentation-page-layout-name="Master1-PPL9" draw:id="Slide-297">
        <draw:frame draw:id="id283" draw:style-name="a1901" draw:name="Slide Number Placeholder 1" svg:x="4.89868in" svg:y="6.77418in" svg:width="0.51437in" svg:height="0.39931in">
          <draw:text-box>
            <text:p text:style-name="a1900" text:class-names="" text:cond-style-name=""><text:span text:style-name="a1899" text:class-names=""><text:page-number style:num-format="1" text:fixed="false"/></text:span></text:p>
          </draw:text-box>
          <svg:title/>
          <svg:desc/>
        </draw:frame>
        <draw:frame draw:id="id284" presentation:style-name="a1905" draw:name="Title 2" svg:x="1.30303in" svg:y="0.40138in" svg:width="7.2018in" svg:height="0.79856in" presentation:class="title" presentation:placeholder="false">
          <draw:text-box>
            <text:p text:style-name="a1904" text:class-names="" text:cond-style-name=""><text:span text:style-name="a1902" text:class-names="">Free Market Research Sources</text:span><text:span text:style-name="a1903" text:class-names=""/></text:p>
          </draw:text-box>
          <svg:title/>
          <svg:desc/>
        </draw:frame>
        <draw:frame draw:id="id285" draw:name="Table 3" svg:x="0.53218in" svg:y="1.61349in" svg:width="8.93564in" svg:height="4.49699in">
          <table:table table:style-name="a1906" table:template-name="{17292A2E-F333-43FB-9621-5CBBE7FDCDCB}" table:use-banding-columns-styles="false" table:use-banding-rows-styles="true" table:use-first-column-styles="false" table:use-first-row-styles="true" table:use-last-column-styles="false" table:use-last-row-styles="false">
            <table:table-column table:style-name="a1907" table:default-cell-style-name=""/>
            <table:table-column table:style-name="a1908" table:default-cell-style-name=""/>
            <table:table-column table:style-name="a1909" table:default-cell-style-name=""/>
            <table:table-row table:style-name="a1910" table:default-cell-style-name="">
              <table:table-cell table:style-name="a1914">
                <text:p text:style-name="a1913" text:class-names="" text:cond-style-name=""><text:span text:style-name="a1911" text:class-names="">Focus</text:span><text:span text:style-name="a1912" text:class-names=""/></text:p>
              </table:table-cell>
              <table:table-cell table:style-name="a1918">
                <text:p text:style-name="a1917" text:class-names="" text:cond-style-name=""><text:span text:style-name="a1915" text:class-names="">Goal</text:span><text:span text:style-name="a1916" text:class-names=""/></text:p>
              </table:table-cell>
              <table:table-cell table:style-name="a1922">
                <text:p text:style-name="a1921" text:class-names="" text:cond-style-name=""><text:span text:style-name="a1919" text:class-names="">Reference</text:span><text:span text:style-name="a1920" text:class-names=""/></text:p>
              </table:table-cell>
            </table:table-row>
            <table:table-row table:style-name="a1923" table:default-cell-style-name="">
              <table:table-cell table:style-name="a1927">
                <text:p text:style-name="a1926" text:class-names="" text:cond-style-name=""><text:span text:style-name="a1924" text:class-names="">Income statistics</text:span><text:span text:style-name="a1925" text:class-names=""/></text:p>
              </table:table-cell>
              <table:table-cell table:style-name="a1931">
                <text:p text:style-name="a1930" text:class-names="" text:cond-style-name=""><text:span text:style-name="a1928" text:class-names="">Pay your employees fair rates based on earnings data.</text:span><text:span text:style-name="a1929" text:class-names=""/></text:p>
              </table:table-cell>
              <table:table-cell table:style-name="a1940">
                <text:list text:style-name="a1935">
                  <text:list-item>
                    <text:p text:style-name="a1934" text:class-names="" text:cond-style-name=""><text:span text:style-name="a1932" text:class-names=""><text:a xlink:href="https://www.bls.gov/cps/earnings.htm" text:style-name="" text:visited-style-name="">Earnings by Occupation and Education</text:a></text:span><text:span text:style-name="a1933" text:class-names=""/></text:p>
                  </text:list-item>
                </text:list>
                <text:list text:style-name="a1939">
                  <text:list-item>
                    <text:p text:style-name="a1938" text:class-names="" text:cond-style-name=""><text:span text:style-name="a1936" text:class-names=""><text:a xlink:href="https://www.bls.gov/data/#employment" text:style-name="" text:visited-style-name="">Income Statistics</text:a></text:span><text:span text:style-name="a1937" text:class-names=""/></text:p>
                  </text:list-item>
                </text:list>
              </table:table-cell>
            </table:table-row>
            <table:table-row table:style-name="a1941" table:default-cell-style-name="">
              <table:table-cell table:style-name="a1945">
                <text:p text:style-name="a1944" text:class-names="" text:cond-style-name=""><text:span text:style-name="a1942" text:class-names="">Money and interest rates</text:span><text:span text:style-name="a1943" text:class-names=""/></text:p>
              </table:table-cell>
              <table:table-cell table:style-name="a1949">
                <text:p text:style-name="a1948" text:class-names="" text:cond-style-name=""><text:span text:style-name="a1946" text:class-names="">Keep money by mastering exchange and interest rates.</text:span><text:span text:style-name="a1947" text:class-names=""/></text:p>
              </table:table-cell>
              <table:table-cell table:style-name="a1958">
                <text:list text:style-name="a1953">
                  <text:list-item>
                    <text:p text:style-name="a1952" text:class-names="" text:cond-style-name=""><text:span text:style-name="a1950" text:class-names=""><text:a xlink:href="https://www.federalreserve.gov/releases/h15/" text:style-name="" text:visited-style-name="">Daily Interest Rates</text:a></text:span><text:span text:style-name="a1951" text:class-names=""/></text:p>
                  </text:list-item>
                </text:list>
                <text:list text:style-name="a1957">
                  <text:list-item>
                    <text:p text:style-name="a1956" text:class-names="" text:cond-style-name=""><text:span text:style-name="a1954" text:class-names=""><text:a xlink:href="https://www.federalreserve.gov/data.htm" text:style-name="" text:visited-style-name="">Money Statistics via Federal Reserve</text:a></text:span><text:span text:style-name="a1955" text:class-names=""/></text:p>
                  </text:list-item>
                </text:list>
              </table:table-cell>
            </table:table-row>
            <table:table-row table:style-name="a1959" table:default-cell-style-name="">
              <table:table-cell table:style-name="a1963">
                <text:p text:style-name="a1962" text:class-names="" text:cond-style-name=""><text:span text:style-name="a1960" text:class-names="">Production and sales statistics</text:span><text:span text:style-name="a1961" text:class-names=""/></text:p>
              </table:table-cell>
              <table:table-cell table:style-name="a1968">
                <text:list text:style-name="a1967">
                  <text:list-item>
                    <text:p text:style-name="a1966" text:class-names="" text:cond-style-name=""><text:span text:style-name="a1964" text:class-names="">Understand demand, costs and consumer spending.</text:span><text:span text:style-name="a1965" text:class-names=""/></text:p>
                  </text:list-item>
                </text:list>
              </table:table-cell>
              <table:table-cell table:style-name="a1977">
                <text:list text:style-name="a1972">
                  <text:list-item>
                    <text:p text:style-name="a1971" text:class-names="" text:cond-style-name=""><text:span text:style-name="a1969" text:class-names=""><text:a xlink:href="https://www.bea.gov/data/consumer-spending/main" text:style-name="" text:visited-style-name="">Consumer Spending</text:a></text:span><text:span text:style-name="a1970" text:class-names=""/></text:p>
                  </text:list-item>
                </text:list>
                <text:list text:style-name="a1976">
                  <text:list-item>
                    <text:p text:style-name="a1975" text:class-names="" text:cond-style-name=""><text:span text:style-name="a1973" text:class-names=""><text:a xlink:href="https://www.bea.gov/resources/learning-center/what-to-know-gdp" text:style-name="" text:visited-style-name="">Gross Domestic Product (GDP)</text:a></text:span><text:span text:style-name="a1974" text:class-names=""/></text:p>
                  </text:list-item>
                </text:list>
              </table:table-cell>
            </table:table-row>
            <table:table-row table:style-name="a1978" table:default-cell-style-name="">
              <table:table-cell table:style-name="a1982">
                <text:p text:style-name="a1981" text:class-names="" text:cond-style-name=""><text:span text:style-name="a1979" text:class-names="">Trade statistics</text:span><text:span text:style-name="a1980" text:class-names=""/></text:p>
              </table:table-cell>
              <table:table-cell table:style-name="a1987">
                <text:list text:style-name="a1986">
                  <text:list-item>
                    <text:p text:style-name="a1985" text:class-names="" text:cond-style-name=""><text:span text:style-name="a1983" text:class-names="">Track indicators of sales and market performance.</text:span><text:span text:style-name="a1984" text:class-names=""/></text:p>
                  </text:list-item>
                </text:list>
              </table:table-cell>
              <table:table-cell table:style-name="a1996">
                <text:list text:style-name="a1991">
                  <text:list-item>
                    <text:p text:style-name="a1990" text:class-names="" text:cond-style-name=""><text:span text:style-name="a1988" text:class-names=""><text:a xlink:href="https://www.bea.gov/data/economic-accounts/international#bop" text:style-name="" text:visited-style-name="">Balance of Payments</text:a></text:span><text:span text:style-name="a1989" text:class-names=""/></text:p>
                  </text:list-item>
                </text:list>
                <text:list text:style-name="a1995">
                  <text:list-item>
                    <text:p text:style-name="a1994" text:class-names="" text:cond-style-name=""><text:span text:style-name="a1992" text:class-names=""><text:a xlink:href="https://usatrade.census.gov/" text:style-name="" text:visited-style-name="">USA Trade Online</text:a></text:span><text:span text:style-name="a1993" text:class-names=""/></text:p>
                  </text:list-item>
                </text:list>
              </table:table-cell>
            </table:table-row>
            <table:table-row table:style-name="a1997" table:default-cell-style-name="">
              <table:table-cell table:style-name="a2001">
                <text:p text:style-name="a2000" text:class-names="" text:cond-style-name=""><text:span text:style-name="a1998" text:class-names="">Statistics of specific industries</text:span><text:span text:style-name="a1999" text:class-names=""/></text:p>
              </table:table-cell>
              <table:table-cell table:style-name="a2005">
                <text:p text:style-name="a2004" text:class-names="" text:cond-style-name=""><text:span text:style-name="a2002" text:class-names="">Use a wealth of federal agency data on industries.</text:span><text:span text:style-name="a2003" text:class-names=""/></text:p>
              </table:table-cell>
              <table:table-cell table:style-name="a2010">
                <text:list text:style-name="a2009">
                  <text:list-item>
                    <text:p text:style-name="a2008" text:class-names="" text:cond-style-name=""><text:span text:style-name="a2006" text:class-names=""><text:a xlink:href="https://www.census.gov/programs-surveys/susb.html" text:style-name="" text:visited-style-name="">Statistics of U.S. Businesses</text:a></text:span><text:span text:style-name="a2007" text:class-names=""/></text:p>
                  </text:list-item>
                </text:list>
              </table:table-cell>
            </table:table-row>
          </table:table>
          <draw:image xlink:href="media/image6.png" xlink:type="simple" xlink:show="embed" xlink:actuate="onLoad"/>
          <svg:title/>
          <svg:desc/>
        </draw:frame>
      </draw:page>
      <draw:page draw:name="Slide11" draw:style-name="a2011" draw:master-page-name="Master1-Layout10-cust-Comparison" presentation:presentation-page-layout-name="Master1-PPL10" draw:id="Slide-266">
        <draw:frame draw:id="id286" draw:style-name="a2014" draw:name="Slide Number Placeholder 1" svg:x="4.89868in" svg:y="6.77418in" svg:width="0.51437in" svg:height="0.39931in">
          <draw:text-box>
            <text:p text:style-name="a2013" text:class-names="" text:cond-style-name=""><text:span text:style-name="a2012" text:class-names=""><text:page-number style:num-format="1" text:fixed="false"/></text:span></text:p>
          </draw:text-box>
          <svg:title/>
          <svg:desc/>
        </draw:frame>
        <draw:frame draw:id="id287" presentation:style-name="a2027" draw:name="Content Placeholder 8" svg:x="0.7267in" svg:y="1.77049in" svg:width="4.07026in" svg:height="4.59257in" presentation:class="outline" presentation:placeholder="false">
          <draw:text-box>
            <text:list text:style-name="a2017">
              <text:list-item>
                <text:list text:style-name="a2017">
                  <text:list-item>
                    <text:p text:style-name="a2016" text:class-names="" text:cond-style-name=""><text:span text:style-name="a2015" text:class-names="">Let’s you get to know more about the customer, their wants, their behaviors, and their ability to pay</text:span></text:p>
                  </text:list-item>
                </text:list>
              </text:list-item>
            </text:list>
            <text:list text:style-name="a2020">
              <text:list-item>
                <text:list text:style-name="a2020">
                  <text:list-item>
                    <text:p text:style-name="a2019" text:class-names="" text:cond-style-name=""><text:span text:style-name="a2018" text:class-names="">Provides you with a chance to update and improve what you already do</text:span></text:p>
                  </text:list-item>
                </text:list>
              </text:list-item>
            </text:list>
            <text:list text:style-name="a2023">
              <text:list-item>
                <text:list text:style-name="a2023">
                  <text:list-item>
                    <text:p text:style-name="a2022" text:class-names="" text:cond-style-name=""><text:span text:style-name="a2021" text:class-names="">Allows you to have first contact with the customer, so they get to hear about you</text:span></text:p>
                  </text:list-item>
                </text:list>
              </text:list-item>
            </text:list>
            <text:list text:style-name="a2026">
              <text:list-item>
                <text:p text:style-name="a2025" text:class-names="" text:cond-style-name=""><text:span text:style-name="a2024" text:class-names=""/></text:p>
              </text:list-item>
            </text:list>
          </draw:text-box>
          <svg:title/>
          <svg:desc/>
        </draw:frame>
        <draw:frame draw:id="id288" presentation:style-name="a2040" draw:name="Content Placeholder 9" svg:x="5.20211in" svg:y="1.77049in" svg:width="4.07026in" svg:height="4.59257in" presentation:class="outline" presentation:placeholder="false">
          <draw:text-box>
            <text:list text:style-name="a2030">
              <text:list-item>
                <text:list text:style-name="a2030">
                  <text:list-item>
                    <text:p text:style-name="a2029" text:class-names="" text:cond-style-name=""><text:span text:style-name="a2028" text:class-names="">Provides you with more confidence and believability with other stakeholders</text:span></text:p>
                  </text:list-item>
                </text:list>
              </text:list-item>
            </text:list>
            <text:list text:style-name="a2033">
              <text:list-item>
                <text:list text:style-name="a2033">
                  <text:list-item>
                    <text:p text:style-name="a2032" text:class-names="" text:cond-style-name=""><text:span text:style-name="a2031" text:class-names="">Helps to reduce the overall risk in your business</text:span></text:p>
                  </text:list-item>
                </text:list>
              </text:list-item>
            </text:list>
            <text:list text:style-name="a2036">
              <text:list-item>
                <text:list text:style-name="a2036">
                  <text:list-item>
                    <text:p text:style-name="a2035" text:class-names="" text:cond-style-name=""><text:span text:style-name="a2034" text:class-names="">And is really the true value of the business plan</text:span></text:p>
                  </text:list-item>
                </text:list>
              </text:list-item>
            </text:list>
            <text:list text:style-name="a2039">
              <text:list-item>
                <text:p text:style-name="a2038" text:class-names="" text:cond-style-name=""><text:span text:style-name="a2037" text:class-names=""/></text:p>
              </text:list-item>
            </text:list>
          </draw:text-box>
          <svg:title/>
          <svg:desc/>
        </draw:frame>
        <draw:frame draw:id="id289" presentation:style-name="a2044" draw:name="Title 7" svg:x="1.30303in" svg:y="0.40138in" svg:width="7.2018in" svg:height="0.79856in" presentation:class="title" presentation:placeholder="false">
          <draw:text-box>
            <text:p text:style-name="a2043" text:class-names="" text:cond-style-name=""><text:span text:style-name="a2041" text:class-names="">Market Research:<text:s text:c="1"/></text:span><text:span text:style-name="a2042" text:class-names="">An Imperative!</text:span></text:p>
          </draw:text-box>
          <svg:title/>
          <svg:desc/>
        </draw:frame>
        <draw:frame draw:id="id290" draw:style-name="a2047" draw:name="TextBox 10" svg:x="2.61215in" svg:y="1.15306in" svg:width="4.7757in" svg:height="0.50488in">
          <draw:text-box>
            <text:p text:style-name="a2046" text:class-names="" text:cond-style-name=""><text:span text:style-name="a2045" text:class-names="">At the end of the day, research…</text:span></text:p>
          </draw:text-box>
          <svg:title/>
          <svg:desc/>
        </draw:frame>
        <draw:frame draw:id="id291" draw:style-name="a2052" draw:name="TextBox 11" svg:x="1.11542in" svg:y="6.47561in" svg:width="7.76916in" svg:height="0.70684in">
          <draw:text-box>
            <text:p text:style-name="a2049" text:class-names="" text:cond-style-name=""><text:span text:style-name="a2048" text:class-names="">Reminder: Your business/industry type will affect your research methods<text:s text:c="1"/></text:span></text:p>
            <text:p text:style-name="a2051" text:class-names="" text:cond-style-name=""><text:span text:style-name="a2050" text:class-names=""/></text:p>
          </draw:text-box>
          <svg:title/>
          <svg:desc/>
        </draw:frame>
        <presentation:notes draw:style-name="a2081">
          <draw:page-thumbnail draw:page-number="11" svg:x="1.54688in" svg:y="1.27083in" svg:width="4.57292in" svg:height="3.43056in" presentation:class="page" draw:id="id292" presentation:style-name="a2053" draw:name="Slide Image Placeholder 1">
            <svg:title/>
            <svg:desc/>
          </draw:page-thumbnail>
          <draw:frame draw:id="id293" presentation:style-name="a2080" draw:name="Notes Placeholder 2" svg:x="0.76667in" svg:y="4.89271in" svg:width="6.13333in" svg:height="4.00313in" presentation:class="notes" presentation:placeholder="false">
            <draw:text-box>
              <text:p text:style-name="a2055" text:class-names="" text:cond-style-name=""><text:span text:style-name="a2054" text:class-names="">Instructor Notes:</text:span></text:p>
              <text:p text:style-name="a2057" text:class-names="" text:cond-style-name=""><text:span text:style-name="a2056" text:class-names=""/></text:p>
              <text:list text:style-name="a2060">
                <text:list-item>
                  <text:p text:style-name="a2059" text:class-names="" text:cond-style-name=""><text:span text:style-name="a2058" text:class-names="">There is often a lot of resistance to doing market research. Indeed, there is frequent criticism of writing business plans in general.<text:s text:c="1"/></text:span></text:p>
                </text:list-item>
              </text:list>
              <text:list text:style-name="a2063">
                <text:list-item>
                  <text:p text:style-name="a2062" text:class-names="" text:cond-style-name=""><text:span text:style-name="a2061" text:class-names="">The point of this slide is to talk more about the specific benefits of what you’ll learn by doing research.<text:s text:c="1"/></text:span></text:p>
                </text:list-item>
              </text:list>
              <text:list text:style-name="a2066">
                <text:list-item>
                  <text:p text:style-name="a2065" text:class-names="" text:cond-style-name=""><text:span text:style-name="a2064" text:class-names="">People might think of market research as something that big companies do, and that is true in the formal sense – big companies carry out grandiose market research campaigns.<text:s text:c="1"/></text:span></text:p>
                </text:list-item>
              </text:list>
              <text:list text:style-name="a2069">
                <text:list-item>
                  <text:p text:style-name="a2068" text:class-names="" text:cond-style-name=""><text:span text:style-name="a2067" text:class-names="">However, what we’re talking about in this lesson is more to focus on what the entrepreneur can – and should – do as part of their overall feasibility analysis.<text:s text:c="1"/></text:span></text:p>
                </text:list-item>
              </text:list>
              <text:list text:style-name="a2072">
                <text:list-item>
                  <text:p text:style-name="a2071" text:class-names="" text:cond-style-name=""><text:span text:style-name="a2070" text:class-names="">So, remember that we’re still at the EARLY STAGES of this company, perhaps even before the company is founded. You might want to note that, as the company grows larger, the nature of the research to be done will change. Ask how to price a product. Be sure that they understand the only way to price a product is based on what the customer is willing to pay.</text:span></text:p>
                </text:list-item>
              </text:list>
              <text:p text:style-name="a2074" text:class-names="" text:cond-style-name=""><text:span text:style-name="a2073" text:class-names=""/></text:p>
              <text:list text:style-name="a2077">
                <text:list-item>
                  <text:p text:style-name="a2076" text:class-names="" text:cond-style-name=""><text:span text:style-name="a2075" text:class-names="">Reinforce their business/industry’s role in determining the appropriate market research methods</text:span></text:p>
                </text:list-item>
              </text:list>
              <text:p text:style-name="a2079" text:class-names="" text:cond-style-name=""><text:span text:style-name="a2078" text:class-names=""/></text:p>
            </draw:text-box>
            <svg:title/>
            <svg:desc/>
          </draw:frame>
        </presentation:notes>
      </draw:page>
      <draw:page draw:name="Slide21" draw:style-name="a2082" draw:master-page-name="Master1-Layout8-cust-Title-and-Content-with-Subtitle" presentation:presentation-page-layout-name="Master1-PPL8" draw:id="Slide-276">
        <draw:frame draw:id="id294" presentation:style-name="a2095" draw:name="Content Placeholder 1" svg:x="0.6875in" svg:y="2.09798in" svg:width="8.625in" svg:height="4.07644in" presentation:class="outline" presentation:placeholder="false">
          <draw:text-box>
            <text:list text:style-name="a2085">
              <text:list-item>
                <text:p text:style-name="a2084" text:class-names="" text:cond-style-name=""><text:span text:style-name="a2083" text:class-names="">Key Players</text:span></text:p>
              </text:list-item>
            </text:list>
            <text:list text:style-name="a2088">
              <text:list-item>
                <text:p text:style-name="a2087" text:class-names="" text:cond-style-name=""><text:span text:style-name="a2086" text:class-names="">Growth</text:span></text:p>
              </text:list-item>
            </text:list>
            <text:list text:style-name="a2091">
              <text:list-item>
                <text:p text:style-name="a2090" text:class-names="" text:cond-style-name=""><text:span text:style-name="a2089" text:class-names="">Trends</text:span></text:p>
              </text:list-item>
            </text:list>
            <text:list text:style-name="a2094">
              <text:list-item>
                <text:p text:style-name="a2093" text:class-names="" text:cond-style-name=""><text:span text:style-name="a2092" text:class-names="">Competitors</text:span></text:p>
              </text:list-item>
            </text:list>
          </draw:text-box>
          <svg:title/>
          <svg:desc/>
        </draw:frame>
        <draw:frame draw:id="id295" draw:style-name="a2098" draw:name="Slide Number Placeholder 3" svg:x="4.89868in" svg:y="6.77418in" svg:width="0.51437in" svg:height="0.39931in">
          <draw:text-box>
            <text:p text:style-name="a2097" text:class-names="" text:cond-style-name=""><text:span text:style-name="a2096" text:class-names=""><text:page-number style:num-format="1" text:fixed="false"/></text:span></text:p>
          </draw:text-box>
          <svg:title/>
          <svg:desc/>
        </draw:frame>
        <draw:frame draw:id="id296" presentation:style-name="a2102" draw:name="Title 4" svg:x="1.30303in" svg:y="0.40138in" svg:width="7.2018in" svg:height="0.79856in" presentation:class="title" presentation:placeholder="false">
          <draw:text-box>
            <text:p text:style-name="a2101" text:class-names="" text:cond-style-name=""><text:span text:style-name="a2099" text:class-names="">Industry Analysis:<text:s text:c="1"/></text:span><text:span text:style-name="a2100" text:class-names="">Your Objectives</text:span></text:p>
          </draw:text-box>
          <svg:title/>
          <svg:desc/>
        </draw:frame>
        <draw:custom-shape svg:x="4.2289in" svg:y="1.02552in" svg:width="1.03299in" svg:height="4.39931in" draw:id="id297" draw:style-name="a2105" draw:name="Rectangle 11">
          <svg:title/>
          <svg:desc/>
          <text:p text:style-name="a2104" text:class-names="" text:cond-style-name=""><text:span text:style-name="a2103" text:class-names="">}</text:span></text:p>
          <draw:enhanced-geometry xmlns:dr3d="urn:oasis:names:tc:opendocument:xmlns:dr3d:1.0" draw:type="non-primitive" svg:viewBox="0 0 21600 21600" draw:enhanced-path="M 0 0 L 21600 0 21600 21600 0 21600 Z N"/>
        </draw:custom-shape>
        <draw:frame draw:id="id298" draw:style-name="a2110" draw:name="TextBox 5" svg:x="5.60056in" svg:y="2.80375in" svg:width="3.37326in" svg:height="1.31846in">
          <draw:text-box>
            <text:p text:style-name="a2107" text:class-names="" text:cond-style-name=""><text:span text:style-name="a2106" text:class-names="">Helps evaluate<text:s text:c="1"/></text:span></text:p>
            <text:p text:style-name="a2109" text:class-names="" text:cond-style-name=""><text:span text:style-name="a2108" text:class-names="">Industry Attractiveness</text:span></text:p>
          </draw:text-box>
          <svg:title/>
          <svg:desc/>
        </draw:frame>
        <presentation:notes draw:style-name="a2162">
          <draw:page-thumbnail draw:page-number="12" svg:x="1.54688in" svg:y="1.27083in" svg:width="4.57292in" svg:height="3.43056in" presentation:class="page" draw:id="id299" presentation:style-name="a2111" draw:name="Slide Image Placeholder 1">
            <svg:title/>
            <svg:desc/>
          </draw:page-thumbnail>
          <draw:frame draw:id="id300" presentation:style-name="a2161" draw:name="Notes Placeholder 2" svg:x="0.76667in" svg:y="4.89271in" svg:width="6.13333in" svg:height="4.00313in" presentation:class="notes" presentation:placeholder="false">
            <draw:text-box>
              <text:p text:style-name="a2113" text:class-names="" text:cond-style-name=""><text:span text:style-name="a2112" text:class-names="">Instructor Notes:</text:span></text:p>
              <text:p text:style-name="a2115" text:class-names="" text:cond-style-name=""><text:span text:style-name="a2114" text:class-names=""/></text:p>
              <text:p text:style-name="a2117" text:class-names="" text:cond-style-name=""><text:span text:style-name="a2116" text:class-names="">Your market research includes MARKET analysis, which we just discussed and INDUSTRY analysis.</text:span></text:p>
              <text:p text:style-name="a2120" text:class-names="" text:cond-style-name=""><text:span text:style-name="a2118" text:class-names="">An industry analysis</text:span><text:span text:style-name="a2119" text:class-names=""><text:s text:c="1"/>assesses the general industry environment in which you compete.</text:span></text:p>
              <text:p text:style-name="a2122" text:class-names="" text:cond-style-name=""><text:span text:style-name="a2121" text:class-names=""/></text:p>
              <text:p text:style-name="a2124" text:class-names="" text:cond-style-name=""><text:span text:style-name="a2123" text:class-names="">The industry analysis is the section of your business plan in which you demonstrate your knowledge about the general characteristics of the type of business you're in. You should be able to:<text:s text:c="1"/></text:span></text:p>
              <text:list text:style-name="a2127">
                <text:list-item>
                  <text:list text:style-name="a2127">
                    <text:list-item>
                      <text:p text:style-name="a2126" text:class-names="" text:cond-style-name=""><text:span text:style-name="a2125" text:class-names="">present some statistics about the size of the industry (e.g., total U.S. sales in the last year)<text:s text:c="1"/></text:span></text:p>
                    </text:list-item>
                  </text:list>
                </text:list-item>
              </text:list>
              <text:list text:style-name="a2130">
                <text:list-item>
                  <text:list text:style-name="a2130">
                    <text:list-item>
                      <text:p text:style-name="a2129" text:class-names="" text:cond-style-name=""><text:span text:style-name="a2128" text:class-names="">its growth rate over the last few years</text:span></text:p>
                    </text:list-item>
                  </text:list>
                </text:list-item>
              </text:list>
              <text:list text:style-name="a2133">
                <text:list-item>
                  <text:list text:style-name="a2133">
                    <text:list-item>
                      <text:p text:style-name="a2132" text:class-names="" text:cond-style-name=""><text:span text:style-name="a2131" text:class-names="">Is the industry expanding, contracting or holding steady? Why?</text:span></text:p>
                    </text:list-item>
                  </text:list>
                </text:list-item>
              </text:list>
              <text:list text:style-name="a2136">
                <text:list-item>
                  <text:list text:style-name="a2136">
                    <text:list-item>
                      <text:p text:style-name="a2135" text:class-names="" text:cond-style-name=""><text:span text:style-name="a2134" text:class-names="">Who are the major industry participants?<text:s text:c="1"/></text:span></text:p>
                    </text:list-item>
                  </text:list>
                </text:list-item>
              </text:list>
              <text:p text:style-name="a2138" text:class-names="" text:cond-style-name=""><text:span text:style-name="a2137" text:class-names=""/></text:p>
              <text:p text:style-name="a2140" text:class-names="" text:cond-style-name=""><text:span text:style-name="a2139" text:class-names="">This is where a SWOT analysis can be useful.<text:s text:c="1"/></text:span></text:p>
              <text:p text:style-name="a2142" text:class-names="" text:cond-style-name=""><text:span text:style-name="a2141" text:class-names=""/></text:p>
              <text:p text:style-name="a2144" text:class-names="" text:cond-style-name=""><text:span text:style-name="a2143" text:class-names="">This kind of information is often available for free from the following sources:</text:span></text:p>
              <text:list text:style-name="a2147">
                <text:list-item>
                  <text:p text:style-name="a2146" text:class-names="" text:cond-style-name=""><text:span text:style-name="a2145" text:class-names="">trade association data</text:span></text:p>
                </text:list-item>
              </text:list>
              <text:list text:style-name="a2150">
                <text:list-item>
                  <text:p text:style-name="a2149" text:class-names="" text:cond-style-name=""><text:span text:style-name="a2148" text:class-names="">industry publications and databases</text:span></text:p>
                </text:list-item>
              </text:list>
              <text:list text:style-name="a2153">
                <text:list-item>
                  <text:p text:style-name="a2152" text:class-names="" text:cond-style-name=""><text:span text:style-name="a2151" text:class-names="">government databases (e.g., Census Bureau, state trade measurements)</text:span></text:p>
                </text:list-item>
              </text:list>
              <text:list text:style-name="a2156">
                <text:list-item>
                  <text:p text:style-name="a2155" text:class-names="" text:cond-style-name=""><text:span text:style-name="a2154" text:class-names="">data and analysts' opinions about the largest players in the industry (e.g., Standard &amp; Poor's reports, quotes from reputable news sources)</text:span></text:p>
                </text:list-item>
              </text:list>
              <text:p text:style-name="a2158" text:class-names="" text:cond-style-name=""><text:span text:style-name="a2157" text:class-names=""><text:line-break/></text:span></text:p>
              <text:p text:style-name="a2160" text:class-names="" text:cond-style-name=""><text:span text:style-name="a2159" text:class-names=""/></text:p>
            </draw:text-box>
            <svg:title/>
            <svg:desc/>
          </draw:frame>
        </presentation:notes>
      </draw:page>
      <draw:page draw:name="Slide12" draw:style-name="a2163" draw:master-page-name="Master1-Layout8-cust-Title-and-Content-with-Subtitle" presentation:presentation-page-layout-name="Master1-PPL8" draw:id="Slide-267">
        <draw:frame draw:id="id301" presentation:style-name="a2178" draw:name="Content Placeholder 4" svg:x="0.84337in" svg:y="1.39005in" svg:width="8.625in" svg:height="4.71991in" presentation:class="outline" presentation:placeholder="false">
          <draw:text-box>
            <text:list text:style-name="a2167">
              <text:list-item>
                <text:p text:style-name="a2166" text:class-names="" text:cond-style-name=""><text:span text:style-name="a2164" text:class-names="">Broad focus<text:s text:c="1"/></text:span><text:span text:style-name="a2165" text:class-names="">– broad market niche. Larger customer base.</text:span></text:p>
              </text:list-item>
            </text:list>
            <text:list text:style-name="a2170">
              <text:list-item>
                <text:p text:style-name="a2169" text:class-names="" text:cond-style-name=""><text:span text:style-name="a2168" text:class-names=""><text:tab/></text:span></text:p>
              </text:list-item>
            </text:list>
            <text:list text:style-name="a2174">
              <text:list-item>
                <text:p text:style-name="a2173" text:class-names="" text:cond-style-name=""><text:span text:style-name="a2171" text:class-names="">Narrow focus<text:s text:c="1"/></text:span><text:span text:style-name="a2172" text:class-names="">– small but more active customer base. Has very specific needs.</text:span></text:p>
              </text:list-item>
            </text:list>
            <text:list text:style-name="a2177">
              <text:list-item>
                <text:p text:style-name="a2176" text:class-names="" text:cond-style-name=""><text:span text:style-name="a2175" text:class-names=""/></text:p>
              </text:list-item>
            </text:list>
          </draw:text-box>
          <svg:title/>
          <svg:desc/>
        </draw:frame>
        <draw:frame draw:id="id302" draw:style-name="a2181" draw:name="Slide Number Placeholder 2" svg:x="4.89868in" svg:y="6.77418in" svg:width="0.51437in" svg:height="0.39931in">
          <draw:text-box>
            <text:p text:style-name="a2180" text:class-names="" text:cond-style-name=""><text:span text:style-name="a2179" text:class-names=""><text:page-number style:num-format="1" text:fixed="false"/></text:span></text:p>
          </draw:text-box>
          <svg:title/>
          <svg:desc/>
        </draw:frame>
        <draw:frame draw:id="id303" presentation:style-name="a2184" draw:name="Title 3" svg:x="1.30303in" svg:y="0.40138in" svg:width="7.2018in" svg:height="0.79856in" presentation:class="title" presentation:placeholder="false">
          <draw:text-box>
            <text:p text:style-name="a2183" text:class-names="" text:cond-style-name=""><text:span text:style-name="a2182" text:class-names="">Broad Vs. Narrow</text:span></text:p>
          </draw:text-box>
          <svg:title/>
          <svg:desc/>
        </draw:frame>
        <presentation:notes draw:style-name="a2220">
          <draw:page-thumbnail draw:page-number="13" svg:x="1.54688in" svg:y="1.27083in" svg:width="4.57292in" svg:height="3.43056in" presentation:class="page" draw:id="id304" presentation:style-name="a2185" draw:name="Slide Image Placeholder 1">
            <svg:title/>
            <svg:desc/>
          </draw:page-thumbnail>
          <draw:frame draw:id="id305" presentation:style-name="a2219" draw:name="Notes Placeholder 2" svg:x="0.76667in" svg:y="4.89271in" svg:width="6.13333in" svg:height="4.00313in" presentation:class="notes" presentation:placeholder="false">
            <draw:text-box>
              <text:p text:style-name="a2187" text:class-names="" text:cond-style-name=""><text:span text:style-name="a2186" text:class-names="">Instructor Notes:</text:span></text:p>
              <text:p text:style-name="a2189" text:class-names="" text:cond-style-name=""><text:span text:style-name="a2188" text:class-names=""/></text:p>
              <text:p text:style-name="a2194" text:class-names="" text:cond-style-name=""><text:span text:style-name="a2190" text:class-names="">Broad – appeals to a larger customer base but building credibility and brand awareness will be a disadvantage</text:span><text:span text:style-name="a2191" text:class-names="">. Everyone is vying for a slice of the pie. Because there are so many different companies offering similar products, companies upstream and downstream from yours will hold a lot of influence over the market, your suppliers, distributors, and resellers have plenty of customers to choose from. In order to succeed in a broad market niche you must be able to</text:span><text:span text:style-name="a2192" text:class-names=""> inform your customers</text:span><text:span text:style-name="a2193" text:class-names=""> of your product, while also keeping your prices competitive and maintaining good relationships with your producers and resellers.</text:span></text:p>
              <text:p text:style-name="a2196" text:class-names="" text:cond-style-name=""><text:span text:style-name="a2195" text:class-names=""/></text:p>
              <text:p text:style-name="a2198" text:class-names="" text:cond-style-name=""><text:span text:style-name="a2197" text:class-names="">Example: toothpaste</text:span></text:p>
              <text:p text:style-name="a2200" text:class-names="" text:cond-style-name=""><text:span text:style-name="a2199" text:class-names="">*Most people just buy whatever they are used to buying (or what’s cheapest).</text:span></text:p>
              <text:p text:style-name="a2202" text:class-names="" text:cond-style-name=""><text:span text:style-name="a2201" text:class-names=""/></text:p>
              <text:p text:style-name="a2207" text:class-names="" text:cond-style-name=""><text:span text:style-name="a2203" text:class-names="">Narrow<text:s text:c="1"/></text:span><text:span text:style-name="a2204" text:class-names="">-<text:s text:c="1"/></text:span><text:span text:style-name="a2205" text:class-names="">a smaller, but more active customer base</text:span><text:span text:style-name="a2206" text:class-names="">.<text:s text:c="1"/></text:span></text:p>
              <text:p text:style-name="a2209" text:class-names="" text:cond-style-name=""><text:span text:style-name="a2208" text:class-names=""/></text:p>
              <text:list text:style-name="a2212">
                <text:list-item>
                  <text:p text:style-name="a2211" text:class-names="" text:cond-style-name=""><text:span text:style-name="a2210" text:class-names="">Provide example of a restaurant like Panera (a highly successful restaurant in the fast casual industry) and what it means to change the definitions of broad and narrow.<text:s text:c="1"/></text:span></text:p>
                </text:list-item>
              </text:list>
              <text:list text:style-name="a2216">
                <text:list-item>
                  <text:p text:style-name="a2215" text:class-names="" text:cond-style-name=""><text:span text:style-name="a2213" text:class-names="">This slide lays this out very well – A broad approach brings in more restaurants including fast food and casual food; narrow starts to tighten the focus about your direct rivalry</text:span><text:span text:style-name="a2214" text:class-names="">.</text:span></text:p>
                </text:list-item>
              </text:list>
              <text:p text:style-name="a2218" text:class-names="" text:cond-style-name=""><text:span text:style-name="a2217" text:class-names=""/></text:p>
            </draw:text-box>
            <svg:title/>
            <svg:desc/>
          </draw:frame>
        </presentation:notes>
      </draw:page>
      <draw:page draw:name="Slide13" draw:style-name="a2221" draw:master-page-name="Master1-Layout9-cust-Title-only" presentation:presentation-page-layout-name="Master1-PPL9" draw:id="Slide-268">
        <draw:frame draw:id="id306" draw:style-name="a2224" draw:name="Slide Number Placeholder 2" svg:x="4.89868in" svg:y="6.77418in" svg:width="0.51437in" svg:height="0.39931in">
          <draw:text-box>
            <text:p text:style-name="a2223" text:class-names="" text:cond-style-name=""><text:span text:style-name="a2222" text:class-names=""><text:page-number style:num-format="1" text:fixed="false"/></text:span></text:p>
          </draw:text-box>
          <svg:title/>
          <svg:desc/>
        </draw:frame>
        <draw:frame draw:id="id307" presentation:style-name="a2227" draw:name="Title 6" svg:x="1.30303in" svg:y="0.40138in" svg:width="7.2018in" svg:height="0.79856in" presentation:class="title" presentation:placeholder="false">
          <draw:text-box>
            <text:p text:style-name="a2226" text:class-names="" text:cond-style-name=""><text:span text:style-name="a2225" text:class-names="">Types of Competitors</text:span></text:p>
          </draw:text-box>
          <svg:title/>
          <svg:desc/>
        </draw:frame>
        <draw:g draw:name="Group 7" draw:id="id308">
          <svg:title/>
          <svg:desc/>
          <draw:custom-shape svg:x="3.79037in" svg:y="4.39263in" svg:width="2.41927in" svg:height="2.41927in" draw:id="id321" draw:style-name="a2267" draw:name="Oval 8">
            <svg:title/>
            <svg:desc/>
            <text:p text:style-name="a2266" text:class-names="" text:cond-style-name=""><text:span text:style-name="a226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22" draw:style-name="a2270" draw:name="Oval 4" svg:x="3.79159in" svg:y="4.78826in" svg:width="2.41927in" svg:height="1.71068in">
            <draw:text-box>
              <text:p text:style-name="a2269" text:class-names="" text:cond-style-name=""><text:span text:style-name="a2268" text:class-names="">Your Business</text:span></text:p>
            </draw:text-box>
            <svg:title/>
            <svg:desc/>
          </draw:frame>
        </draw:g>
        <draw:custom-shape svg:width="1.94804in" svg:height="0.68949in" draw:id="id309" draw:style-name="a2230" draw:transform="translate(-0.97402in -0.34474in) rotate(-3.75246) translate(3.11838in 4.28474in)" draw:name="Arrow: Left 10">
          <svg:title/>
          <svg:desc/>
          <text:p text:style-name="a2229" text:class-names="" text:cond-style-name=""><text:span text:style-name="a2228" text:class-names=""/></text:p>
          <draw:enhanced-geometry xmlns:dr3d="urn:oasis:names:tc:opendocument:xmlns:dr3d:1.0" draw:type="non-primitive" svg:viewBox="0 0 21600 21600" draw:enhanced-path="M ?f9 ?f12 L ?f11 ?f12 ?f11 ?f8 ?f8 ?f10 ?f11 ?f9 ?f11 ?f13 ?f9 ?f13 Z N" draw:text-areas="?f19 ?f12 ?f24 ?f13" draw:glue-points="?f11 ?f22 ?f11 ?f23" draw:glue-point-leaving-directions="-0, 180" draw:modifiers="3823 432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0 * ?f7"/>
            <draw:equation draw:name="f16" draw:formula="21600 * ?f7"/>
            <draw:equation draw:name="f17" draw:formula="?f11 * ?f12"/>
            <draw:equation draw:name="f18" draw:formula="?f17 / 10800"/>
            <draw:equation draw:name="f19" draw:formula="?f11 - ?f18"/>
            <draw:equation draw:name="f20" draw:formula="$0 / ?f6"/>
            <draw:equation draw:name="f21" draw:formula="$1 / ?f7"/>
            <draw:equation draw:name="f22" draw:formula="?f15 / ?f7"/>
            <draw:equation draw:name="f23" draw:formula="?f16 / ?f7"/>
            <draw:equation draw:name="f24" draw:formula="?f14 / ?f6"/>
            <draw:handle draw:handle-position="$0 $1" draw:handle-position-x="$0" draw:handle-position-y="$1" draw:handle-range-x-minimum="0" draw:handle-range-x-maximum="21600" draw:handle-range-y-minimum="0" draw:handle-range-y-maximum="10800"/>
          </draw:enhanced-geometry>
        </draw:custom-shape>
        <draw:g draw:name="Group 11" draw:id="id310">
          <svg:title/>
          <svg:desc/>
          <draw:custom-shape svg:x="1.17136in" svg:y="2.80674in" svg:width="2.2983in" svg:height="1.83864in" draw:id="id319" draw:style-name="a2259" draw:name="Rectangle: Rounded Corners 12">
            <svg:title/>
            <svg:desc/>
            <text:p text:style-name="a2258" text:class-names="" text:cond-style-name=""><text:span text:style-name="a225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320" draw:style-name="a2264" draw:name="Rectangle: Rounded Corners 7" svg:x="1.22521in" svg:y="2.86059in" svg:width="2.1906in" svg:height="1.73094in">
            <draw:text-box>
              <text:p text:style-name="a2261" text:class-names="" text:cond-style-name=""><text:span text:style-name="a2260" text:class-names="">Direct Competitors:<text:s text:c="1"/></text:span></text:p>
              <text:p text:style-name="a2263" text:class-names="" text:cond-style-name=""><text:span text:style-name="a2262" text:class-names="">Businesses offering identical or similar products<text:s text:c="1"/></text:span></text:p>
            </draw:text-box>
            <svg:title/>
            <svg:desc/>
          </draw:frame>
        </draw:g>
        <draw:custom-shape svg:width="1.96807in" svg:height="0.68949in" draw:id="id311" draw:style-name="a2233" draw:transform="translate(-0.98403in -0.34474in) rotate(-4.70956) translate(4.99346in 3.29406in)" draw:name="Arrow: Left 14">
          <svg:title/>
          <svg:desc/>
          <text:p text:style-name="a2232" text:class-names="" text:cond-style-name=""><text:span text:style-name="a2231" text:class-names=""/></text:p>
          <draw:enhanced-geometry xmlns:dr3d="urn:oasis:names:tc:opendocument:xmlns:dr3d:1.0" draw:type="non-primitive" svg:viewBox="0 0 21600 21600" draw:enhanced-path="M ?f9 ?f12 L ?f11 ?f12 ?f11 ?f8 ?f8 ?f10 ?f11 ?f9 ?f11 ?f13 ?f9 ?f13 Z N" draw:text-areas="?f19 ?f12 ?f24 ?f13" draw:glue-points="?f11 ?f22 ?f11 ?f23" draw:glue-point-leaving-directions="-0, 180" draw:modifiers="3784 432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0 * ?f7"/>
            <draw:equation draw:name="f16" draw:formula="21600 * ?f7"/>
            <draw:equation draw:name="f17" draw:formula="?f11 * ?f12"/>
            <draw:equation draw:name="f18" draw:formula="?f17 / 10800"/>
            <draw:equation draw:name="f19" draw:formula="?f11 - ?f18"/>
            <draw:equation draw:name="f20" draw:formula="$0 / ?f6"/>
            <draw:equation draw:name="f21" draw:formula="$1 / ?f7"/>
            <draw:equation draw:name="f22" draw:formula="?f15 / ?f7"/>
            <draw:equation draw:name="f23" draw:formula="?f16 / ?f7"/>
            <draw:equation draw:name="f24" draw:formula="?f14 / ?f6"/>
            <draw:handle draw:handle-position="$0 $1" draw:handle-position-x="$0" draw:handle-position-y="$1" draw:handle-range-x-minimum="0" draw:handle-range-x-maximum="21600" draw:handle-range-y-minimum="0" draw:handle-range-y-maximum="10800"/>
          </draw:enhanced-geometry>
        </draw:custom-shape>
        <draw:g draw:name="Group 15" draw:id="id312">
          <svg:title/>
          <svg:desc/>
          <draw:custom-shape svg:x="3.84154in" svg:y="1.3907in" svg:width="2.2983in" svg:height="1.83864in" draw:id="id317" draw:style-name="a2249" draw:name="Rectangle: Rounded Corners 16">
            <svg:title/>
            <svg:desc/>
            <text:p text:style-name="a2248" text:class-names="" text:cond-style-name=""><text:span text:style-name="a224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318" draw:style-name="a2256" draw:name="Rectangle: Rounded Corners 10" svg:x="3.89539in" svg:y="1.44455in" svg:width="2.1906in" svg:height="1.73094in">
            <draw:text-box>
              <text:p text:style-name="a2251" text:class-names="" text:cond-style-name=""><text:span text:style-name="a2250" text:class-names="">Indirect Competitors:</text:span></text:p>
              <text:p text:style-name="a2253" text:class-names="" text:cond-style-name=""><text:span text:style-name="a2252" text:class-names="">Businesses offering close or substitute products<text:s text:c="1"/></text:span></text:p>
              <text:p text:style-name="a2255" text:class-names="" text:cond-style-name=""><text:span text:style-name="a2254" text:class-names=""/></text:p>
            </draw:text-box>
            <svg:title/>
            <svg:desc/>
          </draw:frame>
        </draw:g>
        <draw:custom-shape svg:width="1.94804in" svg:height="0.68949in" draw:id="id313" draw:style-name="a2236" draw:transform="translate(-0.97402in -0.34474in) rotate(-5.67232) translate(6.88162in 4.28473in)" draw:name="Arrow: Left 18">
          <svg:title/>
          <svg:desc/>
          <text:p text:style-name="a2235" text:class-names="" text:cond-style-name=""><text:span text:style-name="a2234" text:class-names=""/></text:p>
          <draw:enhanced-geometry xmlns:dr3d="urn:oasis:names:tc:opendocument:xmlns:dr3d:1.0" draw:type="non-primitive" svg:viewBox="0 0 21600 21600" draw:enhanced-path="M ?f9 ?f12 L ?f11 ?f12 ?f11 ?f8 ?f8 ?f10 ?f11 ?f9 ?f11 ?f13 ?f9 ?f13 Z N" draw:text-areas="?f19 ?f12 ?f24 ?f13" draw:glue-points="?f11 ?f22 ?f11 ?f23" draw:glue-point-leaving-directions="-0, 180" draw:modifiers="3823 432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0 * ?f7"/>
            <draw:equation draw:name="f16" draw:formula="21600 * ?f7"/>
            <draw:equation draw:name="f17" draw:formula="?f11 * ?f12"/>
            <draw:equation draw:name="f18" draw:formula="?f17 / 10800"/>
            <draw:equation draw:name="f19" draw:formula="?f11 - ?f18"/>
            <draw:equation draw:name="f20" draw:formula="$0 / ?f6"/>
            <draw:equation draw:name="f21" draw:formula="$1 / ?f7"/>
            <draw:equation draw:name="f22" draw:formula="?f15 / ?f7"/>
            <draw:equation draw:name="f23" draw:formula="?f16 / ?f7"/>
            <draw:equation draw:name="f24" draw:formula="?f14 / ?f6"/>
            <draw:handle draw:handle-position="$0 $1" draw:handle-position-x="$0" draw:handle-position-y="$1" draw:handle-range-x-minimum="0" draw:handle-range-x-maximum="21600" draw:handle-range-y-minimum="0" draw:handle-range-y-maximum="10800"/>
          </draw:enhanced-geometry>
        </draw:custom-shape>
        <draw:g draw:name="Group 19" draw:id="id314">
          <svg:title/>
          <svg:desc/>
          <draw:custom-shape svg:x="6.53034in" svg:y="2.80674in" svg:width="2.2983in" svg:height="1.83864in" draw:id="id315" draw:style-name="a2239" draw:name="Rectangle: Rounded Corners 20">
            <svg:title/>
            <svg:desc/>
            <text:p text:style-name="a2238" text:class-names="" text:cond-style-name=""><text:span text:style-name="a223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316" draw:style-name="a2246" draw:name="Rectangle: Rounded Corners 13" svg:x="6.58419in" svg:y="2.86059in" svg:width="2.1906in" svg:height="1.73094in">
            <draw:text-box>
              <text:p text:style-name="a2241" text:class-names="" text:cond-style-name=""><text:span text:style-name="a2240" text:class-names="">Future Competitors:</text:span></text:p>
              <text:p text:style-name="a2243" text:class-names="" text:cond-style-name=""><text:span text:style-name="a2242" text:class-names="">Businesses that are not yet direct or indirect competitors but could be at any time</text:span></text:p>
              <text:p text:style-name="a2245" text:class-names="" text:cond-style-name=""><text:span text:style-name="a2244" text:class-names=""/></text:p>
            </draw:text-box>
            <svg:title/>
            <svg:desc/>
          </draw:frame>
        </draw:g>
        <presentation:notes draw:style-name="a2298">
          <draw:page-thumbnail draw:page-number="14" svg:x="1.54688in" svg:y="1.27083in" svg:width="4.57292in" svg:height="3.43056in" presentation:class="page" draw:id="id323" presentation:style-name="a2271" draw:name="Slide Image Placeholder 1">
            <svg:title/>
            <svg:desc/>
          </draw:page-thumbnail>
          <draw:frame draw:id="id324" presentation:style-name="a2297" draw:name="Notes Placeholder 2" svg:x="0.76667in" svg:y="4.89271in" svg:width="6.13333in" svg:height="4.00313in" presentation:class="notes" presentation:placeholder="false">
            <draw:text-box>
              <text:p text:style-name="a2273" text:class-names="" text:cond-style-name=""><text:span text:style-name="a2272" text:class-names="">Instructor Notes:</text:span></text:p>
              <text:p text:style-name="a2275" text:class-names="" text:cond-style-name=""><text:span text:style-name="a2274" text:class-names=""/></text:p>
              <text:list text:style-name="a2278">
                <text:list-item>
                  <text:p text:style-name="a2277" text:class-names="" text:cond-style-name=""><text:span text:style-name="a2276" text:class-names="">Can provide a number of examples to really illustrate this, such as with McDonald’s McCafe vs Starbucks vs Local Café’s vs other types of lounges vs. a bar.</text:span></text:p>
                </text:list-item>
              </text:list>
              <text:list text:style-name="a2281">
                <text:list-item>
                  <text:p text:style-name="a2280" text:class-names="" text:cond-style-name=""><text:span text:style-name="a2279" text:class-names="">Although most people really focus their attention on the direct competitors in terms of differentiation and defining their concept, the reality is that the others are just as important</text:span></text:p>
                </text:list-item>
              </text:list>
              <text:p text:style-name="a2283" text:class-names="" text:cond-style-name=""><text:span text:style-name="a2282" text:class-names=""/></text:p>
              <text:list text:style-name="a2286">
                <text:list-item>
                  <text:p text:style-name="a2285" text:class-names="" text:cond-style-name=""><text:span text:style-name="a2284" text:class-names="">Other Examples to include:</text:span></text:p>
                </text:list-item>
              </text:list>
              <text:list text:style-name="a2289">
                <text:list-item>
                  <text:p text:style-name="a2288" text:class-names="" text:cond-style-name=""><text:span text:style-name="a2287" text:class-names="">Hot Dog Stand – Direct competitors = other hot dog stands, Indirect competitors = McDonald’s, pizza shop, Chinese restaurant, etc.<text:s text:c="1"/></text:span></text:p>
                </text:list-item>
              </text:list>
              <text:p text:style-name="a2291" text:class-names="" text:cond-style-name=""><text:span text:style-name="a2290" text:class-names=""/></text:p>
              <text:list text:style-name="a2294">
                <text:list-item>
                  <text:p text:style-name="a2293" text:class-names="" text:cond-style-name=""><text:span text:style-name="a2292" text:class-names="">Emphasize the necessity to assess your complete competitive market <text:s text:c="1"/></text:span></text:p>
                </text:list-item>
              </text:list>
              <text:p text:style-name="a2296" text:class-names="" text:cond-style-name=""><text:span text:style-name="a2295" text:class-names=""/></text:p>
            </draw:text-box>
            <svg:title/>
            <svg:desc/>
          </draw:frame>
        </presentation:notes>
      </draw:page>
      <draw:page draw:name="Slide14" draw:style-name="a2299" draw:master-page-name="Master1-Layout9-cust-Title-only" presentation:presentation-page-layout-name="Master1-PPL9" draw:id="Slide-269">
        <draw:frame draw:id="id325" draw:style-name="a2302" draw:name="Slide Number Placeholder 3" svg:x="4.89868in" svg:y="6.77418in" svg:width="0.51437in" svg:height="0.39931in">
          <draw:text-box>
            <text:p text:style-name="a2301" text:class-names="" text:cond-style-name=""><text:span text:style-name="a2300" text:class-names=""><text:page-number style:num-format="1" text:fixed="false"/></text:span></text:p>
          </draw:text-box>
          <svg:title/>
          <svg:desc/>
        </draw:frame>
        <draw:frame draw:id="id326" presentation:style-name="a2305" draw:name="Title 6" svg:x="1.30303in" svg:y="0.40138in" svg:width="7.2018in" svg:height="0.79856in" presentation:class="title" presentation:placeholder="false">
          <draw:text-box>
            <text:p text:style-name="a2304" text:class-names="" text:cond-style-name=""><text:span text:style-name="a2303" text:class-names="">Government Contracting</text:span></text:p>
          </draw:text-box>
          <svg:title/>
          <svg:desc/>
        </draw:frame>
        <draw:frame draw:id="id327" draw:style-name="a2306" draw:name="Picture 2" svg:x="0.61672in" svg:y="1.30671in" svg:width="8.76656in" svg:height="4.64334in" style:rel-width="scale" style:rel-height="scale">
          <draw:image xlink:href="media/image7.jpeg" xlink:type="simple" xlink:show="embed" xlink:actuate="onLoad"/>
          <svg:title/>
          <svg:desc>C:\Users\MWillia1\Desktop\uncle-sam.jpg</svg:desc>
        </draw:frame>
        <draw:frame draw:id="id328" draw:style-name="a2309" draw:name="TextBox 9" svg:x="1.40534in" svg:y="6.24095in" svg:width="7.18932in" svg:height="0.50488in">
          <draw:text-box>
            <text:p text:style-name="a2308" text:class-names="" text:cond-style-name=""><text:span text:style-name="a2307" text:class-names="">What if your target customer is ME?</text:span></text:p>
          </draw:text-box>
          <svg:title/>
          <svg:desc/>
        </draw:frame>
        <presentation:notes draw:style-name="a2397">
          <draw:page-thumbnail draw:page-number="15" svg:x="1.54688in" svg:y="1.27083in" svg:width="4.57292in" svg:height="3.43056in" presentation:class="page" draw:id="id329" presentation:style-name="a2310" draw:name="Slide Image Placeholder 1">
            <svg:title/>
            <svg:desc/>
          </draw:page-thumbnail>
          <draw:frame draw:id="id330" presentation:style-name="a2396" draw:name="Notes Placeholder 2" svg:x="0.76667in" svg:y="4.89271in" svg:width="6.13333in" svg:height="4.00313in" presentation:class="notes" presentation:placeholder="false">
            <draw:text-box>
              <text:p text:style-name="a2313" text:class-names="" text:cond-style-name=""><text:span text:style-name="a2311" text:class-names="">Instructor Notes:</text:span><text:span text:style-name="a2312" text:class-names=""/></text:p>
              <text:p text:style-name="a2315" text:class-names="" text:cond-style-name=""><text:span text:style-name="a2314" text:class-names=""/></text:p>
              <text:p text:style-name="a2317" text:class-names="" text:cond-style-name=""><text:span text:style-name="a2316" text:class-names="">As you are going through your market research, consider federal contracting. Federal contracting is a complex, confusing process. However, federal contracting can provide you with an additional source of revenue.</text:span></text:p>
              <text:p text:style-name="a2319" text:class-names="" text:cond-style-name=""><text:span text:style-name="a2318" text:class-names=""/></text:p>
              <text:p text:style-name="a2321" text:class-names="" text:cond-style-name=""><text:span text:style-name="a2320" text:class-names="">Some things to consider in evaluating if your business is ready and capable of fulfilling a government contract.</text:span></text:p>
              <text:list text:style-name="a2325">
                <text:list-item>
                  <text:p text:style-name="a2324" text:class-names="" text:cond-style-name=""><text:span text:style-name="a2322" text:class-names="">Do you have systems in place to handle a government contract?</text:span><text:span text:style-name="a2323" text:class-names=""/></text:p>
                </text:list-item>
              </text:list>
              <text:list text:style-name="a2328">
                <text:list-item>
                  <text:list text:style-name="a2328">
                    <text:list-item>
                      <text:p text:style-name="a2327" text:class-names="" text:cond-style-name=""><text:span text:style-name="a2326" text:class-names="">Do you have the capital, time, staffing, materials and reporting system?</text:span></text:p>
                    </text:list-item>
                  </text:list>
                </text:list-item>
              </text:list>
              <text:list text:style-name="a2331">
                <text:list-item>
                  <text:list text:style-name="a2331">
                    <text:list-item>
                      <text:p text:style-name="a2330" text:class-names="" text:cond-style-name=""><text:span text:style-name="a2329" text:class-names="">What is your ramp up time if you receive a contract?</text:span></text:p>
                    </text:list-item>
                  </text:list>
                </text:list-item>
              </text:list>
              <text:list text:style-name="a2334">
                <text:list-item>
                  <text:list text:style-name="a2334">
                    <text:list-item>
                      <text:p text:style-name="a2333" text:class-names="" text:cond-style-name=""><text:span text:style-name="a2332" text:class-names="">Do you have an existing relationship with a lending institution/bank?</text:span></text:p>
                    </text:list-item>
                  </text:list>
                </text:list-item>
              </text:list>
              <text:list text:style-name="a2337">
                <text:list-item>
                  <text:list text:style-name="a2337">
                    <text:list-item>
                      <text:p text:style-name="a2336" text:class-names="" text:cond-style-name=""><text:span text:style-name="a2335" text:class-names="">Can you meet eligibility requirements such as insurance and bonding?</text:span></text:p>
                    </text:list-item>
                  </text:list>
                </text:list-item>
              </text:list>
              <text:list text:style-name="a2340">
                <text:list-item>
                  <text:p text:style-name="a2339" text:class-names="" text:cond-style-name=""><text:span text:style-name="a2338" text:class-names="">Do you have an accounting system?</text:span></text:p>
                </text:list-item>
              </text:list>
              <text:list text:style-name="a2343">
                <text:list-item>
                  <text:list text:style-name="a2343">
                    <text:list-item>
                      <text:p text:style-name="a2342" text:class-names="" text:cond-style-name=""><text:span text:style-name="a2341" text:class-names="">Avoid unnecessary costs, operate efficiently</text:span></text:p>
                    </text:list-item>
                  </text:list>
                </text:list-item>
              </text:list>
              <text:list text:style-name="a2346">
                <text:list-item>
                  <text:list text:style-name="a2346">
                    <text:list-item>
                      <text:p text:style-name="a2345" text:class-names="" text:cond-style-name=""><text:span text:style-name="a2344" text:class-names="">Required by law – to track assets and taxable income</text:span></text:p>
                    </text:list-item>
                  </text:list>
                </text:list-item>
              </text:list>
              <text:list text:style-name="a2349">
                <text:list-item>
                  <text:list text:style-name="a2349">
                    <text:list-item>
                      <text:p text:style-name="a2348" text:class-names="" text:cond-style-name=""><text:span text:style-name="a2347" text:class-names="">Required for federal contracts<text:s text:c="1"/></text:span></text:p>
                    </text:list-item>
                  </text:list>
                </text:list-item>
              </text:list>
              <text:list text:style-name="a2352">
                <text:list-item>
                  <text:p text:style-name="a2351" text:class-names="" text:cond-style-name=""><text:span text:style-name="a2350" text:class-names="">Do you have federal/state/local government contracting experience?</text:span></text:p>
                </text:list-item>
              </text:list>
              <text:list text:style-name="a2355">
                <text:list-item>
                  <text:list text:style-name="a2355">
                    <text:list-item>
                      <text:p text:style-name="a2354" text:class-names="" text:cond-style-name=""><text:span text:style-name="a2353" text:class-names="">Your ability to compete in the federal marketplace is greatly influenced by your experience. <text:s text:c="1"/>Consider starting in subcontracting to get the experience you need.</text:span></text:p>
                    </text:list-item>
                  </text:list>
                </text:list-item>
              </text:list>
              <text:list text:style-name="a2358">
                <text:list-item>
                  <text:list text:style-name="a2358">
                    <text:list-item>
                      <text:p text:style-name="a2357" text:class-names="" text:cond-style-name=""><text:span text:style-name="a2356" text:class-names="">Experience will help you reap the full benefits of SBA programs such as 8(a) Business Development Program (participation is one 9-year period)</text:span></text:p>
                    </text:list-item>
                  </text:list>
                </text:list-item>
              </text:list>
              <text:list text:style-name="a2361">
                <text:list-item>
                  <text:p text:style-name="a2360" text:class-names="" text:cond-style-name=""><text:span text:style-name="a2359" text:class-names="">Do you have available cash regardless of whether it is in your pocket or your bank account or investments, that you can convert to cash in 90 days?</text:span></text:p>
                </text:list-item>
              </text:list>
              <text:list text:style-name="a2364">
                <text:list-item>
                  <text:p text:style-name="a2363" text:class-names="" text:cond-style-name=""><text:span text:style-name="a2362" text:class-names="">Does the government buy what you sell?</text:span></text:p>
                </text:list-item>
              </text:list>
              <text:list text:style-name="a2367">
                <text:list-item>
                  <text:list text:style-name="a2367">
                    <text:list-item>
                      <text:p text:style-name="a2366" text:class-names="" text:cond-style-name=""><text:span text:style-name="a2365" text:class-names="">Do your research, identify 2-3 government agencies that buy your product or service.</text:span></text:p>
                    </text:list-item>
                  </text:list>
                </text:list-item>
              </text:list>
              <text:list text:style-name="a2370">
                <text:list-item>
                  <text:list text:style-name="a2370">
                    <text:list-item>
                      <text:p text:style-name="a2369" text:class-names="" text:cond-style-name=""><text:span text:style-name="a2368" text:class-names="">Do you know where to find contracting opportunities?<text:s text:c="1"/></text:span></text:p>
                    </text:list-item>
                  </text:list>
                </text:list-item>
              </text:list>
              <text:p text:style-name="a2372" text:class-names="" text:cond-style-name=""><text:span text:style-name="a2371" text:class-names="">Tips For Success:</text:span></text:p>
              <text:list text:style-name="a2375">
                <text:list-item>
                  <text:list text:style-name="a2375">
                    <text:list-item>
                      <text:p text:style-name="a2374" text:class-names="" text:cond-style-name=""><text:span text:style-name="a2373" text:class-names="">Get certified</text:span></text:p>
                    </text:list-item>
                  </text:list>
                </text:list-item>
              </text:list>
              <text:list text:style-name="a2378">
                <text:list-item>
                  <text:list text:style-name="a2378">
                    <text:list-item>
                      <text:p text:style-name="a2377" text:class-names="" text:cond-style-name=""><text:span text:style-name="a2376" text:class-names="">Start small</text:span></text:p>
                    </text:list-item>
                  </text:list>
                </text:list-item>
              </text:list>
              <text:list text:style-name="a2381">
                <text:list-item>
                  <text:list text:style-name="a2381">
                    <text:list-item>
                      <text:p text:style-name="a2380" text:class-names="" text:cond-style-name=""><text:span text:style-name="a2379" text:class-names="">Don’t forget about sub-contracting opportunities</text:span></text:p>
                    </text:list-item>
                  </text:list>
                </text:list-item>
              </text:list>
              <text:list text:style-name="a2384">
                <text:list-item>
                  <text:list text:style-name="a2384">
                    <text:list-item>
                      <text:p text:style-name="a2383" text:class-names="" text:cond-style-name=""><text:span text:style-name="a2382" text:class-names="">State and local governments also have small business contracting goals</text:span></text:p>
                    </text:list-item>
                  </text:list>
                </text:list-item>
              </text:list>
              <text:list text:style-name="a2387">
                <text:list-item>
                  <text:list text:style-name="a2387">
                    <text:list-item>
                      <text:p text:style-name="a2386" text:class-names="" text:cond-style-name=""><text:span text:style-name="a2385" text:class-names="">Find a mentor</text:span></text:p>
                    </text:list-item>
                  </text:list>
                </text:list-item>
              </text:list>
              <text:list text:style-name="a2390">
                <text:list-item>
                  <text:list text:style-name="a2390">
                    <text:list-item>
                      <text:p text:style-name="a2389" text:class-names="" text:cond-style-name=""><text:span text:style-name="a2388" text:class-names="">Leverage available training</text:span></text:p>
                    </text:list-item>
                  </text:list>
                </text:list-item>
              </text:list>
              <text:list text:style-name="a2393">
                <text:list-item>
                  <text:list text:style-name="a2393">
                    <text:list-item>
                      <text:p text:style-name="a2392" text:class-names="" text:cond-style-name=""><text:span text:style-name="a2391" text:class-names="">Build relationships</text:span></text:p>
                    </text:list-item>
                  </text:list>
                </text:list-item>
              </text:list>
              <text:p text:style-name="a2395" text:class-names="" text:cond-style-name=""><text:span text:style-name="a2394" text:class-names=""/></text:p>
            </draw:text-box>
            <svg:title/>
            <svg:desc/>
          </draw:frame>
        </presentation:notes>
      </draw:page>
      <draw:page draw:name="Slide15" draw:style-name="a2398" draw:master-page-name="Master1-Layout9-cust-Title-only" presentation:presentation-page-layout-name="Master1-PPL9" draw:id="Slide-270">
        <draw:frame draw:id="id331" presentation:style-name="a2401" draw:name="Title 5" svg:x="1.30303in" svg:y="0.40138in" svg:width="7.2018in" svg:height="0.79856in" presentation:class="title" presentation:placeholder="false">
          <draw:text-box>
            <text:p text:style-name="a2400" text:class-names="" text:cond-style-name=""><text:span text:style-name="a2399" text:class-names="">Government Contracting</text:span></text:p>
          </draw:text-box>
          <svg:title/>
          <svg:desc/>
        </draw:frame>
        <draw:custom-shape svg:width="2.18934in" svg:height="5.94688in" draw:id="id332" draw:style-name="a2405" draw:transform="translate(-1.09467in -2.97344in) rotate(-1.5708) translate(3.18863in 2.46553in)" draw:name="Rounded Rectangle 18">
          <svg:title/>
          <svg:desc/>
          <text:p text:style-name="a2403" text:class-names="" text:cond-style-name=""><text:span text:style-name="a240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194">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333" draw:style-name="a2413" draw:name="TextBox 14" svg:x="0.22708in" svg:y="1.5904in" svg:width="2.09789in" svg:height="1.3127in">
          <draw:text-box>
            <text:p text:style-name="a2407" text:class-names="" text:cond-style-name=""><text:span text:style-name="a2406" text:class-names="">WORLD’S</text:span></text:p>
            <text:p text:style-name="a2409" text:class-names="" text:cond-style-name=""><text:span text:style-name="a2408" text:class-names="">LARGEST</text:span></text:p>
            <text:p text:style-name="a2412" text:class-names="" text:cond-style-name=""><text:span text:style-name="a2410" text:class-names="">BUYER</text:span><text:span text:style-name="a2411" text:class-names=""/></text:p>
          </draw:text-box>
          <svg:title/>
          <svg:desc/>
        </draw:frame>
        <draw:custom-shape svg:x="0.54278in" svg:y="2.93314in" svg:width="0.28173in" svg:height="0.28173in" draw:id="id334" draw:style-name="a2416" draw:name="Oval 15">
          <svg:title/>
          <svg:desc/>
          <text:p text:style-name="a2415" text:class-names="" text:cond-style-name=""><text:span text:style-name="a24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1085in" svg:y="2.93314in" svg:width="0.28173in" svg:height="0.28173in" draw:id="id335" draw:style-name="a2419" draw:name="Oval 16">
          <svg:title/>
          <svg:desc/>
          <text:p text:style-name="a2418" text:class-names="" text:cond-style-name=""><text:span text:style-name="a24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6802in" svg:y="2.93314in" svg:width="0.28173in" svg:height="0.28173in" draw:id="id336" draw:style-name="a2422" draw:name="Oval 17">
          <svg:title/>
          <svg:desc/>
          <text:p text:style-name="a2421" text:class-names="" text:cond-style-name=""><text:span text:style-name="a242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37" draw:style-name="a2432" draw:name="TextBox 18" svg:x="2.52765in" svg:y="1.5904in" svg:width="3.40922in" svg:height="1.75026in">
          <draw:text-box>
            <text:list text:style-name="a2425">
              <text:list-item>
                <text:p text:style-name="a2424" text:class-names="" text:cond-style-name=""><text:span text:style-name="a2423" text:class-names="">$600 billion/year</text:span></text:p>
              </text:list-item>
            </text:list>
            <text:list text:style-name="a2428">
              <text:list-item>
                <text:p text:style-name="a2427" text:class-names="" text:cond-style-name=""><text:span text:style-name="a2426" text:class-names="">23% of federal contract dollars are intended for small businesses</text:span></text:p>
              </text:list-item>
            </text:list>
            <text:list text:style-name="a2431">
              <text:list-item>
                <text:p text:style-name="a2430" text:class-names="" text:cond-style-name=""><text:span text:style-name="a2429" text:class-names=""/></text:p>
              </text:list-item>
            </text:list>
          </draw:text-box>
          <svg:title/>
          <svg:desc/>
        </draw:frame>
        <draw:custom-shape svg:x="6.29024in" svg:y="2.19757in" svg:width="2.93056in" svg:height="0.89566in" draw:id="id340" draw:style-name="a2438" draw:name="Chevron 22">
          <svg:title/>
          <svg:desc/>
          <text:p text:style-name="a2434" text:class-names="" text:cond-style-name="" text:id="id338"><text:span text:style-name="a2433" text:class-names="">Full and Open<text:s text:c="1"/></text:span></text:p>
          <text:p text:style-name="a2437" text:class-names="" text:cond-style-name="" text:id="id339"><text:span text:style-name="a2435" text:class-names="">Competition</text:span><text:span text:style-name="a2436"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1132"/>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custom-shape svg:x="6.54785in" svg:y="3.36222in" svg:width="3.13131in" svg:height="0.89566in" draw:id="id343" draw:style-name="a2444" draw:name="Chevron 24">
          <svg:title/>
          <svg:desc/>
          <text:p text:style-name="a2440" text:class-names="" text:cond-style-name="" text:id="id341"><text:span text:style-name="a2439" text:class-names="">Small Business<text:s text:c="1"/></text:span></text:p>
          <text:p text:style-name="a2443" text:class-names="" text:cond-style-name="" text:id="id342"><text:span text:style-name="a2441" text:class-names="">Set-Asides</text:span><text:span text:style-name="a2442"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1132"/>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custom-shape svg:x="6.90625in" svg:y="4.52833in" svg:width="2.96979in" svg:height="0.89566in" draw:id="id345" draw:style-name="a2447" draw:name="Chevron 26">
          <svg:title/>
          <svg:desc/>
          <text:p text:style-name="a2446" text:class-names="" text:cond-style-name="" text:id="id344"><text:span text:style-name="a2445" text:class-names="">Sole Source</text:span></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1132"/>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frame draw:id="id346" draw:style-name="a2448" draw:name="Content Placeholder 5" svg:x="0.8245in" svg:y="3.89224in" svg:width="5.07056in" svg:height="2.96305in" style:rel-width="scale" style:rel-height="scale">
          <draw:image xlink:href="media/image8.png" xlink:type="simple" xlink:show="embed" xlink:actuate="onLoad"/>
          <svg:title/>
          <svg:desc/>
        </draw:frame>
        <draw:frame draw:id="id347" draw:style-name="a2470" draw:name="TextBox 7" svg:x="3.28227in" svg:y="4.59506in" svg:width="3.19961in" svg:height="1.90173in">
          <draw:text-box>
            <text:p text:style-name="a2452" text:class-names="" text:cond-style-name=""><text:span text:style-name="a2449" text:class-names=""><text:s text:c="1"/></text:span><text:span text:style-name="a2450" text:class-names="">5%<text:s text:c="1"/></text:span><text:span text:style-name="a2451" text:class-names="">small disadvantaged business</text:span></text:p>
            <text:p text:style-name="a2455" text:class-names="" text:cond-style-name=""><text:span text:style-name="a2453" text:class-names=""><text:s text:c="1"/>5%<text:s text:c="1"/></text:span><text:span text:style-name="a2454" text:class-names="">women-owned small business</text:span></text:p>
            <text:p text:style-name="a2458" text:class-names="" text:cond-style-name=""><text:span text:style-name="a2456" text:class-names=""> 5%<text:s text:c="1"/></text:span><text:span text:style-name="a2457" text:class-names="">service-disabled veteran-owned </text:span></text:p>
            <text:p text:style-name="a2460" text:class-names="" text:cond-style-name=""><text:span text:style-name="a2459" text:class-names=""><text:s text:c="9"/>small business</text:span></text:p>
            <text:p text:style-name="a2463" text:class-names="" text:cond-style-name=""><text:span text:style-name="a2461" text:class-names=""><text:s text:c="1"/>3%<text:s text:c="1"/></text:span><text:span text:style-name="a2462" text:class-names="">HUBZone small business</text:span></text:p>
            <text:p text:style-name="a2467" text:class-names="" text:cond-style-name=""><text:span text:style-name="a2464" text:class-names=""><text:s text:c="1"/></text:span><text:span text:style-name="a2465" text:class-names="">5%<text:s text:c="1"/></text:span><text:span text:style-name="a2466" text:class-names="">“Other” Small Businesses</text:span></text:p>
            <text:p text:style-name="a2469" text:class-names="" text:cond-style-name=""><text:span text:style-name="a2468" text:class-names=""/></text:p>
          </draw:text-box>
          <svg:title/>
          <svg:desc/>
        </draw:frame>
        <draw:frame draw:id="id348" draw:style-name="a2474" draw:name="TextBox 8" svg:x="3.39761in" svg:y="6.41678in" svg:width="4.09961in" svg:height="0.53854in">
          <draw:text-box>
            <text:p text:style-name="a2473" text:class-names="" text:cond-style-name=""><text:span text:style-name="a2471" text:class-names="">Note:<text:s text:c="1"/></text:span><text:span text:style-name="a2472" text:class-names="">Some small businesses may be eligible for awards in multiple contracting categories</text:span></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0" presentation:preset-sub-type="0" presentation:preset-class="entrance" presentation:group-id="0" smil:begin="0.0s" smil:fill="hold">
                  <anim:set smil:targetElement="id340" smil:attributeName="visibility" smil:to="visible" smil:begin="0.0s" smil:dur="0.00100000004749745s" smil:fill="hold"/>
                  <anim:transitionFilter smil:targetElement="id340" smil:type="fade" smil:subtype="crossfade" smil:dur="0.5s"/>
                </anim:par>
                <anim:par presentation:node-type="with-previous" presentation:preset-id="10" presentation:preset-sub-type="0" presentation:preset-class="entrance" presentation:group-id="0" smil:begin="0.0s" smil:fill="hold">
                  <anim:set smil:targetElement="id343" smil:attributeName="visibility" smil:to="visible" smil:begin="0.0s" smil:dur="0.00100000004749745s" smil:fill="hold"/>
                  <anim:transitionFilter smil:targetElement="id343" smil:type="fade" smil:subtype="crossfade" smil:dur="0.5s"/>
                </anim:par>
                <anim:par presentation:node-type="with-previous" presentation:preset-id="10" presentation:preset-sub-type="0" presentation:preset-class="entrance" presentation:group-id="0" smil:begin="0.0s" smil:fill="hold">
                  <anim:set smil:targetElement="id345" smil:attributeName="visibility" smil:to="visible" smil:begin="0.0s" smil:dur="0.00100000004749745s" smil:fill="hold"/>
                  <anim:transitionFilter smil:targetElement="id345" smil:type="fade" smil:subtype="crossfade" smil:dur="0.5s"/>
                </anim:par>
              </anim:par>
            </anim:par>
          </anim:seq>
        </anim:par>
        <presentation:notes draw:style-name="a2517">
          <draw:page-thumbnail draw:page-number="16" svg:x="1.54688in" svg:y="1.27083in" svg:width="4.57292in" svg:height="3.43056in" presentation:class="page" draw:id="id349" presentation:style-name="a2475" draw:name="Slide Image Placeholder 1">
            <svg:title/>
            <svg:desc/>
          </draw:page-thumbnail>
          <draw:frame draw:id="id350" presentation:style-name="a2516" draw:name="Notes Placeholder 2" svg:x="0.76667in" svg:y="4.89271in" svg:width="6.13333in" svg:height="4.00313in" presentation:class="notes" presentation:placeholder="false">
            <draw:text-box>
              <text:p text:style-name="a2477" text:class-names="" text:cond-style-name=""><text:span text:style-name="a2476" text:class-names="">Instructor Notes:</text:span></text:p>
              <text:p text:style-name="a2479" text:class-names="" text:cond-style-name=""><text:span text:style-name="a2478" text:class-names="">When we talk about contracting with the U.S. Government, it’s important to understand just how massive this marketplace is. The federal government is the largest purchaser of goods and services in the world, spending more than $600 billion every year—$615 billion in FY24 alone—across both military and civilian agencies.</text:span></text:p>
              <text:p text:style-name="a2481" text:class-names="" text:cond-style-name=""><text:span text:style-name="a2480" text:class-names=""> </text:span></text:p>
              <text:p text:style-name="a2483" text:class-names="" text:cond-style-name=""><text:span text:style-name="a2482" text:class-names="">Now, the Small Business Administration ensures that at least 23% of all prime contracts are awarded to small businesses, creating significant opportunities for companies like yours.</text:span></text:p>
              <text:p text:style-name="a2485" text:class-names="" text:cond-style-name=""><text:span text:style-name="a2484" text:class-names=""> </text:span></text:p>
              <text:p text:style-name="a2487" text:class-names="" text:cond-style-name=""><text:span text:style-name="a2486" text:class-names="">Within that, there are also targeted set-aside and acquisition goals designed to make sure different categories of small businesses can compete:</text:span></text:p>
              <text:p text:style-name="a2489" text:class-names="" text:cond-style-name=""><text:span text:style-name="a2488" text:class-names=""> </text:span></text:p>
              <text:p text:style-name="a2491" text:class-names="" text:cond-style-name=""><text:span text:style-name="a2490" text:class-names="">Small Disadvantaged Businesses, including those in the 8(a) Program – 5%<text:line-break/>Women-Owned Small Businesses – 5%</text:span></text:p>
              <text:p text:style-name="a2493" text:class-names="" text:cond-style-name=""><text:span text:style-name="a2492" text:class-names="">Service-Disabled Veteran-Owned Small Businesses – 5%<text:line-break/>Historically Underutilized Business Zone, or HUBZone firms – 3%</text:span></text:p>
              <text:p text:style-name="a2495" text:class-names="" text:cond-style-name=""><text:span text:style-name="a2494" text:class-names="">“Other” small business – 5%</text:span></text:p>
              <text:p text:style-name="a2497" text:class-names="" text:cond-style-name=""><text:span text:style-name="a2496" text:class-names=""> </text:span></text:p>
              <text:p text:style-name="a2499" text:class-names="" text:cond-style-name=""><text:span text:style-name="a2498" text:class-names="">A small business can be certified in multiple categories if eligible, which increases your chances of pursuing contracts.</text:span></text:p>
              <text:p text:style-name="a2501" text:class-names="" text:cond-style-name=""><text:span text:style-name="a2500" text:class-names=""> </text:span></text:p>
              <text:p text:style-name="a2505" text:class-names="" text:cond-style-name=""><text:span text:style-name="a2502" text:class-names="">Now, what exactly are </text:span><text:span text:style-name="a2503" text:class-names="">set asides</text:span><text:span text:style-name="a2504" text:class-names="">? These are contracts that are reserved for small business competition specifically those valued between the Micro-Purchase Threshold and the Simplified Acquisition Threshold.</text:span></text:p>
              <text:p text:style-name="a2507" text:class-names="" text:cond-style-name=""><text:span text:style-name="a2506" text:class-names="">And when it comes to how contracts are awarded, there are three main methods of competition to keep in mind:</text:span></text:p>
              <text:p text:style-name="a2509" text:class-names="" text:cond-style-name=""><text:span text:style-name="a2508" text:class-names="">Full and Open Competition, where everyone can bid.</text:span></text:p>
              <text:p text:style-name="a2511" text:class-names="" text:cond-style-name=""><text:span text:style-name="a2510" text:class-names="">Small Business Set-Asides, which include socio-economic certification categories.</text:span></text:p>
              <text:p text:style-name="a2513" text:class-names="" text:cond-style-name=""><text:span text:style-name="a2512" text:class-names="">Sole Source Awards, which allow agencies to award directly to a qualified contractor when certain conditions apply.</text:span></text:p>
              <text:p text:style-name="a2515" text:class-names="" text:cond-style-name=""><text:span text:style-name="a2514" text:class-names="">These methods, especially set-asides and sole source options—are designed to limit competition in a way that gives small businesses a fair shot at securing contracts in this very large marketplace.</text:span></text:p>
            </draw:text-box>
            <svg:title/>
            <svg:desc/>
          </draw:frame>
        </presentation:notes>
      </draw:page>
      <draw:page draw:name="Slide16" draw:style-name="a2518" draw:master-page-name="Master1-Layout18-cust-Horizontal-Icon,-Header,-Paragraph" presentation:presentation-page-layout-name="Master1-PPL18" draw:id="Slide-271">
        <draw:frame draw:id="id351" presentation:style-name="a2526" draw:name="Text Placeholder 5" svg:x="2.66809in" svg:y="4.12431in" svg:width="2.23589in" svg:height="2.12712in" presentation:class="outline" presentation:placeholder="false">
          <draw:text-box>
            <text:list text:style-name="a2522">
              <text:list-item>
                <text:p text:style-name="a2521" text:class-names="" text:cond-style-name=""><text:span text:style-name="a2519" text:class-names="">Find your niche</text:span><text:span text:style-name="a2520" text:class-names="">, competition is fierce</text:span></text:p>
              </text:list-item>
            </text:list>
            <text:list text:style-name="a2525">
              <text:list-item>
                <text:p text:style-name="a2524" text:class-names="" text:cond-style-name=""><text:span text:style-name="a2523" text:class-names=""/></text:p>
              </text:list-item>
            </text:list>
          </draw:text-box>
          <svg:title/>
          <svg:desc/>
        </draw:frame>
        <draw:frame draw:id="id352" presentation:style-name="a2538" draw:name="Text Placeholder 8" svg:x="0.26565in" svg:y="4.11349in" svg:width="2.23589in" svg:height="2.12712in" presentation:class="outline" presentation:placeholder="false">
          <draw:text-box>
            <text:list text:style-name="a2529">
              <text:list-item>
                <text:p text:style-name="a2528" text:class-names="" text:cond-style-name=""><text:span text:style-name="a2527" text:class-names="">Know what agencies<text:s text:c="1"/></text:span></text:p>
              </text:list-item>
            </text:list>
            <text:list text:style-name="a2534">
              <text:list-item>
                <text:p text:style-name="a2533" text:class-names="" text:cond-style-name=""><text:span text:style-name="a2530" text:class-names="">buy your<text:s text:c="1"/></text:span><text:span text:style-name="a2531" text:class-names="">products and services</text:span><text:span text:style-name="a2532" text:class-names=""><text:s text:c="1"/></text:span></text:p>
              </text:list-item>
            </text:list>
            <text:list text:style-name="a2537">
              <text:list-item>
                <text:p text:style-name="a2536" text:class-names="" text:cond-style-name=""><text:span text:style-name="a2535" text:class-names=""/></text:p>
              </text:list-item>
            </text:list>
          </draw:text-box>
          <svg:title/>
          <svg:desc/>
        </draw:frame>
        <draw:frame draw:id="id353" presentation:style-name="a2548" draw:name="Text Placeholder 11" svg:x="7.32446in" svg:y="4.12431in" svg:width="2.26138in" svg:height="2.12712in" presentation:class="outline" presentation:placeholder="false">
          <draw:text-box>
            <text:list text:style-name="a2544">
              <text:list-item>
                <text:p text:style-name="a2543" text:class-names="" text:cond-style-name=""><text:span text:style-name="a2539" text:class-names="">Know your<text:s text:c="1"/></text:span><text:span text:style-name="a2540" text:class-names="">competition</text:span><text:span text:style-name="a2541" text:class-names=""><text:s text:c="1"/>and their contracts</text:span><text:span text:style-name="a2542" text:class-names=""/></text:p>
              </text:list-item>
            </text:list>
            <text:list text:style-name="a2547">
              <text:list-item>
                <text:p text:style-name="a2546" text:class-names="" text:cond-style-name=""><text:span text:style-name="a2545" text:class-names=""/></text:p>
              </text:list-item>
            </text:list>
          </draw:text-box>
          <svg:title/>
          <svg:desc/>
        </draw:frame>
        <draw:frame draw:id="id354" presentation:style-name="a2557" draw:name="Text Placeholder 14" svg:x="5.07053in" svg:y="4.12431in" svg:width="2.25393in" svg:height="2.12712in" presentation:class="outline" presentation:placeholder="false">
          <draw:text-box>
            <text:list text:style-name="a2553">
              <text:list-item>
                <text:p text:style-name="a2552" text:class-names="" text:cond-style-name=""><text:span text:style-name="a2549" text:class-names="">Understand areas of<text:s text:c="1"/></text:span><text:span text:style-name="a2550" text:class-names="">government spending</text:span><text:span text:style-name="a2551" text:class-names=""/></text:p>
              </text:list-item>
            </text:list>
            <text:list text:style-name="a2556">
              <text:list-item>
                <text:p text:style-name="a2555" text:class-names="" text:cond-style-name=""><text:span text:style-name="a2554" text:class-names=""/></text:p>
              </text:list-item>
            </text:list>
          </draw:text-box>
          <svg:title/>
          <svg:desc/>
        </draw:frame>
        <draw:frame draw:id="id355" draw:style-name="a2560" draw:name="Slide Number Placeholder 2" svg:x="4.89868in" svg:y="6.77418in" svg:width="0.51437in" svg:height="0.39931in">
          <draw:text-box>
            <text:p text:style-name="a2559" text:class-names="" text:cond-style-name=""><text:span text:style-name="a2558" text:class-names=""><text:page-number style:num-format="1" text:fixed="false"/></text:span></text:p>
          </draw:text-box>
          <svg:title/>
          <svg:desc/>
        </draw:frame>
        <draw:frame draw:id="id356" presentation:style-name="a2561" draw:name="Picture Placeholder 17" svg:x="0.57203in" svg:y="2.4925in" svg:width="1.18229in" svg:height="1.24784in" style:rel-width="scale" style:rel-height="scale" presentation:class="graphic" presentation:placeholder="false">
          <draw:image xlink:href="media/image9.png" xlink:type="simple" xlink:show="embed" xlink:actuate="onLoad"/>
          <svg:title/>
          <svg:desc>Icon of a lightbulb.</svg:desc>
        </draw:frame>
        <draw:frame draw:id="id357" presentation:style-name="a2562" draw:name="Picture Placeholder 18" svg:x="2.86853in" svg:y="2.38814in" svg:width="1.38288in" svg:height="1.45656in" style:rel-width="scale" style:rel-height="scale" presentation:class="graphic" presentation:placeholder="false">
          <draw:image xlink:href="media/image10.png" xlink:type="simple" xlink:show="embed" xlink:actuate="onLoad"/>
          <svg:title/>
          <svg:desc>Icon of discussion.</svg:desc>
        </draw:frame>
        <draw:frame draw:id="id358" presentation:style-name="a2563" draw:name="Picture Placeholder 19" svg:x="5.50605in" svg:y="2.4925in" svg:width="1.38288in" svg:height="1.45656in" style:rel-width="scale" style:rel-height="scale" presentation:class="graphic" presentation:placeholder="false">
          <draw:image xlink:href="media/image11.png" xlink:type="simple" xlink:show="embed" xlink:actuate="onLoad"/>
          <svg:title/>
          <svg:desc>Icon of a piggy bank.</svg:desc>
        </draw:frame>
        <draw:frame draw:id="id359" presentation:style-name="a2564" draw:name="Picture Placeholder 20" svg:x="7.92962in" svg:y="2.64741in" svg:width="1.38288in" svg:height="1.45656in" style:rel-width="scale" style:rel-height="scale" presentation:class="graphic" presentation:placeholder="false">
          <draw:image xlink:href="media/image12.png" xlink:type="simple" xlink:show="embed" xlink:actuate="onLoad"/>
          <svg:title/>
          <svg:desc>Icon of a checklist.</svg:desc>
        </draw:frame>
        <draw:frame draw:id="id360" draw:style-name="a2567" draw:name="Title 1" svg:x="0.6875in" svg:y="0.40311in" svg:width="8.625in" svg:height="0.65497in">
          <draw:text-box>
            <text:p text:style-name="a2566" text:class-names="" text:cond-style-name=""><text:span text:style-name="a2565" text:class-names="">Government Contracting</text:span></text:p>
          </draw:text-box>
          <svg:title/>
          <svg:desc/>
        </draw:frame>
        <draw:frame draw:id="id361" draw:style-name="a2570" draw:name="Content Placeholder 1" svg:x="0.43017in" svg:y="1.41656in" svg:width="9.45139in" svg:height="0.65497in">
          <draw:text-box>
            <text:p text:style-name="a2569" text:class-names="" text:cond-style-name=""><text:span text:style-name="a2568" text:class-names="">Research Your Market</text:span></text:p>
          </draw:text-box>
          <svg:title/>
          <svg:desc/>
        </draw:frame>
        <presentation:notes draw:style-name="a2600">
          <draw:page-thumbnail draw:page-number="17" svg:x="1.54688in" svg:y="1.27083in" svg:width="4.57292in" svg:height="3.43056in" presentation:class="page" draw:id="id362" presentation:style-name="a2571" draw:name="Slide Image Placeholder 1">
            <svg:title/>
            <svg:desc/>
          </draw:page-thumbnail>
          <draw:frame draw:id="id363" presentation:style-name="a2599" draw:name="Notes Placeholder 2" svg:x="0.76667in" svg:y="4.89271in" svg:width="6.13333in" svg:height="4.00313in" presentation:class="notes" presentation:placeholder="false">
            <draw:text-box>
              <text:p text:style-name="a2573" text:class-names="" text:cond-style-name=""><text:span text:style-name="a2572" text:class-names="">Instructor Notes:</text:span></text:p>
              <text:p text:style-name="a2575" text:class-names="" text:cond-style-name=""><text:span text:style-name="a2574" text:class-names=""/></text:p>
              <text:p text:style-name="a2578" text:class-names="" text:cond-style-name=""><text:span text:style-name="a2576" text:class-names="">Contracting officers have requirements for the business to have a marketing plan and/or strategy to proactively self-market their programs or services in order to succeed in the program.</text:span><text:span text:style-name="a2577" text:class-names=""/></text:p>
              <text:list text:style-name="a2581">
                <text:list-item>
                  <text:p text:style-name="a2580" text:class-names="" text:cond-style-name=""><text:span text:style-name="a2579" text:class-names="">Determine which federal agencies buy your product/service and get to know them.<text:s text:c="1"/></text:span></text:p>
                </text:list-item>
              </text:list>
              <text:list text:style-name="a2584">
                <text:list-item>
                  <text:p text:style-name="a2583" text:class-names="" text:cond-style-name=""><text:span text:style-name="a2582" text:class-names="">Identify the contracting procedures of those agencies and the personnel who make buying decisions.<text:s text:c="1"/></text:span></text:p>
                </text:list-item>
              </text:list>
              <text:list text:style-name="a2587">
                <text:list-item>
                  <text:p text:style-name="a2586" text:class-names="" text:cond-style-name=""><text:span text:style-name="a2585" text:class-names="">Focus on opportunities in your niche and prioritize.<text:s text:c="1"/></text:span></text:p>
                </text:list-item>
              </text:list>
              <text:list text:style-name="a2590">
                <text:list-item>
                  <text:p text:style-name="a2589" text:class-names="" text:cond-style-name=""><text:span text:style-name="a2588" text:class-names="">Make contacts—attend small business events and network your business to gain exposure to key agencies.<text:s text:c="1"/></text:span></text:p>
                </text:list-item>
              </text:list>
              <text:list text:style-name="a2593">
                <text:list-item>
                  <text:p text:style-name="a2592" text:class-names="" text:cond-style-name=""><text:span text:style-name="a2591" text:class-names="">Find out if your target agencies require you to register in their database in order to do business with them.<text:s text:c="1"/></text:span></text:p>
                </text:list-item>
              </text:list>
              <text:list text:style-name="a2596">
                <text:list-item>
                  <text:p text:style-name="a2595" text:class-names="" text:cond-style-name=""><text:span text:style-name="a2594" text:class-names="">Registering your business is not enough to obtain a federal contract: ultimately you are responsible for your own success and you will need to market your business to attract attention from federal agencies.<text:s text:c="1"/></text:span></text:p>
                </text:list-item>
              </text:list>
              <text:p text:style-name="a2598" text:class-names="" text:cond-style-name=""><text:span text:style-name="a2597" text:class-names=""/></text:p>
            </draw:text-box>
            <svg:title/>
            <svg:desc/>
          </draw:frame>
        </presentation:notes>
      </draw:page>
      <draw:page draw:name="Slide17" draw:style-name="a2601" draw:master-page-name="Master1-Layout9-cust-Title-only" presentation:presentation-page-layout-name="Master1-PPL9" draw:id="Slide-272">
        <draw:frame draw:id="id364" draw:style-name="a2604" draw:name="Slide Number Placeholder 13" svg:x="4.89868in" svg:y="6.77418in" svg:width="0.51437in" svg:height="0.39931in">
          <draw:text-box>
            <text:p text:style-name="a2603" text:class-names="" text:cond-style-name=""><text:span text:style-name="a2602" text:class-names=""><text:page-number style:num-format="1" text:fixed="false"/></text:span></text:p>
          </draw:text-box>
          <svg:title/>
          <svg:desc/>
        </draw:frame>
        <draw:frame draw:id="id365" presentation:style-name="a2607" draw:name="Title 15" svg:x="1.30303in" svg:y="0.40138in" svg:width="7.2018in" svg:height="0.79856in" presentation:class="title" presentation:placeholder="false">
          <draw:text-box>
            <text:p text:style-name="a2606" text:class-names="" text:cond-style-name=""><text:span text:style-name="a2605" text:class-names="">Government Contracting</text:span></text:p>
          </draw:text-box>
          <svg:title/>
          <svg:desc/>
        </draw:frame>
        <draw:custom-shape svg:x="0.56095in" svg:y="1.29167in" svg:width="8.625in" svg:height="0.65497in" draw:id="id371" draw:style-name="a2623" draw:name="Rectangle 16">
          <svg:title/>
          <svg:desc/>
          <text:p text:style-name="a2610" text:class-names="" text:cond-style-name="" text:id="id366"><text:span text:style-name="a2608" text:class-names=""><text:a xlink:href="https://www.apexaccelerators.us/#/" text:style-name="" text:visited-style-name="">APEX Accelerators<text:s text:c="1"/></text:a></text:span><text:span text:style-name="a2609" text:class-names="">(formerly Procurement Technical Assistance Centers)<text:s text:c="1"/></text:span></text:p>
          <text:list text:style-name="a2613">
            <text:list-item>
              <text:p text:style-name="a2612" text:class-names="" text:cond-style-name="" text:id="id367"><text:span text:style-name="a2611" text:class-names="">Government contract assistance</text:span></text:p>
            </text:list-item>
          </text:list>
          <text:list text:style-name="a2616">
            <text:list-item>
              <text:p text:style-name="a2615" text:class-names="" text:cond-style-name="" text:id="id368"><text:span text:style-name="a2614" text:class-names="">Consulting and workshops<text:s text:c="1"/></text:span></text:p>
            </text:list-item>
          </text:list>
          <text:list text:style-name="a2619">
            <text:list-item>
              <text:p text:style-name="a2618" text:class-names="" text:cond-style-name="" text:id="id369"><text:span text:style-name="a2617" text:class-names="">Information and resources</text:span></text:p>
            </text:list-item>
          </text:list>
          <text:list text:style-name="a2622">
            <text:list-item>
              <text:p text:style-name="a2621" text:class-names="" text:cond-style-name="" text:id="id370"><text:span text:style-name="a2620" text:class-names=""/></text:p>
            </text:list-item>
          </text:list>
          <draw:enhanced-geometry xmlns:dr3d="urn:oasis:names:tc:opendocument:xmlns:dr3d:1.0" draw:type="non-primitive" svg:viewBox="0 0 21600 21600" draw:enhanced-path="M 0 0 L 21600 0 21600 21600 0 21600 Z N"/>
        </draw:custom-shape>
        <draw:custom-shape svg:x="0.56095in" svg:y="3.2795in" svg:width="5.81608in" svg:height="1.81931in" draw:id="id377" draw:style-name="a2639" draw:name="Rectangle 17">
          <svg:title/>
          <svg:desc/>
          <text:p text:style-name="a2625" text:class-names="" text:cond-style-name="" text:id="id372"><text:span text:style-name="a2624" text:class-names="">Marketing Resources</text:span></text:p>
          <text:list text:style-name="a2629">
            <text:list-item>
              <text:p text:style-name="a2628" text:class-names="" text:cond-style-name="" text:id="id373"><text:span text:style-name="a2626" text:class-names=""><text:a xlink:href="https://sam.gov/content/home" text:style-name="" text:visited-style-name="">System for Award Management (sam.gov)</text:a></text:span><text:span text:style-name="a2627" text:class-names=""/></text:p>
            </text:list-item>
          </text:list>
          <text:list text:style-name="a2633">
            <text:list-item>
              <text:p text:style-name="a2632" text:class-names="" text:cond-style-name="" text:id="id374"><text:span text:style-name="a2630" text:class-names=""><text:a xlink:href="https://web.sba.gov/pro-net/search/dsp_dsbs.cfm" text:style-name="" text:visited-style-name="">Dynamic Small Business Search System</text:a></text:span><text:span text:style-name="a2631" text:class-names=""/></text:p>
            </text:list-item>
          </text:list>
          <text:p text:style-name="a2635" text:class-names="" text:cond-style-name="" text:id="id375"><text:span text:style-name="a2634" text:class-names=""/></text:p>
          <text:list text:style-name="a2638">
            <text:list-item>
              <text:p text:style-name="a2637" text:class-names="" text:cond-style-name="" text:id="id376"><text:span text:style-name="a2636" text:class-names=""/></text:p>
            </text:list-item>
          </text:list>
          <draw:enhanced-geometry xmlns:dr3d="urn:oasis:names:tc:opendocument:xmlns:dr3d:1.0" draw:type="non-primitive" svg:viewBox="0 0 21600 21600" draw:enhanced-path="M 0 0 L 21600 0 21600 21600 0 21600 Z N"/>
        </draw:custom-shape>
        <draw:custom-shape svg:x="0.56095in" svg:y="4.92405in" svg:width="4.63303in" svg:height="1.54449in" draw:id="id382" draw:style-name="a2653" draw:name="Rectangle 18">
          <svg:title/>
          <svg:desc/>
          <text:p text:style-name="a2641" text:class-names="" text:cond-style-name="" text:id="id378"><text:span text:style-name="a2640" text:class-names="">Other Resources</text:span></text:p>
          <text:list text:style-name="a2645">
            <text:list-item>
              <text:p text:style-name="a2644" text:class-names="" text:cond-style-name="" text:id="id379"><text:span text:style-name="a2642" text:class-names=""><text:a xlink:href="https://www.usaspending.gov/" text:style-name="" text:visited-style-name="">USASpending</text:a></text:span><text:span text:style-name="a2643" text:class-names=""/></text:p>
            </text:list-item>
          </text:list>
          <text:list text:style-name="a2649">
            <text:list-item>
              <text:p text:style-name="a2648" text:class-names="" text:cond-style-name="" text:id="id380"><text:span text:style-name="a2646" text:class-names=""><text:a xlink:href="https://www.gsa.gov/small-business/find-and-pursue-government-contracts/seek-opportunities/subcontracting-directory-for-small-businesses" text:style-name="" text:visited-style-name="">GSA Subcontracting Directory</text:a></text:span><text:span text:style-name="a2647" text:class-names=""/></text:p>
            </text:list-item>
          </text:list>
          <text:list text:style-name="a2652">
            <text:list-item>
              <text:p text:style-name="a2651" text:class-names="" text:cond-style-name="" text:id="id381"><text:span text:style-name="a2650" text:class-names="">DoD Prime Contracting Directory</text:span></text:p>
            </text:list-item>
          </text:list>
          <draw:enhanced-geometry xmlns:dr3d="urn:oasis:names:tc:opendocument:xmlns:dr3d:1.0" draw:type="non-primitive" svg:viewBox="0 0 21600 21600" draw:enhanced-path="M 0 0 L 21600 0 21600 21600 0 21600 Z N"/>
        </draw:custom-shape>
        <draw:frame draw:id="id383" draw:style-name="a2654" draw:name="Picture 19" svg:x="6.56285in" svg:y="1.96001in" svg:width="2.55024in" svg:height="0.90522in" style:rel-width="scale" style:rel-height="scale">
          <draw:image xlink:href="media/image13.png" xlink:type="simple" xlink:show="embed" xlink:actuate="onLoad"/>
          <svg:title/>
          <svg:desc/>
        </draw:frame>
        <draw:frame draw:id="id384" draw:style-name="a2655" draw:name="Picture 8" svg:x="7.16435in" svg:y="3.75378in" svg:width="2.37838in" svg:height="0.92536in" style:rel-width="scale" style:rel-height="scale">
          <draw:image xlink:href="media/image14.png" xlink:type="simple" xlink:show="embed" xlink:actuate="onLoad"/>
          <svg:title/>
          <svg:desc>sam.gov logo</svg:desc>
        </draw:frame>
        <draw:frame draw:id="id385" draw:style-name="a2656" draw:name="Picture 4" svg:x="6.29773in" svg:y="4.00927in" svg:width="0.62143in" svg:height="0.6in" style:rel-width="scale" style:rel-height="scale">
          <draw:image xlink:href="media/image15.png" xlink:type="simple" xlink:show="embed" xlink:actuate="onLoad"/>
          <svg:title/>
          <svg:desc>logo</svg:desc>
        </draw:frame>
        <draw:frame draw:id="id386" draw:style-name="a2657" draw:name="Picture 22" svg:x="8.52886in" svg:y="5.54637in" svg:width="0.7in" svg:height="0.7in" style:rel-width="scale" style:rel-height="scale">
          <draw:image xlink:href="media/image16.jpeg" xlink:type="simple" xlink:show="embed" xlink:actuate="onLoad"/>
          <svg:title/>
          <svg:desc>GSA logo</svg:desc>
        </draw:frame>
        <draw:frame draw:id="id387" draw:style-name="a2658" draw:name="Picture 23" svg:x="5.57021in" svg:y="5.74637in" svg:width="2.78333in" svg:height="0.3in" style:rel-width="scale" style:rel-height="scale">
          <draw:image xlink:href="media/image17.png" xlink:type="simple" xlink:show="embed" xlink:actuate="onLoad"/>
          <svg:title/>
          <svg:desc>USA Pending.GOV logo</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entrance" presentation:group-id="0" smil:begin="0.75s" smil:fill="hold">
                  <anim:set smil:targetElement="id37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37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382" smil:attributeName="visibility" smil:to="visible" smil:begin="0.0s" smil:dur="0.00100000004749745s" smil:fill="hold"/>
                </anim:par>
              </anim:par>
              <anim:par smil:begin="0.0s" smil:fill="hold">
                <anim:par presentation:node-type="after-previous" presentation:preset-id="1" presentation:preset-sub-type="0" presentation:preset-class="entrance" smil:begin="1.0s" smil:fill="hold">
                  <anim:set smil:targetElement="id383" smil:attributeName="visibility" smil:to="visible" smil:begin="0.0s" smil:dur="0.00100000004749745s" smil:fill="hold"/>
                </anim:par>
                <anim:par presentation:node-type="with-previous" presentation:preset-id="1" presentation:preset-sub-type="0" presentation:preset-class="entrance" smil:begin="1.0s" smil:fill="hold">
                  <anim:set smil:targetElement="id384" smil:attributeName="visibility" smil:to="visible" smil:begin="0.0s" smil:dur="0.00100000004749745s" smil:fill="hold"/>
                </anim:par>
                <anim:par presentation:node-type="with-previous" presentation:preset-id="1" presentation:preset-sub-type="0" presentation:preset-class="entrance" smil:begin="1.0s" smil:fill="hold">
                  <anim:set smil:targetElement="id385" smil:attributeName="visibility" smil:to="visible" smil:begin="0.0s" smil:dur="0.00100000004749745s" smil:fill="hold"/>
                </anim:par>
                <anim:par presentation:node-type="with-previous" presentation:preset-id="1" presentation:preset-sub-type="0" presentation:preset-class="entrance" smil:begin="1.0s" smil:fill="hold">
                  <anim:set smil:targetElement="id386" smil:attributeName="visibility" smil:to="visible" smil:begin="0.0s" smil:dur="0.00100000004749745s" smil:fill="hold"/>
                </anim:par>
              </anim:par>
              <anim:par smil:begin="1.0s" smil:fill="hold">
                <anim:par presentation:node-type="after-previous" presentation:preset-id="1" presentation:preset-sub-type="0" presentation:preset-class="entrance" smil:begin="1.0s" smil:fill="hold">
                  <anim:set smil:targetElement="id387" smil:attributeName="visibility" smil:to="visible" smil:begin="0.0s" smil:dur="0.00100000004749745s" smil:fill="hold"/>
                </anim:par>
              </anim:par>
            </anim:par>
          </anim:seq>
        </anim:par>
        <presentation:notes draw:style-name="a2698">
          <draw:page-thumbnail draw:page-number="18" svg:x="1.54688in" svg:y="1.27083in" svg:width="4.57292in" svg:height="3.43056in" presentation:class="page" draw:id="id388" presentation:style-name="a2659" draw:name="Slide Image Placeholder 1">
            <svg:title/>
            <svg:desc/>
          </draw:page-thumbnail>
          <draw:frame draw:id="id389" presentation:style-name="a2697" draw:name="Notes Placeholder 2" svg:x="0.76667in" svg:y="4.89271in" svg:width="6.13333in" svg:height="4.00313in" presentation:class="notes" presentation:placeholder="false">
            <draw:text-box>
              <text:p text:style-name="a2661" text:class-names="" text:cond-style-name=""><text:span text:style-name="a2660" text:class-names="">Instructor Notes:</text:span></text:p>
              <text:p text:style-name="a2663" text:class-names="" text:cond-style-name=""><text:span text:style-name="a2662" text:class-names=""/></text:p>
              <text:p text:style-name="a2665" text:class-names="" text:cond-style-name=""><text:span text:style-name="a2664" text:class-names="">Major SBA contracting certifications include:</text:span></text:p>
              <text:p text:style-name="a2667" text:class-names="" text:cond-style-name=""><text:span text:style-name="a2666" text:class-names=""/></text:p>
              <text:list text:style-name="a2670">
                <text:list-item>
                  <text:p text:style-name="a2669" text:class-names="" text:cond-style-name=""><text:span text:style-name="a2668" text:class-names="">Veteran-owned (VOSB) / Service-Disabled Veteran-owned (SDVOSB) Small Business</text:span></text:p>
                </text:list-item>
              </text:list>
              <text:list text:style-name="a2673">
                <text:list-item>
                  <text:p text:style-name="a2672" text:class-names="" text:cond-style-name=""><text:span text:style-name="a2671" text:class-names="">Women-owned Small Business</text:span></text:p>
                </text:list-item>
              </text:list>
              <text:list text:style-name="a2676">
                <text:list-item>
                  <text:p text:style-name="a2675" text:class-names="" text:cond-style-name=""><text:span text:style-name="a2674" text:class-names="">Small Disadvantaged Business</text:span></text:p>
                </text:list-item>
              </text:list>
              <text:list text:style-name="a2679">
                <text:list-item>
                  <text:p text:style-name="a2678" text:class-names="" text:cond-style-name=""><text:span text:style-name="a2677" text:class-names="">8(a) Business Development</text:span></text:p>
                </text:list-item>
              </text:list>
              <text:list text:style-name="a2682">
                <text:list-item>
                  <text:p text:style-name="a2681" text:class-names="" text:cond-style-name=""><text:span text:style-name="a2680" text:class-names="">Historically Underutilized Business Zone (HUBZone)</text:span></text:p>
                </text:list-item>
              </text:list>
              <text:p text:style-name="a2686" text:class-names="" text:cond-style-name=""><text:span text:style-name="a2683" text:class-names="">The 8(a) and HUBZone certifications are the only two where SBA issues a certification. <text:s text:c="1"/>The other certifications are ones that the business can self-certify for in the System For Awards Management (</text:span><text:span text:style-name="a2684" text:class-names="">www.sam.gov</text:span><text:span text:style-name="a2685" text:class-names="">) contracting database.</text:span></text:p>
              <text:p text:style-name="a2688" text:class-names="" text:cond-style-name=""><text:span text:style-name="a2687" text:class-names=""/></text:p>
              <text:list text:style-name="a2691">
                <text:list-item>
                  <text:p text:style-name="a2690" text:class-names="" text:cond-style-name=""><text:span text:style-name="a2689" text:class-names="">Since contracting can be such an important tool in a small business’ development, there are a variety of classes given by SBA resource partners (SBDC, APEX Accelerators, etc.) and at the SBA offices.</text:span></text:p>
                </text:list-item>
              </text:list>
              <text:list text:style-name="a2694">
                <text:list-item>
                  <text:p text:style-name="a2693" text:class-names="" text:cond-style-name=""><text:span text:style-name="a2692" text:class-names="">The SBA’s website at www.sba.gov also often has online contracting training. <text:s text:c="1"/>Class members should contact their local SBA office for more information on contracting training.<text:s text:c="1"/></text:span></text:p>
                </text:list-item>
              </text:list>
              <text:p text:style-name="a2696" text:class-names="" text:cond-style-name=""><text:span text:style-name="a2695" text:class-names=""/></text:p>
            </draw:text-box>
            <svg:title/>
            <svg:desc/>
          </draw:frame>
        </presentation:notes>
      </draw:page>
      <draw:page draw:name="Slide18" draw:style-name="a2699" draw:master-page-name="Master1-Layout8-cust-Title-and-Content-with-Subtitle" presentation:presentation-page-layout-name="Master1-PPL8" draw:id="Slide-273">
        <draw:frame draw:id="id390" presentation:style-name="a2720" draw:name="Content Placeholder 15" svg:x="0.6875in" svg:y="1.87705in" svg:width="8.625in" svg:height="4.71991in" presentation:class="outline" presentation:placeholder="false">
          <draw:text-box>
            <text:list text:style-name="a2704">
              <text:list-item>
                <text:p text:style-name="a2703" text:class-names="" text:cond-style-name=""><text:span text:style-name="a2700" text:class-names="">Customers create<text:s text:c="1"/></text:span><text:span text:style-name="a2701" text:class-names="">market driven opportunities</text:span><text:span text:style-name="a2702" text:class-names=""/></text:p>
              </text:list-item>
            </text:list>
            <text:list text:style-name="a2707">
              <text:list-item>
                <text:p text:style-name="a2706" text:class-names="" text:cond-style-name=""><text:span text:style-name="a2705" text:class-names="">It doesn’t matter what anyone thinks about your concept except customers</text:span></text:p>
              </text:list-item>
            </text:list>
            <text:list text:style-name="a2710">
              <text:list-item>
                <text:list text:style-name="a2710">
                  <text:list-item>
                    <text:p text:style-name="a2709" text:class-names="" text:cond-style-name=""><text:span text:style-name="a2708" text:class-names="">If they don’t care, no one will buy your product</text:span></text:p>
                  </text:list-item>
                </text:list>
              </text:list-item>
            </text:list>
            <text:list text:style-name="a2713">
              <text:list-item>
                <text:p text:style-name="a2712" text:class-names="" text:cond-style-name=""><text:span text:style-name="a2711" text:class-names="">Good quality market research includes gathering information from customers</text:span></text:p>
              </text:list-item>
            </text:list>
            <text:list text:style-name="a2716">
              <text:list-item>
                <text:p text:style-name="a2715" text:class-names="" text:cond-style-name=""><text:span text:style-name="a2714" text:class-names="">Customers can help you refine and perfect your business concept and business model</text:span></text:p>
              </text:list-item>
            </text:list>
            <text:list text:style-name="a2719">
              <text:list-item>
                <text:p text:style-name="a2718" text:class-names="" text:cond-style-name=""><text:span text:style-name="a2717" text:class-names=""/></text:p>
              </text:list-item>
            </text:list>
          </draw:text-box>
          <svg:title/>
          <svg:desc/>
        </draw:frame>
        <draw:frame draw:id="id391" presentation:style-name="a2723" draw:name="Subtitle 16" svg:x="0.6875in" svg:y="1.21634in" svg:width="8.625in" svg:height="0.66071in" presentation:class="subtitle" presentation:placeholder="false">
          <draw:text-box>
            <text:p text:style-name="a2722" text:class-names="" text:cond-style-name=""><text:span text:style-name="a2721" text:class-names="">…It’s all about the Customers</text:span></text:p>
          </draw:text-box>
          <svg:title/>
          <svg:desc/>
        </draw:frame>
        <draw:frame draw:id="id392" draw:style-name="a2726" draw:name="Slide Number Placeholder 13" svg:x="4.89868in" svg:y="6.77418in" svg:width="0.51437in" svg:height="0.39931in">
          <draw:text-box>
            <text:p text:style-name="a2725" text:class-names="" text:cond-style-name=""><text:span text:style-name="a2724" text:class-names=""><text:page-number style:num-format="1" text:fixed="false"/></text:span></text:p>
          </draw:text-box>
          <svg:title/>
          <svg:desc/>
        </draw:frame>
        <draw:frame draw:id="id393" presentation:style-name="a2729" draw:name="Title 14" svg:x="1.30303in" svg:y="0.40138in" svg:width="7.2018in" svg:height="0.79856in" presentation:class="title" presentation:placeholder="false">
          <draw:text-box>
            <text:p text:style-name="a2728" text:class-names="" text:cond-style-name=""><text:span text:style-name="a2727" text:class-names="">Remember…</text:span></text:p>
          </draw:text-box>
          <svg:title/>
          <svg:desc/>
        </draw:frame>
        <presentation:notes draw:style-name="a2746">
          <draw:page-thumbnail draw:page-number="19" svg:x="1.54688in" svg:y="1.27083in" svg:width="4.57292in" svg:height="3.43056in" presentation:class="page" draw:id="id394" presentation:style-name="a2730" draw:name="Slide Image Placeholder 1">
            <svg:title/>
            <svg:desc/>
          </draw:page-thumbnail>
          <draw:frame draw:id="id395" presentation:style-name="a2745" draw:name="Notes Placeholder 2" svg:x="0.76667in" svg:y="4.89271in" svg:width="6.13333in" svg:height="4.00313in" presentation:class="notes" presentation:placeholder="false">
            <draw:text-box>
              <text:p text:style-name="a2732" text:class-names="" text:cond-style-name=""><text:span text:style-name="a2731" text:class-names="">Instructor Notes:</text:span></text:p>
              <text:p text:style-name="a2734" text:class-names="" text:cond-style-name=""><text:span text:style-name="a2733" text:class-names=""/></text:p>
              <text:list text:style-name="a2737">
                <text:list-item>
                  <text:p text:style-name="a2736" text:class-names="" text:cond-style-name=""><text:span text:style-name="a2735" text:class-names="">You have to define who your customer is, focus on their needs, and how your product/service provides them with benefit. Emphasize the point that if the customer doesn’t care or doesn’t want your product/service then you do not have a business.</text:span></text:p>
                </text:list-item>
              </text:list>
              <text:p text:style-name="a2739" text:class-names="" text:cond-style-name=""><text:span text:style-name="a2738" text:class-names=""/></text:p>
              <text:list text:style-name="a2742">
                <text:list-item>
                  <text:p text:style-name="a2741" text:class-names="" text:cond-style-name=""><text:span text:style-name="a2740" text:class-names="">Instructor should mention and emphasize that market research is continuous and does not stop when you launch, it lasts for the duration of the product/service offering<text:s text:c="1"/></text:span></text:p>
                </text:list-item>
              </text:list>
              <text:p text:style-name="a2744" text:class-names="" text:cond-style-name=""><text:span text:style-name="a2743" text:class-names=""/></text:p>
            </draw:text-box>
            <svg:title/>
            <svg:desc/>
          </draw:frame>
        </presentation:notes>
      </draw:page>
      <draw:page draw:name="Slide19" draw:style-name="a2747" draw:master-page-name="Master1-Layout9-cust-Title-only" presentation:presentation-page-layout-name="Master1-PPL9" draw:id="Slide-274">
        <draw:frame draw:id="id396" draw:style-name="a2750" draw:name="Slide Number Placeholder 13" svg:x="4.89868in" svg:y="6.77418in" svg:width="0.51437in" svg:height="0.39931in">
          <draw:text-box>
            <text:p text:style-name="a2749" text:class-names="" text:cond-style-name=""><text:span text:style-name="a2748" text:class-names=""><text:page-number style:num-format="1" text:fixed="false"/></text:span></text:p>
          </draw:text-box>
          <svg:title/>
          <svg:desc/>
        </draw:frame>
        <draw:frame draw:id="id397" presentation:style-name="a2753" draw:name="Title 29" svg:x="1.30303in" svg:y="0.40138in" svg:width="7.2018in" svg:height="0.79856in" presentation:class="title" presentation:placeholder="false">
          <draw:text-box>
            <text:p text:style-name="a2752" text:class-names="" text:cond-style-name=""><text:span text:style-name="a2751" text:class-names="">Key Takeaways</text:span></text:p>
          </draw:text-box>
          <svg:title/>
          <svg:desc/>
        </draw:frame>
        <draw:frame draw:id="id398" draw:style-name="a2768" draw:name="Content Placeholder 2" svg:x="0.6875in" svg:y="1.22743in" svg:width="8.625in" svg:height="5.36979in">
          <draw:text-box>
            <text:list text:style-name="a2756">
              <text:list-item>
                <text:p text:style-name="a2755" text:class-names="" text:cond-style-name=""><text:span text:style-name="a2754" text:class-names="">Analyzing the market will help you determine who is most likely to buy your product or service, and also allows you to determine if there is a sustainable demand</text:span></text:p>
              </text:list-item>
            </text:list>
            <text:list text:style-name="a2759">
              <text:list-item>
                <text:p text:style-name="a2758" text:class-names="" text:cond-style-name=""><text:span text:style-name="a2757" text:class-names="">Analyzing industry is an important part of understanding the attractiveness of your opportunity<text:s text:c="1"/></text:span></text:p>
              </text:list-item>
            </text:list>
            <text:list text:style-name="a2762">
              <text:list-item>
                <text:p text:style-name="a2761" text:class-names="" text:cond-style-name=""><text:span text:style-name="a2760" text:class-names="">Consider the key factors that you need to examine to really understand the industry as well as competitors</text:span></text:p>
              </text:list-item>
            </text:list>
            <text:list text:style-name="a2765">
              <text:list-item>
                <text:p text:style-name="a2764" text:class-names="" text:cond-style-name=""><text:span text:style-name="a2763" text:class-names="">An outcome of this process is to arrive at a competitive strategy that leverages the inherent value of your concept</text:span></text:p>
              </text:list-item>
            </text:list>
            <text:p text:style-name="a2767" text:class-names="" text:cond-style-name=""><text:span text:style-name="a2766" text:class-names=""/></text:p>
          </draw:text-box>
          <svg:title/>
          <svg:desc/>
        </draw:frame>
        <presentation:notes draw:style-name="a2779">
          <draw:page-thumbnail draw:page-number="20" svg:x="1.54688in" svg:y="1.27083in" svg:width="4.57292in" svg:height="3.43056in" presentation:class="page" draw:id="id399" presentation:style-name="a2769" draw:name="Slide Image Placeholder 1">
            <svg:title/>
            <svg:desc/>
          </draw:page-thumbnail>
          <draw:frame draw:id="id400" presentation:style-name="a2778" draw:name="Notes Placeholder 2" svg:x="0.76667in" svg:y="4.89271in" svg:width="6.13333in" svg:height="4.00313in" presentation:class="notes" presentation:placeholder="false">
            <draw:text-box>
              <text:p text:style-name="a2771" text:class-names="" text:cond-style-name=""><text:span text:style-name="a2770" text:class-names="">Key Takeaways Slide:</text:span></text:p>
              <text:p text:style-name="a2773" text:class-names="" text:cond-style-name=""><text:span text:style-name="a2772" text:class-names=""/></text:p>
              <text:p text:style-name="a2775" text:class-names="" text:cond-style-name=""><text:span text:style-name="a2774" text:class-names="">Just read or summarize the points on the slide.</text:span></text:p>
              <text:p text:style-name="a2777" text:class-names="" text:cond-style-name=""><text:span text:style-name="a2776" text:class-names=""/></text:p>
            </draw:text-box>
            <svg:title/>
            <svg:desc/>
          </draw:frame>
        </presentation:notes>
      </draw:page>
      <draw:page draw:name="Slide38" draw:style-name="a2780" draw:master-page-name="Master1-Layout9-cust-Title-only" presentation:presentation-page-layout-name="Master1-PPL9" draw:id="Slide-293">
        <draw:frame draw:id="id401" draw:style-name="a2783" draw:name="Slide Number Placeholder 1" svg:x="4.89868in" svg:y="6.77418in" svg:width="0.51437in" svg:height="0.39931in">
          <draw:text-box>
            <text:p text:style-name="a2782" text:class-names="" text:cond-style-name=""><text:span text:style-name="a2781" text:class-names=""><text:page-number style:num-format="1" text:fixed="false"/></text:span></text:p>
          </draw:text-box>
          <svg:title/>
          <svg:desc/>
        </draw:frame>
        <draw:frame draw:id="id402" presentation:style-name="a2786" draw:name="Title 2" svg:x="1.30303in" svg:y="0.40138in" svg:width="7.2018in" svg:height="0.79856in" presentation:class="title" presentation:placeholder="false">
          <draw:text-box>
            <text:p text:style-name="a2785" text:class-names="" text:cond-style-name=""><text:span text:style-name="a2784" text:class-names="">Filling In YOUR Business Model Canvas…</text:span></text:p>
          </draw:text-box>
          <svg:title/>
          <svg:desc/>
        </draw:frame>
        <draw:frame draw:id="id403" draw:style-name="a2787" draw:name="Picture 4" svg:x="0.07689in" svg:y="0.93922in" svg:width="9.84158in" svg:height="6.55111in" style:rel-width="scale" style:rel-height="scale">
          <draw:image xlink:href="media/image18.PNG" xlink:type="simple" xlink:show="embed" xlink:actuate="onLoad"/>
          <svg:title/>
          <svg:desc>Table

Description automatically generated</svg:desc>
        </draw:frame>
        <draw:custom-shape svg:x="8.0099in" svg:y="1.11881in" svg:width="1.72106in" svg:height="0.65857in" draw:id="id405" draw:style-name="a2790" draw:name="Rectangle 7">
          <svg:title/>
          <svg:desc/>
          <text:p text:style-name="a2789" text:class-names="" text:cond-style-name="" text:id="id404"><text:span text:style-name="a2788" text:class-names=""/></text:p>
          <draw:enhanced-geometry xmlns:dr3d="urn:oasis:names:tc:opendocument:xmlns:dr3d:1.0" draw:type="non-primitive" svg:viewBox="0 0 21600 21600" draw:enhanced-path="M 0 0 L 21600 0 21600 21600 0 21600 Z N"/>
        </draw:custom-shape>
        <draw:custom-shape svg:x="6.07756in" svg:y="1.10727in" svg:width="1.72106in" svg:height="0.79856in" draw:id="id407" draw:style-name="a2793" draw:name="Rectangle 8">
          <svg:title/>
          <svg:desc/>
          <text:p text:style-name="a2792" text:class-names="" text:cond-style-name="" text:id="id406"><text:span text:style-name="a2791" text:class-names=""/></text:p>
          <draw:enhanced-geometry xmlns:dr3d="urn:oasis:names:tc:opendocument:xmlns:dr3d:1.0" draw:type="non-primitive" svg:viewBox="0 0 21600 21600" draw:enhanced-path="M 0 0 L 21600 0 21600 21600 0 21600 Z N"/>
        </draw:custom-shape>
        <draw:custom-shape svg:x="6.08582in" svg:y="3.23432in" svg:width="1.72106in" svg:height="0.63697in" draw:id="id409" draw:style-name="a2796" draw:name="Rectangle 10">
          <svg:title/>
          <svg:desc/>
          <text:p text:style-name="a2795" text:class-names="" text:cond-style-name="" text:id="id408"><text:span text:style-name="a2794" text:class-names=""/></text:p>
          <draw:enhanced-geometry xmlns:dr3d="urn:oasis:names:tc:opendocument:xmlns:dr3d:1.0" draw:type="non-primitive" svg:viewBox="0 0 21600 21600" draw:enhanced-path="M 0 0 L 21600 0 21600 21600 0 21600 Z N"/>
        </draw:custom-shape>
        <draw:custom-shape svg:x="4.0891in" svg:y="1.10727in" svg:width="1.76403in" svg:height="0.87293in" draw:id="id410" draw:style-name="a2799" draw:name="Rectangle 3">
          <svg:title/>
          <svg:desc/>
          <text:p text:style-name="a2798" text:class-names="" text:cond-style-name=""><text:span text:style-name="a2797" text:class-names=""/></text:p>
          <draw:enhanced-geometry xmlns:dr3d="urn:oasis:names:tc:opendocument:xmlns:dr3d:1.0" draw:type="non-primitive" svg:viewBox="0 0 21600 21600" draw:enhanced-path="M 0 0 L 21600 0 21600 21600 0 21600 Z N"/>
        </draw:custom-shape>
        <draw:custom-shape svg:x="0.26733in" svg:y="7.09861in" svg:width="0.3in" svg:height="0.3in" draw:id="id411" draw:style-name="a2802" draw:name="Rectangle 5">
          <svg:title/>
          <svg:desc/>
          <text:p text:style-name="a2801" text:class-names="" text:cond-style-name=""><text:span text:style-name="a2800" text:class-names=""/></text:p>
          <draw:enhanced-geometry xmlns:dr3d="urn:oasis:names:tc:opendocument:xmlns:dr3d:1.0" draw:type="non-primitive" svg:viewBox="0 0 21600 21600" draw:enhanced-path="M 0 0 L 21600 0 21600 21600 0 21600 Z N"/>
        </draw:custom-shape>
        <draw:frame draw:id="id412" draw:style-name="a2805" draw:name="TextBox 6" svg:x="0.56436in" svg:y="7.09861in" svg:width="3.52473in" svg:height="0.30293in">
          <draw:text-box>
            <text:p text:style-name="a2804" text:class-names="" text:cond-style-name=""><text:span text:style-name="a2803" text:class-names="">Fill in this section of BMC in student workbook</text:span></text:p>
          </draw:text-box>
          <svg:title/>
          <svg:desc/>
        </draw:frame>
        <draw:custom-shape svg:x="4.23596in" svg:y="7.08707in" svg:width="0.3in" svg:height="0.3in" draw:id="id413" draw:style-name="a2808" draw:name="Rectangle 9">
          <svg:title/>
          <svg:desc/>
          <text:p text:style-name="a2807" text:class-names="" text:cond-style-name=""><text:span text:style-name="a2806" text:class-names=""/></text:p>
          <draw:enhanced-geometry xmlns:dr3d="urn:oasis:names:tc:opendocument:xmlns:dr3d:1.0" draw:type="non-primitive" svg:viewBox="0 0 21600 21600" draw:enhanced-path="M 0 0 L 21600 0 21600 21600 0 21600 Z N"/>
        </draw:custom-shape>
        <draw:frame draw:id="id414" draw:style-name="a2811" draw:name="TextBox 11" svg:x="4.533in" svg:y="7.08707in" svg:width="2.64356in" svg:height="0.30293in">
          <draw:text-box>
            <text:p text:style-name="a2810" text:class-names="" text:cond-style-name=""><text:span text:style-name="a2809" text:class-names="">You completed in an earlier module</text:span></text:p>
          </draw:text-box>
          <svg:title/>
          <svg:desc/>
        </draw:frame>
        <draw:frame draw:id="id415" draw:style-name="a2815" draw:name="TextBox 12" svg:x="4.1089in" svg:y="2.09901in" svg:width="1.76403in" svg:height="1.91855in">
          <draw:text-box>
            <text:p text:style-name="a2814" text:class-names="" text:cond-style-name=""><text:span text:style-name="a2812" text:class-names="">Lorem ipsum dolor sit amet, consectetur adipiscing elit, sed do eiusmod tempor incididunt ut labore et dolore magna aliqua</text:span><text:span text:style-name="a2813" text:class-names="">. </text:span></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0" presentation:preset-sub-type="0" presentation:preset-class="entrance" presentation:group-id="0" smil:begin="0.5s" smil:fill="hold">
                  <anim:set smil:targetElement="id405" smil:attributeName="visibility" smil:to="visible" smil:begin="0.0s" smil:dur="0.00100000004749745s" smil:fill="hold"/>
                  <anim:transitionFilter smil:targetElement="id405" smil:type="fade" smil:subtype="crossfade" smil:dur="1.0s"/>
                </anim:par>
              </anim:par>
              <anim:par smil:begin="1.5s" smil:fill="hold">
                <anim:par presentation:node-type="after-previous" presentation:preset-id="10" presentation:preset-sub-type="0" presentation:preset-class="entrance" presentation:group-id="0" smil:begin="0.5s" smil:fill="hold">
                  <anim:set smil:targetElement="id409" smil:attributeName="visibility" smil:to="visible" smil:begin="0.0s" smil:dur="0.00100000004749745s" smil:fill="hold"/>
                  <anim:transitionFilter smil:targetElement="id409" smil:type="fade" smil:subtype="crossfade" smil:dur="1.0s"/>
                </anim:par>
              </anim:par>
              <anim:par smil:begin="3.0s" smil:fill="hold">
                <anim:par presentation:node-type="after-previous" presentation:preset-id="10" presentation:preset-sub-type="0" presentation:preset-class="entrance" presentation:group-id="0" smil:begin="0.5s" smil:fill="hold">
                  <anim:set smil:targetElement="id407" smil:attributeName="visibility" smil:to="visible" smil:begin="0.0s" smil:dur="0.00100000004749745s" smil:fill="hold"/>
                  <anim:transitionFilter smil:targetElement="id407" smil:type="fade" smil:subtype="crossfade" smil:dur="1.0s"/>
                </anim:par>
              </anim:par>
            </anim:par>
          </anim:seq>
        </anim:par>
        <presentation:notes draw:style-name="a2912">
          <draw:page-thumbnail draw:page-number="21" svg:x="1.54688in" svg:y="1.27083in" svg:width="4.57292in" svg:height="3.43056in" presentation:class="page" draw:id="id416" presentation:style-name="a2816" draw:name="Slide Image Placeholder 1">
            <svg:title/>
            <svg:desc/>
          </draw:page-thumbnail>
          <draw:frame draw:id="id417" presentation:style-name="a2911" draw:name="Notes Placeholder 2" svg:x="0.76667in" svg:y="4.89271in" svg:width="6.13333in" svg:height="4.00313in" presentation:class="notes" presentation:placeholder="false">
            <draw:text-box>
              <text:p text:style-name="a2818" text:class-names="" text:cond-style-name=""><text:span text:style-name="a2817" text:class-names="">Business Model Canvas Notes:</text:span></text:p>
              <text:p text:style-name="a2820" text:class-names="" text:cond-style-name=""><text:span text:style-name="a2819" text:class-names=""/></text:p>
              <text:p text:style-name="a2824" text:class-names="" text:cond-style-name=""><text:span text:style-name="a2821" text:class-names="">For this section, have the students work on the<text:s text:c="1"/></text:span><text:span text:style-name="a2822" text:class-names="">Customer Segments, Channels, and Customer Relationships<text:s text:c="1"/></text:span><text:span text:style-name="a2823" text:class-names="">sections of their Business Model Canvas (Page 56 &amp; 57 in the Printed workbook, page 192 in the Virtual workbook).</text:span></text:p>
              <text:p text:style-name="a2826" text:class-names="" text:cond-style-name=""><text:span text:style-name="a2825" text:class-names=""/></text:p>
              <text:p text:style-name="a2830" text:class-names="" text:cond-style-name=""><text:span text:style-name="a2827" text:class-names="">1. When filling out the<text:s text:c="1"/></text:span><text:span text:style-name="a2828" text:class-names="">Customer Segments<text:s text:c="1"/></text:span><text:span text:style-name="a2829" text:class-names="">section of the Business Model Canvas, it's important to consider questions such as:</text:span></text:p>
              <text:p text:style-name="a2832" text:class-names="" text:cond-style-name=""><text:span text:style-name="a2831" text:class-names=""/></text:p>
              <text:list text:style-name="a2835">
                <text:list-item>
                  <text:p text:style-name="a2834" text:class-names="" text:cond-style-name=""><text:span text:style-name="a2833" text:class-names="">Who are our most important customers?</text:span></text:p>
                </text:list-item>
              </text:list>
              <text:list text:style-name="a2838">
                <text:list-item>
                  <text:p text:style-name="a2837" text:class-names="" text:cond-style-name=""><text:span text:style-name="a2836" text:class-names="">What are the specific needs and preferences of each customer segment?</text:span></text:p>
                </text:list-item>
              </text:list>
              <text:list text:style-name="a2841">
                <text:list-item>
                  <text:p text:style-name="a2840" text:class-names="" text:cond-style-name=""><text:span text:style-name="a2839" text:class-names="">Are there any emerging or underserved customer segments we should consider?</text:span></text:p>
                </text:list-item>
              </text:list>
              <text:list text:style-name="a2844">
                <text:list-item>
                  <text:p text:style-name="a2843" text:class-names="" text:cond-style-name=""><text:span text:style-name="a2842" text:class-names="">How can we tailor our value proposition to resonate with each segment?</text:span></text:p>
                </text:list-item>
              </text:list>
              <text:list text:style-name="a2847">
                <text:list-item>
                  <text:p text:style-name="a2846" text:class-names="" text:cond-style-name=""><text:span text:style-name="a2845" text:class-names=""/></text:p>
                </text:list-item>
              </text:list>
              <text:p text:style-name="a2849" text:class-names="" text:cond-style-name=""><text:span text:style-name="a2848" text:class-names="">By addressing these questions, businesses can create a more precise and effective approach to delivering value to their customers, thereby increasing their chances of success in the market.</text:span></text:p>
              <text:p text:style-name="a2851" text:class-names="" text:cond-style-name=""><text:span text:style-name="a2850" text:class-names=""/></text:p>
              <text:p text:style-name="a2855" text:class-names="" text:cond-style-name=""><text:span text:style-name="a2852" text:class-names="">2. When defining<text:s text:c="1"/></text:span><text:span text:style-name="a2853" text:class-names="">Channels</text:span><text:span text:style-name="a2854" text:class-names=""><text:s text:c="1"/>on the Business Model Canvas, business owners should ask themselves:</text:span></text:p>
              <text:p text:style-name="a2857" text:class-names="" text:cond-style-name=""><text:span text:style-name="a2856" text:class-names=""/></text:p>
              <text:list text:style-name="a2860">
                <text:list-item>
                  <text:p text:style-name="a2859" text:class-names="" text:cond-style-name=""><text:span text:style-name="a2858" text:class-names="">How do we currently reach our customers?</text:span></text:p>
                </text:list-item>
              </text:list>
              <text:list text:style-name="a2863">
                <text:list-item>
                  <text:p text:style-name="a2862" text:class-names="" text:cond-style-name=""><text:span text:style-name="a2861" text:class-names="">Which channels are the most cost-effective and efficient for our business?</text:span></text:p>
                </text:list-item>
              </text:list>
              <text:list text:style-name="a2866">
                <text:list-item>
                  <text:p text:style-name="a2865" text:class-names="" text:cond-style-name=""><text:span text:style-name="a2864" text:class-names="">How do our customers prefer to interact with us and receive our products or services?</text:span></text:p>
                </text:list-item>
              </text:list>
              <text:list text:style-name="a2869">
                <text:list-item>
                  <text:p text:style-name="a2868" text:class-names="" text:cond-style-name=""><text:span text:style-name="a2867" text:class-names="">Are there any new or emerging channels that could help us expand our reach?</text:span></text:p>
                </text:list-item>
              </text:list>
              <text:list text:style-name="a2872">
                <text:list-item>
                  <text:p text:style-name="a2871" text:class-names="" text:cond-style-name=""><text:span text:style-name="a2870" text:class-names="">How can we integrate multiple channels to create a seamless customer experience?</text:span></text:p>
                </text:list-item>
              </text:list>
              <text:p text:style-name="a2874" text:class-names="" text:cond-style-name=""><text:span text:style-name="a2873" text:class-names=""/></text:p>
              <text:p text:style-name="a2876" text:class-names="" text:cond-style-name=""><text:span text:style-name="a2875" text:class-names="">By effectively selecting and managing their channels, businesses can optimize their reach, engagement, and sales while aligning with the preferences of their target customer segments.</text:span></text:p>
              <text:p text:style-name="a2878" text:class-names="" text:cond-style-name=""><text:span text:style-name="a2877" text:class-names=""/></text:p>
              <text:p text:style-name="a2882" text:class-names="" text:cond-style-name=""><text:span text:style-name="a2879" text:class-names="">3. When considering<text:s text:c="1"/></text:span><text:span text:style-name="a2880" text:class-names="">Customer Relationships<text:s text:c="1"/></text:span><text:span text:style-name="a2881" text:class-names="">on the Business Model Canvas, it's important to ask:</text:span></text:p>
              <text:p text:style-name="a2884" text:class-names="" text:cond-style-name=""><text:span text:style-name="a2883" text:class-names=""/></text:p>
              <text:list text:style-name="a2887">
                <text:list-item>
                  <text:p text:style-name="a2886" text:class-names="" text:cond-style-name=""><text:span text:style-name="a2885" text:class-names="">What type of relationship does each customer segment expect or prefer?</text:span></text:p>
                </text:list-item>
              </text:list>
              <text:list text:style-name="a2890">
                <text:list-item>
                  <text:p text:style-name="a2889" text:class-names="" text:cond-style-name=""><text:span text:style-name="a2888" text:class-names="">How can we provide value and enhance the customer experience at different touchpoints?</text:span></text:p>
                </text:list-item>
              </text:list>
              <text:list text:style-name="a2893">
                <text:list-item>
                  <text:p text:style-name="a2892" text:class-names="" text:cond-style-name=""><text:span text:style-name="a2891" text:class-names="">How do we handle customer inquiries, complaints, and feedback?</text:span></text:p>
                </text:list-item>
              </text:list>
              <text:list text:style-name="a2896">
                <text:list-item>
                  <text:p text:style-name="a2895" text:class-names="" text:cond-style-name=""><text:span text:style-name="a2894" text:class-names="">How can we foster loyalty and repeat business through positive interactions?</text:span></text:p>
                </text:list-item>
              </text:list>
              <text:p text:style-name="a2898" text:class-names="" text:cond-style-name=""><text:span text:style-name="a2897" text:class-names=""/></text:p>
              <text:p text:style-name="a2900" text:class-names="" text:cond-style-name=""><text:span text:style-name="a2899" text:class-names="">By aligning customer relationships with the specific needs and preferences of each segment, businesses can create a stronger bond with their customers, leading to increased customer retention, brand advocacy, and overall business success.</text:span></text:p>
              <text:p text:style-name="a2902" text:class-names="" text:cond-style-name=""><text:span text:style-name="a2901" text:class-names=""/></text:p>
              <text:p text:style-name="a2904" text:class-names="" text:cond-style-name=""><text:span text:style-name="a2903" text:class-names=""/></text:p>
              <text:p text:style-name="a2906" text:class-names="" text:cond-style-name=""><text:span text:style-name="a2905" text:class-names=""/></text:p>
              <text:p text:style-name="a2908" text:class-names="" text:cond-style-name=""><text:span text:style-name="a2907" text:class-names=""/></text:p>
              <text:p text:style-name="a2910" text:class-names="" text:cond-style-name=""><text:span text:style-name="a2909" text:class-names=""/></text:p>
            </draw:text-box>
            <svg:title/>
            <svg:desc/>
          </draw:frame>
        </presentation:notes>
      </draw:page>
      <draw:page draw:name="Slide36" draw:style-name="a2913" draw:master-page-name="Master1-Layout9-cust-Title-only" presentation:presentation-page-layout-name="Master1-PPL9" draw:id="Slide-291">
        <draw:frame draw:id="id418" draw:style-name="a2916" draw:name="Slide Number Placeholder 1" svg:x="4.89868in" svg:y="6.77418in" svg:width="0.51437in" svg:height="0.39931in">
          <draw:text-box>
            <text:p text:style-name="a2915" text:class-names="" text:cond-style-name=""><text:span text:style-name="a2914" text:class-names=""><text:page-number style:num-format="1" text:fixed="false"/></text:span></text:p>
          </draw:text-box>
          <svg:title/>
          <svg:desc/>
        </draw:frame>
        <draw:frame draw:id="id419" draw:style-name="a2919" draw:name="Content Placeholder 2" svg:x="3.02697in" svg:y="2.61597in" svg:width="4in" svg:height="2.26807in">
          <draw:text-box>
            <text:p text:style-name="a2918" text:class-names="" text:cond-style-name=""><text:span text:style-name="a2917" text:class-names="">Questions, <text:s text:c="1"/>Discussion</text:span></text:p>
          </draw:text-box>
          <svg:title/>
          <svg:desc/>
        </draw:frame>
        <presentation:notes draw:style-name="a2975">
          <draw:page-thumbnail draw:page-number="22" svg:x="1.54688in" svg:y="1.27083in" svg:width="4.57292in" svg:height="3.43056in" presentation:class="page" draw:id="id420" presentation:style-name="a2920" draw:name="Slide Image Placeholder 1">
            <svg:title/>
            <svg:desc/>
          </draw:page-thumbnail>
          <draw:frame draw:id="id421" presentation:style-name="a2974" draw:name="Notes Placeholder 2" svg:x="0.76667in" svg:y="4.89271in" svg:width="6.13333in" svg:height="4.00313in" presentation:class="notes" presentation:placeholder="false">
            <draw:text-box>
              <text:p text:style-name="a2923" text:class-names="" text:cond-style-name=""><text:span text:style-name="a2921" text:class-names="">Q&amp;A / Discussion Starters:</text:span><text:span text:style-name="a2922" text:class-names=""/></text:p>
              <text:p text:style-name="a2925" text:class-names="" text:cond-style-name=""><text:span text:style-name="a2924" text:class-names=""/></text:p>
              <text:p text:style-name="a2927" text:class-names="" text:cond-style-name=""><text:span text:style-name="a2926" text:class-names="">The below questions (or other questions you may choose to use instead) are provided to either ask in question form or use to start a dialogue, and are meant to help check for understanding and emphasize key information from the module they have just completed.  </text:span></text:p>
              <text:p text:style-name="a2929" text:class-names="" text:cond-style-name=""><text:span text:style-name="a2928" text:class-names=""/></text:p>
              <text:p text:style-name="a2934" text:class-names="" text:cond-style-name=""><text:span text:style-name="a2930" text:class-names="">Question 1</text:span><text:span text:style-name="a2931" text:class-names="">: </text:span><text:span text:style-name="a2932" text:class-names="">What are the two main types of market research, and how are they different?</text:span><text:span text:style-name="a2933" text:class-names=""/></text:p>
              <text:p text:style-name="a2937" text:class-names="" text:cond-style-name=""><text:span text:style-name="a2935" text:class-names="">Answer 1</text:span><text:span text:style-name="a2936" text:class-names="">: Secondary and Primary Market Research.  </text:span></text:p>
              <text:p text:style-name="a2939" text:class-names="" text:cond-style-name=""><text:span text:style-name="a2938" text:class-names="">Secondary Market Research uses libraries, Google, databases, news outlets and other search engines to find info.  While Primary Market Research requires more interaction with potential customers and is done through focus groups, surveys, interviews, etc.</text:span></text:p>
              <text:p text:style-name="a2941" text:class-names="" text:cond-style-name=""><text:span text:style-name="a2940" text:class-names=""/></text:p>
              <text:p text:style-name="a2946" text:class-names="" text:cond-style-name=""><text:span text:style-name="a2942" text:class-names="">Question 2</text:span><text:span text:style-name="a2943" text:class-names="">: </text:span><text:span text:style-name="a2944" text:class-names="">What are the two types of government contractors we discussed in this module?</text:span><text:span text:style-name="a2945" text:class-names=""/></text:p>
              <text:p text:style-name="a2949" text:class-names="" text:cond-style-name=""><text:span text:style-name="a2947" text:class-names="">Answer 2</text:span><text:span text:style-name="a2948" text:class-names="">:  Prime and Sub-Contractors.  A prime contractor has a contract directly with an agency.  A sub-contractor is usually part of a prime contractor’s team (to provide a specific capability or service).</text:span></text:p>
              <text:p text:style-name="a2951" text:class-names="" text:cond-style-name=""><text:span text:style-name="a2950" text:class-names=""/></text:p>
              <text:p text:style-name="a2956" text:class-names="" text:cond-style-name=""><text:span text:style-name="a2952" text:class-names="">Question 3</text:span><text:span text:style-name="a2953" text:class-names="">: </text:span><text:span text:style-name="a2954" text:class-names="">What is the six digit code that describes what type of industry a business is classified as (this code is also used in Government Contracting)?</text:span><text:span text:style-name="a2955" text:class-names=""/></text:p>
              <text:p text:style-name="a2959" text:class-names="" text:cond-style-name=""><text:span text:style-name="a2957" text:class-names="">Answer 3</text:span><text:span text:style-name="a2958" text:class-names="">: NAICS (or North American Industry Classification System) Code</text:span></text:p>
              <text:p text:style-name="a2961" text:class-names="" text:cond-style-name=""><text:span text:style-name="a2960" text:class-names=""/></text:p>
              <text:p text:style-name="a2963" text:class-names="" text:cond-style-name=""><text:span text:style-name="a2962" text:class-names="">Answer any questions the group may have or if there are topics they’d like to discuss.<text:s text:c="1"/></text:span></text:p>
              <text:p text:style-name="a2965" text:class-names="" text:cond-style-name=""><text:span text:style-name="a2964" text:class-names=""/></text:p>
              <text:p text:style-name="a2971" text:class-names="" text:cond-style-name=""><text:span text:style-name="a2966" text:class-names="">The next slide gives students the opportunity to complete the<text:s text:c="1"/></text:span><text:span text:style-name="a2967" text:class-names="">Customer Segments, Channels,</text:span><text:span text:style-name="a2968" text:class-names=""><text:s text:c="1"/>and<text:s text:c="1"/></text:span><text:span text:style-name="a2969" text:class-names="">Customer Relationships<text:s text:c="1"/></text:span><text:span text:style-name="a2970" text:class-names="">sections of their Business Model Canvas.<text:s text:c="1"/></text:span></text:p>
              <text:p text:style-name="a2973" text:class-names="" text:cond-style-name=""><text:span text:style-name="a2972"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SBA Logo Slide"/>
    <style:presentation-page-layout style:name="Master1-PPL2" style:display-name="4_Title Slide Texture, SBA Only">
      <presentation:placeholder presentation:object="title" svg:x="1.25in" svg:y="1.67069in" svg:width="7.5in" svg:height="2.336in"/>
      <presentation:placeholder presentation:object="outline" svg:x="1.25in" svg:y="4.15206in" svg:width="7.5in" svg:height="1.80035in"/>
    </style:presentation-page-layout>
    <style:presentation-page-layout style:name="Master1-PPL3" style:display-name="2_Title Slide Texture, SBA Boots">
      <presentation:placeholder presentation:object="title" svg:x="1.25in" svg:y="1.67069in" svg:width="7.5in" svg:height="2.336in"/>
      <presentation:placeholder presentation:object="outline" svg:x="1.25in" svg:y="4.15206in" svg:width="7.5in" svg:height="1.80035in"/>
    </style:presentation-page-layout>
    <style:presentation-page-layout style:name="Master1-PPL4" style:display-name="3_Title Slide Texture, SBA Only">
      <presentation:placeholder presentation:object="title" svg:x="1.25in" svg:y="1.67069in" svg:width="7.5in" svg:height="2.336in"/>
      <presentation:placeholder presentation:object="outline" svg:x="1.25in" svg:y="4.15206in" svg:width="7.5in" svg:height="1.80035in"/>
    </style:presentation-page-layout>
    <style:presentation-page-layout style:name="Master1-PPL5" style:display-name="Chapter Slide Blue Screen Only">
      <presentation:placeholder presentation:object="title" svg:x="1.25in" svg:y="1.22743in" svg:width="7.5in" svg:height="2.61111in"/>
      <presentation:placeholder presentation:object="subtitle" svg:x="1.25in" svg:y="3.93924in" svg:width="7.5in" svg:height="1.81076in"/>
    </style:presentation-page-layout>
    <style:presentation-page-layout style:name="Master1-PPL6" style:display-name="Chapter Slide White Screen Only">
      <presentation:placeholder presentation:object="title" svg:x="1.25in" svg:y="1.22743in" svg:width="7.5in" svg:height="2.61111in"/>
      <presentation:placeholder presentation:object="subtitle" svg:x="1.25in" svg:y="3.93924in" svg:width="7.5in" svg:height="1.81076in"/>
    </style:presentation-page-layout>
    <style:presentation-page-layout style:name="Master1-PPL7" style:display-name="Chapter Slide Text Only"/>
    <style:presentation-page-layout style:name="Master1-PPL8" style:display-name="Title and Content with Subtitle"/>
    <style:presentation-page-layout style:name="Master1-PPL9" style:display-name="Title only"/>
    <style:presentation-page-layout style:name="Master1-PPL10" style:display-name="Comparison">
      <presentation:placeholder presentation:object="title" svg:x="1.30303in" svg:y="0.40138in" svg:width="7.2018in" svg:height="0.79856in"/>
    </style:presentation-page-layout>
    <style:presentation-page-layout style:name="Master1-PPL11" style:display-name="Comparison, header">
      <presentation:placeholder presentation:object="outline" svg:x="5.12121in" svg:y="1.68205in" svg:width="4.23047in" svg:height="0.64185in"/>
      <presentation:placeholder presentation:object="object" svg:x="5.2103in" svg:y="2.51402in" svg:width="4.07026in" svg:height="3.84085in"/>
      <presentation:placeholder presentation:object="title" svg:x="1.30303in" svg:y="0.40138in" svg:width="7.2018in" svg:height="0.79856in"/>
    </style:presentation-page-layout>
    <style:presentation-page-layout style:name="Master1-PPL12" style:display-name="Photo"/>
    <style:presentation-page-layout style:name="Master1-PPL13" style:display-name="Title, Two Column, Header Bullet List, Paragraph">
      <presentation:placeholder presentation:object="outline" svg:x="0.63157in" svg:y="2.29807in" svg:width="3.22526in" svg:height="4.18553in"/>
      <presentation:placeholder presentation:object="outline" svg:x="0.52968in" svg:y="1.44533in" svg:width="3.41656in" svg:height="0.64185in"/>
      <presentation:placeholder presentation:object="title" svg:x="1.30303in" svg:y="0.40138in" svg:width="7.2018in" svg:height="0.79856in"/>
    </style:presentation-page-layout>
    <style:presentation-page-layout style:name="Master1-PPL14" style:display-name="Title, Two Column, Header Bullet List, Photo">
      <presentation:placeholder presentation:object="page-number" svg:x="4.89868in" svg:y="6.77418in" svg:width="0.51437in" svg:height="0.39931in"/>
      <presentation:placeholder presentation:object="outline" svg:x="0.52968in" svg:y="1.44533in" svg:width="3.41656in" svg:height="0.64185in"/>
      <presentation:placeholder presentation:object="title" svg:x="1.30303in" svg:y="0.40138in" svg:width="7.2018in" svg:height="0.79856in"/>
    </style:presentation-page-layout>
    <style:presentation-page-layout style:name="Master1-PPL15" style:display-name="Two Column, Header Bullet List, Paragraph">
      <presentation:placeholder presentation:object="outline" svg:x="0.63157in" svg:y="2.07855in" svg:width="3.22526in" svg:height="4.21115in"/>
      <presentation:placeholder presentation:object="page-number" svg:x="4.89868in" svg:y="6.77418in" svg:width="0.51437in" svg:height="0.39931in"/>
    </style:presentation-page-layout>
    <style:presentation-page-layout style:name="Master1-PPL16" style:display-name="Two Column, Header Bullet List, Photo">
      <presentation:placeholder presentation:object="outline" svg:x="0.52968in" svg:y="1.13877in" svg:width="3.41656in" svg:height="0.64185in"/>
      <presentation:placeholder presentation:object="outline" svg:x="0.63157in" svg:y="2.07855in" svg:width="3.22526in" svg:height="4.21115in"/>
    </style:presentation-page-layout>
    <style:presentation-page-layout style:name="Master1-PPL17" style:display-name="Title, Horizontal Icon, Header, Paragraph">
      <presentation:placeholder presentation:object="outline" svg:x="0.12946in" svg:y="2.96599in" svg:width="2.23589in" svg:height="0.43929in"/>
      <presentation:placeholder presentation:object="outline" svg:x="7.60916in" svg:y="3.52848in" svg:width="2.26138in" svg:height="2.12712in"/>
      <presentation:placeholder presentation:object="graphic" svg:x="8.31637in" svg:y="1.90213in" svg:width="0.84696in" svg:height="0.89169in"/>
      <presentation:placeholder presentation:object="outline" svg:x="7.60916in" svg:y="2.97391in" svg:width="2.26138in" svg:height="0.43929in"/>
      <presentation:placeholder presentation:object="outline" svg:x="5.1039in" svg:y="3.52848in" svg:width="2.25393in" svg:height="2.12712in"/>
      <presentation:placeholder presentation:object="graphic" svg:x="5.82025in" svg:y="1.90213in" svg:width="0.84696in" svg:height="0.89169in"/>
      <presentation:placeholder presentation:object="outline" svg:x="5.11677in" svg:y="2.97391in" svg:width="2.25393in" svg:height="0.43929in"/>
      <presentation:placeholder presentation:object="page-number" svg:x="4.89868in" svg:y="6.77418in" svg:width="0.51437in" svg:height="0.39931in"/>
      <presentation:placeholder presentation:object="title" svg:x="1.30303in" svg:y="0.40138in" svg:width="7.2018in" svg:height="0.79856in"/>
    </style:presentation-page-layout>
    <style:presentation-page-layout style:name="Master1-PPL18" style:display-name="Horizontal Icon, Header, Paragraph">
      <presentation:placeholder presentation:object="outline" svg:x="0.12946in" svg:y="2.77244in" svg:width="2.23589in" svg:height="0.43929in"/>
      <presentation:placeholder presentation:object="outline" svg:x="7.60916in" svg:y="3.33494in" svg:width="2.26138in" svg:height="2.12712in"/>
      <presentation:placeholder presentation:object="graphic" svg:x="8.31637in" svg:y="1.70858in" svg:width="0.84696in" svg:height="0.89169in"/>
      <presentation:placeholder presentation:object="outline" svg:x="7.60916in" svg:y="2.78036in" svg:width="2.26138in" svg:height="0.43929in"/>
      <presentation:placeholder presentation:object="outline" svg:x="5.1039in" svg:y="3.33494in" svg:width="2.25393in" svg:height="2.12712in"/>
      <presentation:placeholder presentation:object="graphic" svg:x="5.82025in" svg:y="1.70858in" svg:width="0.84696in" svg:height="0.89169in"/>
      <presentation:placeholder presentation:object="outline" svg:x="5.11677in" svg:y="2.78036in" svg:width="2.25393in" svg:height="0.43929in"/>
      <presentation:placeholder presentation:object="page-number" svg:x="4.89868in" svg:y="6.77418in" svg:width="0.51437in" svg:height="0.39931in"/>
    </style:presentation-page-layout>
    <style:presentation-page-layout style:name="Master1-PPL19" style:display-name="Title, Vertical Icon, Header, Paragraph">
      <presentation:placeholder presentation:object="outline" svg:x="2.40411in" svg:y="3.02462in" svg:width="6.60856in" svg:height="0.32299in"/>
      <presentation:placeholder presentation:object="outline" svg:x="2.40411in" svg:y="4.70623in" svg:width="6.60856in" svg:height="0.5567in"/>
      <presentation:placeholder presentation:object="graphic" svg:x="0.88163in" svg:y="4.37428in" svg:width="0.84696in" svg:height="0.89169in"/>
      <presentation:placeholder presentation:object="outline" svg:x="2.40411in" svg:y="4.37163in" svg:width="6.60856in" svg:height="0.32299in"/>
      <presentation:placeholder presentation:object="outline" svg:x="2.40411in" svg:y="5.9903in" svg:width="6.60856in" svg:height="0.5567in"/>
      <presentation:placeholder presentation:object="graphic" svg:x="0.88163in" svg:y="5.65835in" svg:width="0.84696in" svg:height="0.89169in"/>
      <presentation:placeholder presentation:object="outline" svg:x="2.40411in" svg:y="5.6557in" svg:width="6.60856in" svg:height="0.32299in"/>
      <presentation:placeholder presentation:object="page-number" svg:x="4.89868in" svg:y="6.77418in" svg:width="0.51437in" svg:height="0.39931in"/>
      <presentation:placeholder presentation:object="title" svg:x="1.30303in" svg:y="0.40138in" svg:width="7.2018in" svg:height="0.79856in"/>
    </style:presentation-page-layout>
    <style:presentation-page-layout style:name="Master1-PPL20" style:display-name="Vertical Icon, Header, Paragraph">
      <presentation:placeholder presentation:object="outline" svg:x="2.40411in" svg:y="2.68842in" svg:width="6.60856in" svg:height="0.32299in"/>
      <presentation:placeholder presentation:object="outline" svg:x="2.40411in" svg:y="4.37003in" svg:width="6.60856in" svg:height="0.5567in"/>
      <presentation:placeholder presentation:object="graphic" svg:x="0.88163in" svg:y="4.03808in" svg:width="0.84696in" svg:height="0.89169in"/>
      <presentation:placeholder presentation:object="outline" svg:x="2.40411in" svg:y="4.03543in" svg:width="6.60856in" svg:height="0.32299in"/>
      <presentation:placeholder presentation:object="outline" svg:x="2.40411in" svg:y="5.6541in" svg:width="6.60856in" svg:height="0.5567in"/>
      <presentation:placeholder presentation:object="graphic" svg:x="0.88163in" svg:y="5.32215in" svg:width="0.84696in" svg:height="0.89169in"/>
      <presentation:placeholder presentation:object="outline" svg:x="2.40411in" svg:y="5.3195in" svg:width="6.60856in" svg:height="0.32299in"/>
      <presentation:placeholder presentation:object="page-number" svg:x="4.89868in" svg:y="6.77418in" svg:width="0.51437in" svg:height="0.39931in"/>
    </style:presentation-page-layout>
    <style:style style:family="table-cell" style:name="a1254">
      <style:table-cell-properties fo:background-color="#cb9900"/>
    </style:style>
    <style:style style:family="table-cell" style:name="a1255">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1256">
      <style:table-cell-properties fo:background-color="#aa7f00" fo:border-top="0.02778in solid #ffffff"/>
      <style:text-properties fo:font-family="" style:font-family-asian="" style:font-family-complex="" fo:font-weight="bold" style:font-weight-asian="bold" style:font-weight-complex="bold"/>
    </style:style>
    <style:style style:family="table-cell" style:name="a1257">
      <style:table-cell-properties fo:background-color="#cb9900" fo:border-right="0.02778in solid #ffffff"/>
      <style:text-properties fo:font-family="" style:font-family-asian="" style:font-family-complex="" fo:font-weight="bold" style:font-weight-asian="bold" style:font-weight-complex="bold"/>
    </style:style>
    <style:style style:family="table-cell" style:name="a1258">
      <style:table-cell-properties fo:background-color="#cb9900" fo:border-left="0.02778in solid #ffffff"/>
      <style:text-properties fo:font-family="" style:font-family-asian="" style:font-family-complex="" fo:font-weight="bold" style:font-weight-asian="bold" style:font-weight-complex="bold"/>
    </style:style>
    <style:style style:family="table-cell" style:name="a1259">
      <style:table-cell-properties fo:border-top="0.00347in solid #ffc000" fo:border-bottom="0.00347in solid #ffc000" fo:border-left="0.00347in solid #ffc000" fo:border-right="0.00347in solid #ffc000"/>
      <style:text-properties fo:color="#000000" fo:font-family="+mn-lt" style:font-family-asian="+mn-ea" style:font-family-complex="+mn-cs"/>
    </style:style>
    <style:style style:family="table-cell" style:name="a1300">
      <style:table-cell-properties/>
      <style:text-properties fo:font-family="" style:font-family-asian="" style:font-family-complex="" fo:font-weight="bold" style:font-weight-asian="bold" style:font-weight-complex="bold"/>
    </style:style>
    <style:style style:family="table-cell" style:name="a1301">
      <style:table-cell-properties/>
      <style:text-properties fo:font-family="" style:font-family-asian="" style:font-family-complex="" fo:font-weight="bold" style:font-weight-asian="bold" style:font-weight-complex="bold"/>
    </style:style>
    <style:style style:family="table-cell" style:name="a1302">
      <style:table-cell-properties fo:border-top="0.01389in solid #4472c4" fo:border-bottom="0.01389in solid #4472c4"/>
      <style:text-properties fo:color="#000000" fo:font-family="+mn-lt" style:font-family-asian="+mn-ea" style:font-family-complex="+mn-cs"/>
    </style:style>
    <style:style style:family="table-cell" style:name="a1303">
      <style:table-cell-properties fo:background-color="#4472c4"/>
    </style:style>
    <style:style style:family="table-cell" style:name="a1304">
      <style:table-cell-properties/>
    </style:style>
    <style:style style:family="table-cell" style:name="a1305">
      <style:table-cell-properties fo:background-color="#4472c4"/>
    </style:style>
    <style:style style:family="table-cell" style:name="a1306">
      <style:table-cell-properties fo:border-bottom="0.01389in solid #4472c4"/>
      <style:text-properties fo:font-family="" style:font-family-asian="" style:font-family-complex="" fo:font-weight="bold" style:font-weight-asian="bold" style:font-weight-complex="bold"/>
    </style:style>
    <style:style style:family="table-cell" style:name="a1307">
      <style:table-cell-properties fo:border-top="0.01389in solid #4472c4"/>
      <style:text-properties fo:font-family="" style:font-family-asian="" style:font-family-complex="" fo:font-weight="bold" style:font-weight-asian="bold" style:font-weight-complex="bold"/>
    </style:style>
    <style:style style:family="table-cell" style:name="a1308">
      <style:table-cell-properties/>
      <style:text-properties fo:font-family="" style:font-family-asian="" style:font-family-complex="" fo:font-weight="bold" style:font-weight-asian="bold" style:font-weight-complex="bold"/>
    </style:style>
    <style:style style:family="table-cell" style:name="a1309">
      <style:table-cell-properties/>
      <style:text-properties fo:font-family="" style:font-family-asian="" style:font-family-complex="" fo:font-weight="bold" style:font-weight-asian="bold" style:font-weight-complex="bold"/>
    </style:style>
    <style:style style:family="table-cell" style:name="a1260">
      <style:table-cell-properties fo:border-left="0.00347in solid #ffc000" fo:border-right="0.00347in solid #ffc000"/>
    </style:style>
    <style:style style:family="table-cell" style:name="a1261">
      <style:table-cell-properties fo:border-left="0.00347in solid #ffc000" fo:border-right="0.00347in solid #ffc000"/>
    </style:style>
    <style:style style:family="table-cell" style:name="a1262">
      <style:table-cell-properties fo:border-top="0.00347in solid #ffc000" fo:border-bottom="0.00347in solid #ffc000"/>
    </style:style>
    <style:style style:family="table-cell" style:name="a1263">
      <style:table-cell-properties fo:background-color="#ffc000"/>
      <style:text-properties fo:color="#ffffff" fo:font-family="+mn-lt" style:font-family-asian="+mn-ea" style:font-family-complex="+mn-cs" fo:font-weight="bold" style:font-weight-asian="bold" style:font-weight-complex="bold"/>
    </style:style>
    <style:style style:family="table-cell" style:name="a1264">
      <style:table-cell-properties fo:border-top="0.05556in double #ffc000"/>
      <style:text-properties fo:font-family="" style:font-family-asian="" style:font-family-complex="" fo:font-weight="bold" style:font-weight-asian="bold" style:font-weight-complex="bold"/>
    </style:style>
    <style:style style:family="table-cell" style:name="a1265">
      <style:table-cell-properties/>
      <style:text-properties fo:font-family="" style:font-family-asian="" style:font-family-complex="" fo:font-weight="bold" style:font-weight-asian="bold" style:font-weight-complex="bold"/>
    </style:style>
    <style:style style:family="table-cell" style:name="a1266">
      <style:table-cell-properties/>
      <style:text-properties fo:font-family="" style:font-family-asian="" style:font-family-complex="" fo:font-weight="bold" style:font-weight-asian="bold" style:font-weight-complex="bold"/>
    </style:style>
    <style:style style:family="table-cell" style:name="a1267">
      <style:table-cell-properties fo:background-color="#5b9bd5" fo:border-top="0.00347in solid #5b9bd5" fo:border-bottom="0.00347in solid #5b9bd5" fo:border-left="0.00347in solid #5b9bd5" fo:border-right="0.00347in solid #5b9bd5"/>
      <style:text-properties fo:color="#000000" fo:font-family="+mn-lt" style:font-family-asian="+mn-ea" style:font-family-complex="+mn-cs"/>
    </style:style>
    <style:style style:family="table-cell" style:name="a1268">
      <style:table-cell-properties fo:background-color="#5b9bd5"/>
    </style:style>
    <style:style style:family="table-cell" style:name="a1269">
      <style:table-cell-properties fo:background-color="#5b9bd5" fo:border-top="0.00347in solid #5b9bd5" fo:border-bottom="0.00347in solid #5b9bd5"/>
    </style:style>
    <style:style style:family="table-cell" style:name="a1310">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11">
      <style:table-cell-properties/>
    </style:style>
    <style:style style:family="table-cell" style:name="a1312">
      <style:table-cell-properties fo:background-color="#d2deef"/>
    </style:style>
    <style:style style:family="table-cell" style:name="a1313">
      <style:table-cell-properties/>
    </style:style>
    <style:style style:family="table-cell" style:name="a1314">
      <style:table-cell-properties fo:background-color="#d2deef"/>
    </style:style>
    <style:style style:family="table-cell" style:name="a1315">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316">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317">
      <style:table-cell-properties fo:background-color="#5b9bd5"/>
      <style:text-properties fo:color="#ffffff" fo:font-family="+mn-lt" style:font-family-asian="+mn-ea" style:font-family-complex="+mn-cs" fo:font-weight="bold" style:font-weight-asian="bold" style:font-weight-complex="bold"/>
    </style:style>
    <style:style style:family="table-cell" style:name="a1318">
      <style:table-cell-properties fo:background-color="#5b9bd5"/>
      <style:text-properties fo:color="#ffffff" fo:font-family="+mn-lt" style:font-family-asian="+mn-ea" style:font-family-complex="+mn-cs" fo:font-weight="bold" style:font-weight-asian="bold" style:font-weight-complex="bold"/>
    </style:style>
    <style:style style:family="table-cell" style:name="a1319">
      <style:table-cell-properties/>
      <style:text-properties fo:color="#000000" fo:font-family="+mn-lt" style:font-family-asian="+mn-ea" style:font-family-complex="+mn-cs"/>
    </style:style>
    <style:style style:family="table-cell" style:name="a1228">
      <style:table-cell-properties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1229">
      <style:table-cell-properties fo:border-left="0.00347in solid #4472c4" fo:border-right="0.00347in solid #4472c4"/>
    </style:style>
    <style:style style:family="table-cell" style:name="a1270">
      <style:table-cell-properties fo:background-color="#5b9bd5"/>
    </style:style>
    <style:style style:family="table-cell" style:name="a1271">
      <style:table-cell-properties fo:background-color="#5b9bd5"/>
    </style:style>
    <style:style style:family="table-cell" style:name="a1272">
      <style:table-cell-properties fo:background-color="#5b9bd5" fo:border-top="0.00347in solid #5b9bd5" fo:border-bottom="0.00347in solid #ffffff" fo:border-left="0.00347in solid #5b9bd5" fo:border-right="0.00347in solid #5b9bd5"/>
      <style:text-properties fo:color="#ffffff" fo:font-family="+mn-lt" style:font-family-asian="+mn-ea" style:font-family-complex="+mn-cs" fo:font-weight="bold" style:font-weight-asian="bold" style:font-weight-complex="bold"/>
    </style:style>
    <style:style style:family="table-cell" style:name="a1273">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1274">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1275">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1276">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1277">
      <style:table-cell-properties fo:background-color="#4472c4"/>
    </style:style>
    <style:style style:family="table-cell" style:name="a1278">
      <style:table-cell-properties fo:background-color="#4472c4" fo:border-top="0.00347in solid #4472c4" fo:border-bottom="0.00347in solid #4472c4"/>
    </style:style>
    <style:style style:family="table-cell" style:name="a1279">
      <style:table-cell-properties fo:background-color="#4472c4"/>
    </style:style>
    <style:style style:family="table-cell" style:name="a1320">
      <style:table-cell-properties fo:background-color="#ffffff"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1321">
      <style:table-cell-properties fo:background-color="#eaeff7"/>
    </style:style>
    <style:style style:family="table-cell" style:name="a1230">
      <style:table-cell-properties fo:border-left="0.00347in solid #4472c4" fo:border-right="0.00347in solid #4472c4"/>
    </style:style>
    <style:style style:family="table-cell" style:name="a1322">
      <style:table-cell-properties fo:background-color="#eaeff7"/>
    </style:style>
    <style:style style:family="table-cell" style:name="a1231">
      <style:table-cell-properties fo:border-top="0.00347in solid #4472c4" fo:border-bottom="0.00347in solid #4472c4"/>
    </style:style>
    <style:style style:family="table-cell" style:name="a1323">
      <style:table-cell-properties fo:background-color="#5b9bd5"/>
      <style:text-properties fo:color="#ffffff" fo:font-family="+mn-lt" style:font-family-asian="+mn-ea" style:font-family-complex="+mn-cs" fo:font-weight="bold" style:font-weight-asian="bold" style:font-weight-complex="bold"/>
    </style:style>
    <style:style style:family="table-cell" style:name="a1232">
      <style:table-cell-properties fo:background-color="#4472c4"/>
      <style:text-properties fo:color="#ffffff" fo:font-family="+mn-lt" style:font-family-asian="+mn-ea" style:font-family-complex="+mn-cs" fo:font-weight="bold" style:font-weight-asian="bold" style:font-weight-complex="bold"/>
    </style:style>
    <style:style style:family="table-cell" style:name="a1233">
      <style:table-cell-properties fo:border-top="0.05556in double #4472c4"/>
      <style:text-properties fo:font-family="" style:font-family-asian="" style:font-family-complex="" fo:font-weight="bold" style:font-weight-asian="bold" style:font-weight-complex="bold"/>
    </style:style>
    <style:style style:family="table-cell" style:name="a1324">
      <style:table-cell-properties fo:background-color="#ffffff" fo:border-top="0.05556in double #5b9bd5"/>
      <style:text-properties fo:font-family="" style:font-family-asian="" style:font-family-complex="" fo:font-weight="bold" style:font-weight-asian="bold" style:font-weight-complex="bold"/>
    </style:style>
    <style:style style:family="table-cell" style:name="a1234">
      <style:table-cell-properties/>
      <style:text-properties fo:font-family="" style:font-family-asian="" style:font-family-complex="" fo:font-weight="bold" style:font-weight-asian="bold" style:font-weight-complex="bold"/>
    </style:style>
    <style:style style:family="table-cell" style:name="a1325">
      <style:table-cell-properties/>
      <style:text-properties fo:font-family="" style:font-family-asian="" style:font-family-complex="" fo:font-weight="bold" style:font-weight-asian="bold" style:font-weight-complex="bold"/>
    </style:style>
    <style:style style:family="table-cell" style:name="a1235">
      <style:table-cell-properties/>
      <style:text-properties fo:font-family="" style:font-family-asian="" style:font-family-complex="" fo:font-weight="bold" style:font-weight-asian="bold" style:font-weight-complex="bold"/>
    </style:style>
    <style:style style:family="table-cell" style:name="a1326">
      <style:table-cell-properties/>
      <style:text-properties fo:font-family="" style:font-family-asian="" style:font-family-complex="" fo:font-weight="bold" style:font-weight-asian="bold" style:font-weight-complex="bold"/>
    </style:style>
    <style:style style:family="table-cell" style:name="a1236">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27">
      <style:table-cell-properties fo:background-color="#ffffff" fo:border-top="0.02778in solid #000000" fo:border-bottom="0.02778in solid #000000"/>
      <style:text-properties fo:color="#000000" fo:font-family="+mn-lt" style:font-family-asian="+mn-ea" style:font-family-complex="+mn-cs"/>
    </style:style>
    <style:style style:family="table-cell" style:name="a1237">
      <style:table-cell-properties/>
    </style:style>
    <style:style style:family="table-cell" style:name="a1328">
      <style:table-cell-properties fo:background-color="#e7e7e7"/>
    </style:style>
    <style:style style:family="table-cell" style:name="a1238">
      <style:table-cell-properties fo:background-color="#ffe8cb"/>
    </style:style>
    <style:style style:family="table-cell" style:name="a1329">
      <style:table-cell-properties fo:background-color="#e7e7e7"/>
    </style:style>
    <style:style style:family="table-cell" style:name="a1239">
      <style:table-cell-properties/>
    </style:style>
    <style:style style:family="graphic" style:name="Graphics"/>
    <style:style style:family="table-cell" style:name="a1280">
      <style:table-cell-properties fo:background-color="#4472c4"/>
    </style:style>
    <style:style style:family="table-cell" style:name="a1281">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style style:family="table-cell" style:name="a1282">
      <style:table-cell-properties fo:background-color="#4472c4" fo:border-top="0.00347in solid #4472c4" fo:border-bottom="0.00347in solid #4472c4" fo:border-left="0.00347in solid #4472c4" fo:border-right="0.00347in solid #4472c4"/>
      <style:text-properties fo:font-family="" style:font-family-asian="" style:font-family-complex="" fo:font-weight="bold" style:font-weight-asian="bold" style:font-weight-complex="bold"/>
    </style:style>
    <style:style style:family="table-cell" style:name="a1283">
      <style:table-cell-properties fo:background-color="#4472c4" fo:border-top="0.00347in solid #4472c4" fo:border-bottom="0.00347in solid #4472c4" fo:border-left="0.00347in solid #4472c4" fo:border-right="0.00347in solid #4472c4"/>
      <style:text-properties fo:font-family="" style:font-family-asian="" style:font-family-complex="" fo:font-weight="bold" style:font-weight-asian="bold" style:font-weight-complex="bold"/>
    </style:style>
    <style:style style:family="table-cell" style:name="a1284">
      <style:table-cell-properties fo:background-color="#4472c4" fo:border-top="0.00347in solid #4472c4" fo:border-bottom="0.00347in solid #4472c4" fo:border-left="0.00347in solid #4472c4" fo:border-right="0.00347in solid #4472c4"/>
      <style:text-properties fo:font-family="" style:font-family-asian="" style:font-family-complex="" fo:font-weight="bold" style:font-weight-asian="bold" style:font-weight-complex="bold"/>
    </style:style>
    <style:style style:family="table-cell" style:name="a128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86">
      <style:table-cell-properties/>
    </style:style>
    <style:style style:family="table-cell" style:name="a1287">
      <style:table-cell-properties fo:background-color="#cfd5ea"/>
    </style:style>
    <style:style style:family="table-cell" style:name="a1288">
      <style:table-cell-properties/>
    </style:style>
    <style:style style:family="table-cell" style:name="a1289">
      <style:table-cell-properties fo:background-color="#cfd5ea"/>
    </style:style>
    <style:style style:family="table-cell" style:name="a1330">
      <style:table-cell-properties fo:background-color="#5b9bd5" fo:border-bottom="0.02778in solid #000000"/>
      <style:text-properties fo:color="#ffffff" fo:font-family="+mn-lt" style:font-family-asian="+mn-ea" style:font-family-complex="+mn-cs" fo:font-weight="bold" style:font-weight-asian="bold" style:font-weight-complex="bold"/>
    </style:style>
    <style:style style:family="table-cell" style:name="a1240">
      <style:table-cell-properties fo:background-color="#ffe8cb"/>
    </style:style>
    <style:style style:family="table-cell" style:name="a1331">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1241">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332">
      <style:table-cell-properties fo:background-color="#5b9bd5"/>
      <style:text-properties fo:color="#ffffff" fo:font-family="+mn-lt" style:font-family-asian="+mn-ea" style:font-family-complex="+mn-cs" fo:font-weight="bold" style:font-weight-asian="bold" style:font-weight-complex="bold"/>
    </style:style>
    <style:style style:family="table-cell" style:name="a1242">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333">
      <style:table-cell-properties fo:background-color="#5b9bd5"/>
      <style:text-properties fo:color="#ffffff" fo:font-family="+mn-lt" style:font-family-asian="+mn-ea" style:font-family-complex="+mn-cs" fo:font-weight="bold" style:font-weight-asian="bold" style:font-weight-complex="bold"/>
    </style:style>
    <style:style style:family="table-cell" style:name="a1243">
      <style:table-cell-properties fo:background-color="#ffc000"/>
      <style:text-properties fo:color="#ffffff" fo:font-family="+mn-lt" style:font-family-asian="+mn-ea" style:font-family-complex="+mn-cs" fo:font-weight="bold" style:font-weight-asian="bold" style:font-weight-complex="bold"/>
    </style:style>
    <style:style style:family="table-cell" style:name="a1334">
      <style:table-cell-properties fo:background-color="#ffffff"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1244">
      <style:table-cell-properties fo:background-color="#ffc000"/>
      <style:text-properties fo:color="#ffffff" fo:font-family="+mn-lt" style:font-family-asian="+mn-ea" style:font-family-complex="+mn-cs" fo:font-weight="bold" style:font-weight-asian="bold" style:font-weight-complex="bold"/>
    </style:style>
    <style:style style:family="table-cell" style:name="a1335">
      <style:table-cell-properties fo:background-color="#e9ebf5"/>
    </style:style>
    <style:style style:family="table-cell" style:name="a1245">
      <style:table-cell-properties fo:background-color="#eaeff7"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1336">
      <style:table-cell-properties fo:background-color="#e9ebf5"/>
    </style:style>
    <style:style style:family="table-cell" style:name="a1246">
      <style:table-cell-properties fo:background-color="#d2deef"/>
    </style:style>
    <style:style style:family="table-cell" style:name="a1337">
      <style:table-cell-properties fo:background-color="#4472c4"/>
      <style:text-properties fo:color="#ffffff" fo:font-family="+mn-lt" style:font-family-asian="+mn-ea" style:font-family-complex="+mn-cs" fo:font-weight="bold" style:font-weight-asian="bold" style:font-weight-complex="bold"/>
    </style:style>
    <style:style style:family="table-cell" style:name="a1247">
      <style:table-cell-properties fo:background-color="#d2deef"/>
    </style:style>
    <style:style style:family="table-cell" style:name="a1338">
      <style:table-cell-properties fo:background-color="#ffffff" fo:border-top="0.05556in double #4472c4"/>
      <style:text-properties fo:font-family="" style:font-family-asian="" style:font-family-complex="" fo:font-weight="bold" style:font-weight-asian="bold" style:font-weight-complex="bold"/>
    </style:style>
    <style:style style:family="table-cell" style:name="a1248">
      <style:table-cell-properties fo:background-color="#eaeff7"/>
      <style:text-properties fo:font-family="" style:font-family-asian="" style:font-family-complex="" fo:font-weight="bold" style:font-weight-asian="bold" style:font-weight-complex="bold"/>
    </style:style>
    <style:style style:family="table-cell" style:name="a1339">
      <style:table-cell-properties/>
      <style:text-properties fo:font-family="" style:font-family-asian="" style:font-family-complex="" fo:font-weight="bold" style:font-weight-asian="bold" style:font-weight-complex="bold"/>
    </style:style>
    <style:style style:family="table-cell" style:name="a1249">
      <style:table-cell-properties fo:background-color="#eaeff7" fo:border-top="0.02778in solid #5b9bd5"/>
      <style:text-properties fo:font-family="" style:font-family-asian="" style:font-family-complex="" fo:font-weight="bold" style:font-weight-asian="bold" style:font-weight-complex="bold"/>
    </style:style>
    <style:style style:family="table-cell" style:name="a129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29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292">
      <style:table-cell-properties fo:background-color="#4472c4"/>
      <style:text-properties fo:color="#ffffff" fo:font-family="+mn-lt" style:font-family-asian="+mn-ea" style:font-family-complex="+mn-cs" fo:font-weight="bold" style:font-weight-asian="bold" style:font-weight-complex="bold"/>
    </style:style>
    <style:style style:family="table-cell" style:name="a1293">
      <style:table-cell-properties fo:background-color="#4472c4"/>
      <style:text-properties fo:color="#ffffff" fo:font-family="+mn-lt" style:font-family-asian="+mn-ea" style:font-family-complex="+mn-cs" fo:font-weight="bold" style:font-weight-asian="bold" style:font-weight-complex="bold"/>
    </style:style>
    <style:style style:family="table-cell" style:name="a1294">
      <style:table-cell-properties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1295">
      <style:table-cell-properties fo:border-left="0.00347in solid #ed7d31" fo:border-right="0.00347in solid #ed7d31"/>
    </style:style>
    <style:style style:family="table-cell" style:name="a1296">
      <style:table-cell-properties fo:border-left="0.00347in solid #ed7d31" fo:border-right="0.00347in solid #ed7d31"/>
    </style:style>
    <style:style style:family="table-cell" style:name="a1297">
      <style:table-cell-properties fo:border-top="0.00347in solid #ed7d31" fo:border-bottom="0.00347in solid #ed7d31"/>
    </style:style>
    <style:style style:family="table-cell" style:name="a1298">
      <style:table-cell-properties fo:background-color="#ed7d31"/>
      <style:text-properties fo:color="#ffffff" fo:font-family="+mn-lt" style:font-family-asian="+mn-ea" style:font-family-complex="+mn-cs" fo:font-weight="bold" style:font-weight-asian="bold" style:font-weight-complex="bold"/>
    </style:style>
    <style:style style:family="table-cell" style:name="a1299">
      <style:table-cell-properties fo:border-top="0.05556in double #ed7d31"/>
      <style:text-properties fo:font-family="" style:font-family-asian="" style:font-family-complex="" fo:font-weight="bold" style:font-weight-asian="bold" style:font-weight-complex="bold"/>
    </style:style>
    <style:style style:family="table-cell" style:name="a1340">
      <style:table-cell-properties/>
      <style:text-properties fo:font-family="" style:font-family-asian="" style:font-family-complex="" fo:font-weight="bold" style:font-weight-asian="bold" style:font-weight-complex="bold"/>
    </style:style>
    <style:style style:family="table-cell" style:name="a1250">
      <style:table-cell-properties/>
      <style:text-properties fo:font-family="" style:font-family-asian="" style:font-family-complex="" fo:font-weight="bold" style:font-weight-asian="bold" style:font-weight-complex="bold"/>
    </style:style>
    <style:style style:family="table-cell" style:name="a1251">
      <style:table-cell-properties/>
      <style:text-properties fo:font-family="" style:font-family-asian="" style:font-family-complex="" fo:font-weight="bold" style:font-weight-asian="bold" style:font-weight-complex="bold"/>
    </style:style>
    <style:style style:family="table-cell" style:name="a1252">
      <style:table-cell-properties fo:background-color="#ffc000"/>
      <style:text-properties fo:color="#ffffff" fo:font-family="+mn-lt" style:font-family-asian="+mn-ea" style:font-family-complex="+mn-cs"/>
    </style:style>
    <style:style style:family="table-cell" style:name="a1253">
      <style:table-cell-properties fo:background-color="#cb9900"/>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2404" draw:style="radial" draw:cx="100%" draw:cy="100%" draw:start-color="#002e6d" draw:end-color="#002e6d" draw:start-intensity="100%" draw:end-intensity="100%"/>
    <table:table-template table:name="{69012ECD-51FC-41F1-AA8D-1B2483CD663E}">
      <table:first-row table:style-name="a1232" table:paragraph-style-name=""/>
      <table:last-row table:style-name="a1233" table:paragraph-style-name=""/>
      <table:first-column table:style-name="a1234" table:paragraph-style-name=""/>
      <table:last-column table:style-name="a1235" table:paragraph-style-name=""/>
      <table:body table:style-name="a1228" table:paragraph-style-name=""/>
      <table:odd-rows table:style-name="a1231" table:paragraph-style-name=""/>
      <table:even-columns table:style-name="a1229" table:paragraph-style-name=""/>
      <table:odd-columns table:style-name="a1230" table:paragraph-style-name=""/>
    </table:table-template>
    <table:table-template table:name="{00A15C55-8517-42AA-B614-E9B94910E393}">
      <table:first-row table:style-name="a1241" table:paragraph-style-name=""/>
      <table:last-row table:style-name="a1242" table:paragraph-style-name=""/>
      <table:first-column table:style-name="a1243" table:paragraph-style-name=""/>
      <table:last-column table:style-name="a1244" table:paragraph-style-name=""/>
      <table:body table:style-name="a1236" table:paragraph-style-name=""/>
      <table:even-rows table:style-name="a1239" table:paragraph-style-name=""/>
      <table:odd-rows table:style-name="a1240" table:paragraph-style-name=""/>
      <table:even-columns table:style-name="a1237" table:paragraph-style-name=""/>
      <table:odd-columns table:style-name="a1238" table:paragraph-style-name=""/>
    </table:table-template>
    <table:table-template table:name="{22838BEF-8BB2-4498-84A7-C5851F593DF1}">
      <table:first-row table:style-name="a1248" table:paragraph-style-name=""/>
      <table:last-row table:style-name="a1249" table:paragraph-style-name=""/>
      <table:first-column table:style-name="a1250" table:paragraph-style-name=""/>
      <table:last-column table:style-name="a1251" table:paragraph-style-name=""/>
      <table:body table:style-name="a1245" table:paragraph-style-name=""/>
      <table:odd-rows table:style-name="a1247" table:paragraph-style-name=""/>
      <table:odd-columns table:style-name="a1246" table:paragraph-style-name=""/>
    </table:table-template>
    <table:table-template table:name="{E929F9F4-4A8F-4326-A1B4-22849713DDAB}">
      <table:first-row table:style-name="a1255" table:paragraph-style-name=""/>
      <table:last-row table:style-name="a1256" table:paragraph-style-name=""/>
      <table:first-column table:style-name="a1257" table:paragraph-style-name=""/>
      <table:last-column table:style-name="a1258" table:paragraph-style-name=""/>
      <table:body table:style-name="a1252" table:paragraph-style-name=""/>
      <table:odd-rows table:style-name="a1254" table:paragraph-style-name=""/>
      <table:odd-columns table:style-name="a1253" table:paragraph-style-name=""/>
    </table:table-template>
    <table:table-template table:name="{17292A2E-F333-43FB-9621-5CBBE7FDCDCB}">
      <table:first-row table:style-name="a1263" table:paragraph-style-name=""/>
      <table:last-row table:style-name="a1264" table:paragraph-style-name=""/>
      <table:first-column table:style-name="a1265" table:paragraph-style-name=""/>
      <table:last-column table:style-name="a1266" table:paragraph-style-name=""/>
      <table:body table:style-name="a1259" table:paragraph-style-name=""/>
      <table:odd-rows table:style-name="a1262" table:paragraph-style-name=""/>
      <table:even-columns table:style-name="a1260" table:paragraph-style-name=""/>
      <table:odd-columns table:style-name="a1261" table:paragraph-style-name=""/>
    </table:table-template>
    <table:table-template table:name="{35758FB7-9AC5-4552-8A53-C91805E547FA}">
      <table:first-row table:style-name="a1272" table:paragraph-style-name=""/>
      <table:last-row table:style-name="a1273" table:paragraph-style-name=""/>
      <table:first-column table:style-name="a1274" table:paragraph-style-name=""/>
      <table:last-column table:style-name="a1275" table:paragraph-style-name=""/>
      <table:body table:style-name="a1267" table:paragraph-style-name=""/>
      <table:even-rows table:style-name="a1270" table:paragraph-style-name=""/>
      <table:odd-rows table:style-name="a1271" table:paragraph-style-name=""/>
      <table:even-columns table:style-name="a1268" table:paragraph-style-name=""/>
      <table:odd-columns table:style-name="a1269" table:paragraph-style-name=""/>
    </table:table-template>
    <table:table-template table:name="{3C2FFA5D-87B4-456A-9821-1D502468CF0F}">
      <table:first-row table:style-name="a1281" table:paragraph-style-name=""/>
      <table:last-row table:style-name="a1282" table:paragraph-style-name=""/>
      <table:first-column table:style-name="a1283" table:paragraph-style-name=""/>
      <table:last-column table:style-name="a1284" table:paragraph-style-name=""/>
      <table:body table:style-name="a1276" table:paragraph-style-name=""/>
      <table:even-rows table:style-name="a1279" table:paragraph-style-name=""/>
      <table:odd-rows table:style-name="a1280" table:paragraph-style-name=""/>
      <table:even-columns table:style-name="a1277" table:paragraph-style-name=""/>
      <table:odd-columns table:style-name="a1278" table:paragraph-style-name=""/>
    </table:table-template>
    <table:table-template table:name="{5C22544A-7EE6-4342-B048-85BDC9FD1C3A}">
      <table:first-row table:style-name="a1290" table:paragraph-style-name=""/>
      <table:last-row table:style-name="a1291" table:paragraph-style-name=""/>
      <table:first-column table:style-name="a1292" table:paragraph-style-name=""/>
      <table:last-column table:style-name="a1293" table:paragraph-style-name=""/>
      <table:body table:style-name="a1285" table:paragraph-style-name=""/>
      <table:even-rows table:style-name="a1288" table:paragraph-style-name=""/>
      <table:odd-rows table:style-name="a1289" table:paragraph-style-name=""/>
      <table:even-columns table:style-name="a1286" table:paragraph-style-name=""/>
      <table:odd-columns table:style-name="a1287" table:paragraph-style-name=""/>
    </table:table-template>
    <table:table-template table:name="{72833802-FEF1-4C79-8D5D-14CF1EAF98D9}">
      <table:first-row table:style-name="a1298" table:paragraph-style-name=""/>
      <table:last-row table:style-name="a1299" table:paragraph-style-name=""/>
      <table:first-column table:style-name="a1300" table:paragraph-style-name=""/>
      <table:last-column table:style-name="a1301" table:paragraph-style-name=""/>
      <table:body table:style-name="a1294" table:paragraph-style-name=""/>
      <table:odd-rows table:style-name="a1297" table:paragraph-style-name=""/>
      <table:even-columns table:style-name="a1295" table:paragraph-style-name=""/>
      <table:odd-columns table:style-name="a1296" table:paragraph-style-name=""/>
    </table:table-template>
    <table:table-template table:name="{3B4B98B0-60AC-42C2-AFA5-B58CD77FA1E5}">
      <table:first-row table:style-name="a1306" table:paragraph-style-name=""/>
      <table:last-row table:style-name="a1307" table:paragraph-style-name=""/>
      <table:first-column table:style-name="a1308" table:paragraph-style-name=""/>
      <table:last-column table:style-name="a1309" table:paragraph-style-name=""/>
      <table:body table:style-name="a1302" table:paragraph-style-name=""/>
      <table:even-rows table:style-name="a1304" table:paragraph-style-name=""/>
      <table:odd-rows table:style-name="a1305" table:paragraph-style-name=""/>
      <table:odd-columns table:style-name="a1303" table:paragraph-style-name=""/>
    </table:table-template>
    <table:table-template table:name="{7DF18680-E054-41AD-8BC1-D1AEF772440D}">
      <table:first-row table:style-name="a1315" table:paragraph-style-name=""/>
      <table:last-row table:style-name="a1316" table:paragraph-style-name=""/>
      <table:first-column table:style-name="a1317" table:paragraph-style-name=""/>
      <table:last-column table:style-name="a1318" table:paragraph-style-name=""/>
      <table:body table:style-name="a1310" table:paragraph-style-name=""/>
      <table:even-rows table:style-name="a1313" table:paragraph-style-name=""/>
      <table:odd-rows table:style-name="a1314" table:paragraph-style-name=""/>
      <table:even-columns table:style-name="a1311" table:paragraph-style-name=""/>
      <table:odd-columns table:style-name="a1312" table:paragraph-style-name=""/>
    </table:table-template>
    <table:table-template table:name="{2D5ABB26-0587-4C30-8999-92F81FD0307C}">
      <table:body table:style-name="a1319" table:paragraph-style-name=""/>
    </table:table-template>
    <table:table-template table:name="{FABFCF23-3B69-468F-B69F-88F6DE6A72F2}">
      <table:first-row table:style-name="a1323" table:paragraph-style-name=""/>
      <table:last-row table:style-name="a1324" table:paragraph-style-name=""/>
      <table:first-column table:style-name="a1325" table:paragraph-style-name=""/>
      <table:last-column table:style-name="a1326" table:paragraph-style-name=""/>
      <table:body table:style-name="a1320" table:paragraph-style-name=""/>
      <table:odd-rows table:style-name="a1322" table:paragraph-style-name=""/>
      <table:odd-columns table:style-name="a1321" table:paragraph-style-name=""/>
    </table:table-template>
    <table:table-template table:name="{74C1A8A3-306A-4EB7-A6B1-4F7E0EB9C5D6}">
      <table:first-row table:style-name="a1330" table:paragraph-style-name=""/>
      <table:last-row table:style-name="a1331" table:paragraph-style-name=""/>
      <table:first-column table:style-name="a1332" table:paragraph-style-name=""/>
      <table:last-column table:style-name="a1333" table:paragraph-style-name=""/>
      <table:body table:style-name="a1327" table:paragraph-style-name=""/>
      <table:odd-rows table:style-name="a1329" table:paragraph-style-name=""/>
      <table:odd-columns table:style-name="a1328" table:paragraph-style-name=""/>
    </table:table-template>
    <table:table-template table:name="{B301B821-A1FF-4177-AEE7-76D212191A09}">
      <table:first-row table:style-name="a1337" table:paragraph-style-name=""/>
      <table:last-row table:style-name="a1338" table:paragraph-style-name=""/>
      <table:first-column table:style-name="a1339" table:paragraph-style-name=""/>
      <table:last-column table:style-name="a1340" table:paragraph-style-name=""/>
      <table:body table:style-name="a1334" table:paragraph-style-name=""/>
      <table:odd-rows table:style-name="a1336" table:paragraph-style-name=""/>
      <table:odd-columns table:style-name="a1335"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308">
      <style:text-properties fo:font-variant="normal" fo:text-transform="none" fo:color="#007eb4" style:text-line-through-type="none" style:text-line-through-style="none" style:text-line-through-width="auto" style:text-line-through-color="font-color" style:text-position="0% 100%" fo:font-family="Source Sans Pro" style:font-family-asian="Source Sans Pro" style:font-family-complex="Source Sans Pro" fo:font-size="0.625in" style:font-size-asian="0.625in" style:font-size-complex="0.62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9">
      <style:paragraph-properties fo:line-height="0.625in"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draw:fill="none" draw:stroke="solid" svg:stroke-width="0.01389in" svg:stroke-color="#000000" svg:stroke-opacity="100%"/>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1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draw:fill="none" draw:stroke="solid" svg:stroke-width="0.01389in" svg:stroke-color="#000000" svg:stroke-opacity="100%"/>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898989" style:text-line-through-type="none" style:text-line-through-style="none" style:text-line-through-width="auto" style:text-line-through-color="font-color" style:text-position="0% 100%" fo:font-family="Source Sans Pro" style:font-family-asian="Source Sans Pro" style:font-family-complex="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2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1">
      <style:graphic-properties draw:fill="none" draw:stroke="solid" svg:stroke-width="0.01389in" svg:stroke-color="#000000" svg:stroke-opacity="100%"/>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parent-style-name="Graphics">
      <style:graphic-properties draw:fill="none" draw:stroke="none"/>
    </style:style>
    <style:style style:family="paragraph" style:name="a3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parent-style-name="Graphics">
      <style:graphic-properties draw:fill="none" fo:clip="rect(0in, 0in, 0in, 0in)"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0">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
      <style:drawing-page-properties draw:fill="solid" draw:fill-color="#003e7f" draw:opacity="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 style:parent-style-name="Graphics">
      <style:graphic-properties draw:fill="none" fo:clip="rect(0in, 0in, 0in, 0in)" draw:stroke="non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83333in" style:font-size-asian="0.83333in" style:font-size-complex="0.83333in" fo:letter-spacing="-0.031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3">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75%"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5">
      <style:drawing-page-properties draw:fill="solid" draw:fill-color="#003e7f" draw:opacity="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179" style:parent-style-name="Graphics">
      <style:graphic-properties draw:fill="none" draw:stroke="none"/>
    </style:style>
    <style:style style:family="paragraph" style:name="a3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05in" fo:padding-bottom="0.05in" fo:padding-left="0.1in" fo:padding-right="0.1in" draw:textarea-vertical-align="middle" draw:textarea-horizontal-align="center" draw:fill="solid" draw:fill-color="#007dbc" draw:opacity="100%" draw:stroke="none" draw:auto-grow-width="false" draw:auto-grow-height="fals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complex="Source Sans Pro" fo:font-size="0.625in" style:font-size-asian="0.625in" style:font-size-complex="0.62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1">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resentation" style:name="a33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419">
      <style:graphic-properties draw:fill="none" draw:stroke="solid" svg:stroke-width="0.01389in" svg:stroke-color="#000000" svg:stroke-opacity="100%"/>
    </style:style>
    <style:style style:family="graphic" style:name="a180" style:parent-style-name="Graphics">
      <style:graphic-properties draw:fill="none" draw:stroke="none"/>
    </style:style>
    <style:style style:family="text" style:name="a181">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0.625in"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d9d9d9" style:text-line-through-type="none" style:text-line-through-style="none" style:text-line-through-width="auto" style:text-line-through-color="font-color" style:text-position="0% 100%" fo:font-family="Source Sans Pro" style:font-family-asian="Source Sans Pro" style:font-family-complex="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2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graphic" style:name="a267">
      <style:graphic-properties fo:wrap-option="wrap" fo:padding-top="0.05in" fo:padding-bottom="0.05in" fo:padding-left="0.1in" fo:padding-right="0.1in" draw:textarea-vertical-align="middle" draw:textarea-horizontal-align="center" draw:fill="solid" draw:fill-color="#003e7f" draw:opacity="100%" draw:stroke="none" draw:auto-grow-width="false" draw:auto-grow-height="false"/>
      <style:paragraph-properties style:font-independent-line-spacing="true" style:writing-mode="lr-tb"/>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parent-style-name="Graphics">
      <style:graphic-properties draw:fill="none" draw:stroke="non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parent-style-name="Graphics">
      <style:graphic-properties draw:fill="none" fo:clip="rect(0in, 0in, 0in, 0in)" draw:stroke="none"/>
    </style:style>
    <style:style style:family="graphic" style:name="a348">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75in" style:font-size-asian="0.375in" style:font-size-complex="0.37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fo:wrap-option="wrap" fo:padding-top="0.05in" fo:padding-bottom="0.05in" fo:padding-left="0.1in" fo:padding-right="0.1in" draw:textarea-vertical-align="middle" draw:textarea-horizontal-align="center" draw:fill="solid" draw:fill-color="#003e7f" draw:opacity="100%"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parent-style-name="Graphics">
      <style:graphic-properties draw:fill="none" draw:stroke="none"/>
    </style:style>
    <style:style style:family="presentation" style:name="a27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graphic" style:name="a353" style:parent-style-name="Graphics">
      <style:graphic-properties draw:fill="none" fo:clip="rect(0in, 0in, 0in, 0in)" draw:stroke="none"/>
    </style:style>
    <style:style style:family="presentation" style:name="a278">
      <style:graphic-properties draw:fill="none" draw:stroke="solid" svg:stroke-width="0.01389in" svg:stroke-color="#000000" svg:stroke-opacity="100%"/>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9">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graphic" style:name="a512">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0.74994in" fo:margin-left="0.56246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5">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0.74994in" fo:margin-left="0.93743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parent-style-name="Graphics">
      <style:graphic-properties draw:fill="none" draw:stroke="non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draw:fill="none" draw:stroke="solid" svg:stroke-width="0.01389in" svg:stroke-color="#000000" svg:stroke-opacity="100%"/>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6">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draw:fill="none" draw:stroke="solid" svg:stroke-width="0.01389in" svg:stroke-color="#000000" svg:stroke-opacity="100%"/>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parent-style-name="Graphics">
      <style:graphic-properties draw:fill="none" draw:stroke="non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parent-style-name="Graphics">
      <style:graphic-properties draw:fill="none" fo:clip="rect(0in, 0in, 0in, 0in)" draw:stroke="none"/>
    </style:style>
    <style:style style:family="presentation" style:name="a299">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6" style:parent-style-name="Graphics">
      <style:graphic-properties draw:fill="none" draw:stroke="non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5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draw:fill="none" draw:stroke="solid" svg:stroke-width="0.01389in" svg:stroke-color="#000000" svg:stroke-opacity="100%"/>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parent-style-name="Graphics">
      <style:graphic-properties draw:fill="none" draw:stroke="non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graphic" style:name="a547">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graphic" style:name="a623" style:parent-style-name="Graphics">
      <style:graphic-properties draw:fill="none" draw:stroke="none"/>
    </style:style>
    <style:style style:family="presentation" style:name="a700">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graphic" style:name="a624" style:parent-style-name="Graphics">
      <style:graphic-properties draw:fill="none" fo:clip="rect(0in, 0in, 0in, 0in)" draw:stroke="non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draw:fill="none" draw:stroke="solid" svg:stroke-width="0.01389in" svg:stroke-color="#000000" svg:stroke-opacity="100%"/>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parent-style-name="Graphics">
      <style:graphic-properties draw:fill="none" draw:stroke="non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parent-style-name="Graphics">
      <style:graphic-properties draw:fill="none" draw:stroke="none"/>
    </style:style>
    <style:style style:family="graphic" style:name="a552" style:parent-style-name="Graphics">
      <style:graphic-properties draw:fill="none" fo:clip="rect(0in, 0in, 0in, 0in)" draw:stroke="none"/>
    </style:style>
    <style:style style:family="paragraph" style:name="a11">
      <style:paragraph-properties fo:line-height="90%" fo:text-align="left" style:tab-stop-distance="0.74994in" fo:margin-left="1.3124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13">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0.74994in" fo:margin-left="1.68737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resentation" style:name="a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8b8b8d" style:text-line-through-type="none" style:text-line-through-style="none" style:text-line-through-width="auto" style:text-line-through-color="font-color" style:text-position="0% 100%" fo:font-family="Source Sans Pro" style:font-family-asian="Source Sans Pro" style:font-family-complex="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0.74994in" fo:margin-left="0.18749in" fo:margin-right="0in" fo:text-indent="-0.18749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parent-style-name="Graphics">
      <style:graphic-properties draw:fill="none" draw:stroke="none"/>
    </style:style>
    <style:style style:family="paragraph" style:name="a561">
      <style:paragraph-properties fo:line-height="90%" fo:text-align="left" style:tab-stop-distance="0.74994in" fo:margin-left="0.56246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paragraph" style:name="a564">
      <style:paragraph-properties fo:line-height="90%" fo:text-align="left" style:tab-stop-distance="0.74994in" fo:margin-left="0.93743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1">
      <style:graphic-properties draw:fill="none" draw:stroke="solid" svg:stroke-width="0.01389in" svg:stroke-color="#000000" svg:stroke-opacity="100%"/>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0.74994in" fo:margin-left="1.3124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 style:parent-style-name="Graphics">
      <style:graphic-properties draw:fill="none" draw:stroke="none"/>
    </style:style>
    <style:style style:family="paragraph" style:name="a7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parent-style-name="Graphics">
      <style:graphic-properties draw:fill="none" fo:clip="rect(0in, 0in, 0in, 0in)" draw:stroke="none"/>
    </style:style>
    <style:style style:family="text" style:name="a569">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parent-style-name="Graphics">
      <style:graphic-properties draw:fill="none" draw:stroke="non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2" style:parent-style-name="Graphics">
      <style:graphic-properties draw:fill="none" draw:stroke="non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left" style:tab-stop-distance="0.74994in" fo:margin-left="1.68737in" fo:margin-right="0in" fo:text-indent="-0.18749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75in" style:font-size-asian="0.375in" style:font-size-complex="0.37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75in" style:font-size-asian="0.375in" style:font-size-complex="0.37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8">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parent-style-name="Graphics">
      <style:graphic-properties draw:fill="none" draw:stroke="non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graphic" style:name="a578">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graphic" style:name="a731">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2" style:parent-style-name="Graphics">
      <style:graphic-properties draw:fill="none" draw:stroke="none"/>
    </style:style>
    <style:style style:family="presentation" style:name="a65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parent-style-name="Graphics">
      <style:graphic-properties draw:fill="none" fo:clip="rect(0in, 0in, 0in, 0in)" draw:stroke="non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7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816">
      <style:graphic-properties draw:fill="none" draw:stroke="solid" svg:stroke-width="0.01389in" svg:stroke-color="#000000" svg:stroke-opacity="100%"/>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6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6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75in" style:font-size-asian="0.375in" style:font-size-complex="0.37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5" style:parent-style-name="Graphics">
      <style:graphic-properties draw:fill="none" draw:stroke="none"/>
    </style:style>
    <style:style style:family="paragraph" style:name="a742">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graphic" style:name="a904" style:parent-style-name="Graphics">
      <style:graphic-properties draw:fill="none" draw:stroke="non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parent-style-name="Graphics">
      <style:graphic-properties draw:fill="none" fo:clip="rect(0in, 0in, 0in, 0in)" draw:stroke="none"/>
    </style:style>
    <style:style style:family="paragraph" style:name="a8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draw:fill="none" draw:stroke="solid" svg:stroke-width="0.01389in" svg:stroke-color="#000000" svg:stroke-opacity="100%"/>
    </style:style>
    <style:style style:family="presentation" style:name="a51">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parent-style-name="Graphics">
      <style:graphic-properties draw:fill="none" draw:stroke="none"/>
    </style:style>
    <style:style style:family="paragraph" style:name="a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parent-style-name="Graphics">
      <style:graphic-properties draw:fill="none" fo:clip="rect(0in, 0in, 0in, 0in)" draw:stroke="none"/>
    </style:style>
    <style:style style:family="text" style:name="a674">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0.74994in" fo:margin-left="0.3125in" fo:margin-right="0in" fo:text-indent="-0.312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7">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15">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10">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13">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75in" style:font-size-asian="0.375in" style:font-size-complex="0.37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draw:fill="none" draw:stroke="solid" svg:stroke-width="0.01389in" svg:stroke-color="#000000" svg:stroke-opacity="100%"/>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parent-style-name="Graphics">
      <style:graphic-properties draw:fill="none" draw:stroke="none"/>
    </style:style>
    <style:style style:family="paragraph" style:name="a7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graphic" style:name="a847" style:parent-style-name="Graphics">
      <style:graphic-properties draw:fill="none" draw:stroke="non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8" style:parent-style-name="Graphics">
      <style:graphic-properties draw:fill="none" fo:clip="rect(0in, 0in, 0in, 0in)" draw:stroke="none"/>
    </style:style>
    <style:style style:family="text" style:name="a925">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complex="Source Sans Pr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021">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929">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resentation" style:name="a102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72">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90">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drawing-page" style:name="a74">
      <style:drawing-page-properties draw:fill="solid" draw:fill-color="#003e7f" draw:opacity="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center" draw:fill="solid" draw:fill-color="#003e7f" draw:opacity="100%" draw:stroke="none" draw:auto-grow-width="false" draw:auto-grow-height="false"/>
      <style:paragraph-properties style:font-independent-line-spacing="true" style:writing-mode="lr-tb"/>
    </style:style>
    <style:style style:family="paragraph" style:name="a7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parent-style-name="Graphics">
      <style:graphic-properties draw:fill="none" draw:stroke="non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78">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854">
      <style:paragraph-properties fo:line-height="90%" fo:text-align="left" style:tab-stop-distance="0.74994in" fo:margin-left="0.3125in" fo:margin-right="0in" fo:text-indent="-0.312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75in" style:font-size-asian="0.375in" style:font-size-complex="0.37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9">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936">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draw:fill="none" draw:stroke="solid" svg:stroke-width="0.01389in" svg:stroke-color="#000000" svg:stroke-opacity="100%"/>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3">
      <style:graphic-properties draw:fill="none" draw:stroke="solid" svg:stroke-width="0.01389in" svg:stroke-color="#000000" svg:stroke-opacity="100%"/>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middle" draw:textarea-horizontal-align="center" draw:fill="solid" draw:fill-color="#cc0000" draw:opacity="100%" draw:stroke="none" draw:auto-grow-width="false" draw:auto-grow-height="fals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4" style:parent-style-name="Graphics">
      <style:graphic-properties draw:fill="none" draw:stroke="non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graphic" style:name="a787">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3">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11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fo:wrap-option="wrap" fo:padding-top="0.05in" fo:padding-bottom="0.05in" fo:padding-left="0.1in" fo:padding-right="0.1in" draw:textarea-vertical-align="middle" draw:textarea-horizontal-align="center" draw:fill="solid" draw:fill-color="#cc0000" draw:opacity="100%"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graphic" style:name="a790">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resentation" style:name="a98">
      <style:graphic-properties draw:fill="none" draw:stroke="solid" svg:stroke-width="0.01389in" svg:stroke-color="#000000" svg:stroke-opacity="100%"/>
    </style:style>
    <style:style style:family="graphic" style:name="a791" style:parent-style-name="Graphics">
      <style:graphic-properties draw:fill="none" draw:stroke="non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parent-style-name="Graphics">
      <style:graphic-properties draw:fill="none" fo:clip="rect(0in, 0in, 0in, 0in)" draw:stroke="none"/>
    </style:style>
    <style:style style:family="text" style:name="a793">
      <style:text-properties fo:font-variant="normal" fo:text-transform="none" fo:color="#003e7f" style:text-line-through-type="none" style:text-line-through-style="none" style:text-line-through-width="auto" style:text-line-through-color="font-color" style:text-position="0% 100%" fo:font-family="Source Sans Pro" style:font-family-asian="Source Sans Pro" style:font-family-complex="Source Sans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90%" fo:text-align="left" style:tab-stop-distance="0.74994in" fo:margin-left="0.3125in" fo:margin-right="0in" fo:text-indent="-0.312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2">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draw:fill="none" draw:stroke="solid" svg:stroke-width="0.01389in" svg:stroke-color="#000000" svg:stroke-opacity="100%"/>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954">
      <style:graphic-properties draw:fill="none" draw:stroke="solid" svg:stroke-width="0.01389in" svg:stroke-color="#000000" svg:stroke-opacity="100%"/>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1">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graphic" style:name="a1056" style:parent-style-name="Graphics">
      <style:graphic-properties draw:fill="none" draw:stroke="non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graphic" style:name="a1059">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paragraph" style:name="a1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2">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graphic" style:name="a1137" style:parent-style-name="Graphics">
      <style:graphic-properties draw:fill="none" draw:stroke="none"/>
    </style:style>
    <style:style style:family="drawing-page" style:name="a12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aragraph" style:name="a9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graphic" style:name="a1062">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graphic" style:name="a1063" style:parent-style-name="Graphics">
      <style:graphic-properties draw:fill="none" draw:stroke="none"/>
    </style:style>
    <style:style style:family="graphic" style:name="a1064" style:parent-style-name="Graphics">
      <style:graphic-properties draw:fill="none" fo:clip="rect(0in, 0in, 0in, 0in)" draw:stroke="none"/>
    </style:style>
    <style:style style:family="graphic" style:name="a1140">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text" style:name="a1065">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presentation" style:name="a10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parent-style-name="Graphics">
      <style:graphic-properties draw:fill="none" draw:stroke="none"/>
    </style:style>
    <style:style style:family="text" style:name="a1069">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graphic" style:name="a1145" style:parent-style-name="Graphics">
      <style:graphic-properties draw:fill="none" fo:clip="rect(0in, 0in, 0in, 0in)" draw:stroke="none"/>
    </style:style>
    <style:style style:family="text" style:name="a1146">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2">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graphic" style:name="a897" style:parent-style-name="Graphics">
      <style:graphic-properties draw:fill="none" draw:stroke="non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0">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parent-style-name="Graphics">
      <style:graphic-properties draw:fill="none" draw:stroke="non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3">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1">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4">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5">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center" draw:fill="solid" draw:fill-color="#cc3538" draw:opacity="100%" draw:stroke="none"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graphic" style:name="a985" style:parent-style-name="Graphics">
      <style:graphic-properties draw:fill="none" draw:stroke="none"/>
    </style:style>
    <style:style style:family="graphic" style:name="a986" style:parent-style-name="Graphics">
      <style:graphic-properties draw:fill="none" fo:clip="rect(0in, 0in, 0in, 0in)" draw:stroke="none"/>
    </style:style>
    <style:style style:family="text" style:name="a987">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80">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4">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5">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2">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88">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5">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8">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69">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91">
      <style:text-properties fo:font-variant="normal" fo:text-transform="none" fo:color="#002e6d" style:text-line-through-type="none" style:text-line-through-style="none" style:text-line-through-width="auto" style:text-line-through-color="font-color" style:text-position="0% 100%" fo:font-family="Source Sans Pro" style:font-family-asian="Source Sans Pro" style:font-family-complex="Source Sans Pro"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complex="Source Sans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375in" style:font-size-asian="0.375in" style:font-size-complex="0.375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5">
      <style:paragraph-properties fo:line-height="90%"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72">
      <style:text-properties fo:font-variant="normal" fo:text-transform="none" fo:color="#1b1e29" style:text-line-through-type="none" style:text-line-through-style="none" style:text-line-through-width="auto" style:text-line-through-color="font-color" style:text-position="0% 100%" fo:font-family="Source Sans Pro" style:font-family-asian="Source Sans Pro"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9">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middle" draw:textarea-horizontal-align="center" draw:fill="solid" draw:fill-color="#003f80" draw:opacity="100%"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1">
      <style:graphic-properties draw:fill="none" draw:stroke="solid" svg:stroke-width="0.01389in" svg:stroke-color="#000000" svg:stroke-opacity="100%"/>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003e7f" draw:opacity="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122" style:parent-style-name="Graphics">
      <style:graphic-properties draw:fill="none" fo:clip="rect(0in, 0in, 0in, 0in)" draw:stroke="non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center" draw:fill="solid" draw:fill-color="#002e6d" draw:opacity="100%"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83333in" style:font-size-asian="0.83333in" style:font-size-complex="0.83333in" fo:letter-spacing="-0.031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75%"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parent-style-name="Graphics">
      <style:graphic-properties draw:fill="none" draw:stroke="none"/>
    </style:style>
    <style:style style:family="presentation" style:name="a213">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graphic" style:name="a137" style:parent-style-name="Graphics">
      <style:graphic-properties draw:fill="none" draw:stroke="non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
      <style:drawing-page-properties draw:fill="solid" draw:fill-color="#003e7f" draw:opacity="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parent-style-name="Graphics">
      <style:graphic-properties draw:fill="none" fo:clip="rect(0in, 0in, 0in, 0in)" draw:stroke="none"/>
    </style:style>
    <style:style style:family="graphic" style:name="a217" style:parent-style-name="Graphics">
      <style:graphic-properties draw:fill="none" draw:stroke="none"/>
    </style:style>
    <style:style style:family="text" style:name="a218">
      <style:text-properties fo:font-variant="normal" fo:text-transform="none" fo:color="#003f80" style:text-line-through-type="none" style:text-line-through-style="none" style:text-line-through-width="auto" style:text-line-through-color="font-color" style:text-position="0% 100%" fo:font-family="Source Sans Pro" style:font-family-asian="Source Sans Pro" style:font-family-complex="Source Sans Pro" fo:font-size="0.83333in" style:font-size-asian="0.83333in" style:font-size-complex="0.83333in" fo:letter-spacing="-0.031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
      <style:paragraph-properties fo:line-height="75%" fo:text-align="center" style:tab-stop-distance="0.7499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c00000" style:text-line-through-type="none" style:text-line-through-style="none" style:text-line-through-width="auto" style:text-line-through-color="font-color" style:text-position="0% 100%" fo:font-family="Source Sans Pro" style:font-family-asian="Source Sans Pro" style:font-family-complex="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90%" fo:text-align="center" style:tab-stop-distance="0.74994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095in" fo:padding-bottom="0.05095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3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1">
      <style:drawing-page-properties draw:fill="solid" draw:fill-color="#003e7f" draw:opacity="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63">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78">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89">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1">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24996in" text:min-label-width="0.3125in"/>
        <style:text-properties fo:font-family="Arial" style:font-family-generic="swiss" style:font-pitch="variable" fo:font-size="100%"/>
      </text:list-level-style-bullet>
      <text:list-level-style-bullet text:level="3" text:bullet-char="•">
        <style:list-level-properties text:space-before="0.62493in" text:min-label-width="0.3125in"/>
        <style:text-properties fo:font-family="Arial" style:font-family-generic="swiss" style:font-pitch="variable" fo:font-size="100%"/>
      </text:list-level-style-bullet>
      <text:list-level-style-bullet text:level="4" text:bullet-char="•">
        <style:list-level-properties text:space-before="0.9999in" text:min-label-width="0.3125in"/>
        <style:text-properties fo:font-family="Arial" style:font-family-generic="swiss" style:font-pitch="variable" fo:font-size="100%"/>
      </text:list-level-style-bullet>
      <text:list-level-style-bullet text:level="5" text:bullet-char="•">
        <style:list-level-properties text:space-before="1.37487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24996in" text:min-label-width="0.3125in"/>
        <style:text-properties fo:font-family="Arial" style:font-family-generic="swiss" style:font-pitch="variable" fo:font-size="100%"/>
      </text:list-level-style-bullet>
      <text:list-level-style-bullet text:level="3" text:bullet-char="•">
        <style:list-level-properties text:space-before="0.62493in" text:min-label-width="0.3125in"/>
        <style:text-properties fo:font-family="Arial" style:font-family-generic="swiss" style:font-pitch="variable" fo:font-size="100%"/>
      </text:list-level-style-bullet>
      <text:list-level-style-bullet text:level="4" text:bullet-char="•">
        <style:list-level-properties text:space-before="0.9999in" text:min-label-width="0.3125in"/>
        <style:text-properties fo:font-family="Arial" style:font-family-generic="swiss" style:font-pitch="variable" fo:font-size="100%"/>
      </text:list-level-style-bullet>
      <text:list-level-style-bullet text:level="5" text:bullet-char="•">
        <style:list-level-properties text:space-before="1.37487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0">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3">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82">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93">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89">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0">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2">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4">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9">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9">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9">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6">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148">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8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1">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3">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2">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3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2">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7">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24996in" text:min-label-width="0.3125in"/>
        <style:text-properties fo:font-family="Arial" style:font-family-generic="swiss" style:font-pitch="variable" fo:font-size="100%"/>
      </text:list-level-style-bullet>
      <text:list-level-style-bullet text:level="3" text:bullet-char="•">
        <style:list-level-properties text:space-before="0.62493in" text:min-label-width="0.3125in"/>
        <style:text-properties fo:font-family="Arial" style:font-family-generic="swiss" style:font-pitch="variable" fo:font-size="100%"/>
      </text:list-level-style-bullet>
      <text:list-level-style-bullet text:level="4" text:bullet-char="•">
        <style:list-level-properties text:space-before="0.9999in" text:min-label-width="0.3125in"/>
        <style:text-properties fo:font-family="Arial" style:font-family-generic="swiss" style:font-pitch="variable" fo:font-size="100%"/>
      </text:list-level-style-bullet>
      <text:list-level-style-bullet text:level="5" text:bullet-char="•">
        <style:list-level-properties text:space-before="1.37487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59">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0">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bullet text:level="1" text:bullet-char="•">
        <style:list-level-properties text:space-before="0in" text:min-label-width="0.18749in"/>
        <style:text-properties fo:font-family="Arial" fo:font-size="100%"/>
      </text:list-level-style-bullet>
      <text:list-level-style-bullet text:level="2" text:bullet-char="•">
        <style:list-level-properties text:space-before="0.37497in" text:min-label-width="0.18749in"/>
        <style:text-properties fo:font-family="Arial" fo:font-size="100%"/>
      </text:list-level-style-bullet>
      <text:list-level-style-bullet text:level="3" text:bullet-char="•">
        <style:list-level-properties text:space-before="0.74994in" text:min-label-width="0.18749in"/>
        <style:text-properties fo:font-family="Arial" fo:font-size="100%"/>
      </text:list-level-style-bullet>
      <text:list-level-style-bullet text:level="4" text:bullet-char="•">
        <style:list-level-properties text:space-before="1.12491in" text:min-label-width="0.18749in"/>
        <style:text-properties fo:font-family="Arial" fo:font-size="100%"/>
      </text:list-level-style-bullet>
      <text:list-level-style-bullet text:level="5" text:bullet-char="•">
        <style:list-level-properties text:space-before="1.49988in" text:min-label-width="0.18749in"/>
        <style:text-properties fo:font-family="Arial" fo:font-size="100%"/>
      </text:list-level-style-bullet>
      <text:list-level-style-bullet text:level="6" text:bullet-char="•">
        <style:list-level-properties text:space-before="2.56251in" text:min-label-width="0.18749in"/>
        <style:text-properties fo:font-family="Arial" fo:font-size="100%"/>
      </text:list-level-style-bullet>
      <text:list-level-style-bullet text:level="7" text:bullet-char="•">
        <style:list-level-properties text:space-before="3.06251in" text:min-label-width="0.18749in"/>
        <style:text-properties fo:font-family="Arial" fo:font-size="100%"/>
      </text:list-level-style-bullet>
      <text:list-level-style-bullet text:level="8" text:bullet-char="•">
        <style:list-level-properties text:space-before="3.56251in" text:min-label-width="0.18749in"/>
        <style:text-properties fo:font-family="Arial" fo:font-size="100%"/>
      </text:list-level-style-bullet>
      <text:list-level-style-bullet text:level="9" text:bullet-char="•">
        <style:list-level-properties text:space-before="4.06251in" text:min-label-width="0.18749in"/>
        <style:text-properties fo:font-family="Arial" fo:font-size="100%"/>
      </text:list-level-style-bullet>
    </text:list-style>
    <text:list-style style:name="a11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1">
      <text:list-level-style-number text:level="1" style:num-format="" style:num-list-format-name="">
        <style:list-level-properties text:space-before="0in"/>
      </text:list-level-style-number>
      <text:list-level-style-number text:level="2" style:num-format="" style:num-list-format-name="">
        <style:list-level-properties text:space-before="0.56246in"/>
      </text:list-level-style-number>
      <text:list-level-style-number text:level="3" style:num-format="" style:num-list-format-name="">
        <style:list-level-properties text:space-before="0.93743in"/>
      </text:list-level-style-number>
      <text:list-level-style-number text:level="4" style:num-format="" style:num-list-format-name="">
        <style:list-level-properties text:space-before="1.3124in"/>
      </text:list-level-style-number>
      <text:list-level-style-number text:level="5" style:num-format="" style:num-list-format-name="">
        <style:list-level-properties text:space-before="1.6873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7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16" draw:name="Text Placeholder 2" svg:x="0.6875in" svg:y="1.7342in" svg:width="8.625in" svg:height="4.86276in" presentation:class="outline" presentation:placeholder="false">
        <draw:text-box>
          <text:list text:style-name="a3">
            <text:list-item>
              <text:p text:style-name="a2" text:class-names="" text:cond-style-name=""><text:span text:style-name="a1" text:class-names="">Edit text</text:span></text:p>
            </text:list-item>
          </text:list>
          <text:list text:style-name="a6">
            <text:list-item>
              <text:list text:style-name="a6">
                <text:list-item>
                  <text:p text:style-name="a5" text:class-names="" text:cond-style-name=""><text:span text:style-name="a4" text:class-names="">Second level</text:span></text:p>
                </text:list-item>
              </text:list>
            </text:list-item>
          </text:list>
          <text:list text:style-name="a9">
            <text:list-item>
              <text:list text:style-name="a9">
                <text:list-item>
                  <text:list text:style-name="a9">
                    <text:list-item>
                      <text:p text:style-name="a8" text:class-names="" text:cond-style-name=""><text:span text:style-name="a7" text:class-names="">Third level</text:span></text:p>
                    </text:list-item>
                  </text:list>
                </text:list-item>
              </text:list>
            </text:list-item>
          </text:list>
          <text:list text:style-name="a12">
            <text:list-item>
              <text:list text:style-name="a12">
                <text:list-item>
                  <text:list text:style-name="a12">
                    <text:list-item>
                      <text:list text:style-name="a12">
                        <text:list-item>
                          <text:p text:style-name="a11" text:class-names="" text:cond-style-name=""><text:span text:style-name="a10" text:class-names="">Fourth level</text:span></text:p>
                        </text:list-item>
                      </text:list>
                    </text:list-item>
                  </text:list>
                </text:list-item>
              </text:list>
            </text:list-item>
          </text:list>
          <text:list text:style-name="a15">
            <text:list-item>
              <text:list text:style-name="a15">
                <text:list-item>
                  <text:list text:style-name="a15">
                    <text:list-item>
                      <text:list text:style-name="a15">
                        <text:list-item>
                          <text:list text:style-name="a15">
                            <text:list-item>
                              <text:p text:style-name="a14" text:class-names="" text:cond-style-name=""><text:span text:style-name="a13" text:class-names="">Fifth level</text:span></text:p>
                            </text:list-item>
                          </text:list>
                        </text:list-item>
                      </text:list>
                    </text:list-item>
                  </text:list>
                </text:list-item>
              </text:list>
            </text:list-item>
          </text:list>
        </draw:text-box>
        <svg:title/>
        <svg:desc/>
      </draw:frame>
      <draw:frame draw:id="id1" presentation:style-name="a19" draw:name="Date Placeholder 3" svg:x="0.45833in" svg:y="6.77418in" svg:width="1.93311in" svg:height="0.39931in" presentation:class="date-time" presentation:placeholder="false">
        <draw:text-box>
          <text:p text:style-name="a18" text:class-names="" text:cond-style-name=""><text:span text:style-name="a17" text:class-names=""/></text:p>
        </draw:text-box>
        <svg:title/>
        <svg:desc/>
      </draw:frame>
      <draw:frame draw:id="id2" draw:style-name="a20" draw:name="Picture 31" svg:x="0.12029in" svg:y="7.12207in" svg:width="0.36324in" svg:height="0.27765in" style:rel-width="scale" style:rel-height="scale">
        <draw:image xlink:href="media/image19.png" xlink:type="simple" xlink:show="embed" xlink:actuate="onLoad"/>
        <svg:title/>
        <svg:desc/>
      </draw:frame>
      <draw:g draw:name="Group 13" draw:id="id3">
        <svg:title/>
        <svg:desc/>
        <draw:custom-shape svg:width="0.13823in" svg:height="9.65059in" draw:id="id10" draw:style-name="a37" draw:transform="translate(-0.06911in -4.82529in) rotate(-1.5708) translate(4.93089in 0.16101in)" draw:name="Rectangle 14">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11" draw:style-name="a40" draw:name="Rectangle 15">
          <svg:title/>
          <svg:desc/>
          <text:p text:style-name="a39" text:class-names="" text:cond-style-name=""><text:span text:style-name="a38"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12" draw:style-name="a43" draw:name="Rectangle 17">
          <svg:title/>
          <svg:desc/>
          <text:p text:style-name="a42" text:class-names="" text:cond-style-name=""><text:span text:style-name="a41" text:class-names=""/></text:p>
          <draw:enhanced-geometry xmlns:dr3d="urn:oasis:names:tc:opendocument:xmlns:dr3d:1.0" draw:type="non-primitive" svg:viewBox="0 0 21600 21600" draw:enhanced-path="M 0 0 L 21600 0 21600 21600 0 21600 Z N"/>
        </draw:custom-shape>
      </draw:g>
      <draw:custom-shape svg:width="0.13823in" svg:height="9.20063in" draw:id="id4" draw:style-name="a23" draw:transform="translate(-0.06911in -4.60031in) rotate(-1.5708) translate(5.15586in 7.33714in)" draw:name="Rectangle 6">
        <svg:title/>
        <svg:desc/>
        <text:p text:style-name="a22" text:class-names="" text:cond-style-name=""><text:span text:style-name="a21"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5" draw:style-name="a26" draw:name="Rectangle 30">
        <svg:title/>
        <svg:desc/>
        <text:p text:style-name="a25" text:class-names="" text:cond-style-name=""><text:span text:style-name="a24"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6" draw:style-name="a27"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7" draw:style-name="a28" draw:name="Picture 12" svg:x="8.42949in" svg:y="0.16453in" svg:width="1.38651in" svg:height="0.67125in" style:rel-width="scale" style:rel-height="scale">
        <draw:image xlink:href="media/image21.png" xlink:type="simple" xlink:show="embed" xlink:actuate="onLoad"/>
        <svg:title/>
        <svg:desc/>
      </draw:frame>
      <draw:frame draw:id="id8" presentation:style-name="a31" draw:name="Slide Number Placeholder 5" svg:x="4.89868in" svg:y="6.77418in" svg:width="0.51437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draw:frame draw:id="id9" presentation:style-name="a34" draw:name="Title Placeholder 1" svg:x="1.30303in" svg:y="0.40138in" svg:width="7.2018in" svg:height="0.79856in" presentation:class="title" presentation:placeholder="false">
        <draw:text-box>
          <text:p text:style-name="a33" text:class-names="" text:cond-style-name=""><text:span text:style-name="a32" text:class-names="">Click to edit title</text:span></text:p>
        </draw:text-box>
        <svg:title/>
        <svg:desc/>
      </draw:frame>
      <presentation:notes style:page-layout-name="pageLayout2" draw:style-name="a73">
        <draw:frame draw:id="id13" presentation:style-name="a46" draw:name="Header Placeholder 1" svg:x="0in" svg:y="0in" svg:width="3.32222in" svg:height="0.5101in" presentation:class="header" presentation:placeholder="false">
          <draw:text-box>
            <text:p text:style-name="a45" text:class-names="" text:cond-style-name=""><text:span text:style-name="a44" text:class-names=""/></text:p>
          </draw:text-box>
          <svg:title/>
          <svg:desc/>
        </draw:frame>
        <draw:frame draw:id="id14" presentation:style-name="a50" draw:name="Date Placeholder 2" svg:x="4.34267in" svg:y="0in" svg:width="3.32222in" svg:height="0.5101in" presentation:class="date-time" presentation:placeholder="false">
          <draw:text-box>
            <text:p text:style-name="a49" text:class-names="" text:cond-style-name=""><text:span text:style-name="a47" text:class-names=""><text:date text:fixed="false" style:data-style-name="a48">2/15/2026</text:date></text:span></text:p>
          </draw:text-box>
          <svg:title/>
          <svg:desc/>
        </draw:frame>
        <draw:page-thumbnail svg:x="1.54688in" svg:y="1.27083in" svg:width="4.57292in" svg:height="3.43056in" presentation:class="page" draw:id="id15" presentation:style-name="a51" draw:name="Slide Image Placeholder 3">
          <svg:title/>
          <svg:desc/>
        </draw:page-thumbnail>
        <draw:frame draw:id="id16" presentation:style-name="a66" draw:name="Notes Placeholder 4" svg:x="0.76667in" svg:y="4.89271in" svg:width="6.13333in" svg:height="4.00313in" presentation:class="notes" presentation:placeholder="false">
          <draw:text-box>
            <text:p text:style-name="a53" text:class-names="" text:cond-style-name=""><text:span text:style-name="a52" text:class-names="">Click to edit Master text styles</text:span></text:p>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7" presentation:style-name="a69" draw:name="Footer Placeholder 5" svg:x="0in" svg:y="9.65657in" svg:width="3.32222in" svg:height="0.5101in" presentation:class="footer" presentation:placeholder="false">
          <draw:text-box>
            <text:p text:style-name="a68" text:class-names="" text:cond-style-name=""><text:span text:style-name="a67" text:class-names=""/></text:p>
          </draw:text-box>
          <svg:title/>
          <svg:desc/>
        </draw:frame>
        <draw:frame draw:id="id18" presentation:style-name="a72" draw:name="Slide Number Placeholder 6" svg:x="4.34267in" svg:y="9.65657in" svg:width="3.32222in" svg:height="0.5101in" presentation:class="page-number" presentation:placeholder="false">
          <draw:text-box>
            <text:p text:style-name="a71" text:class-names="" text:cond-style-name=""><text:span text:style-name="a70" text:class-names=""><text:page-number style:num-format="1" text:fixed="false"/></text:span></text:p>
          </draw:text-box>
          <svg:title/>
          <svg:desc/>
        </draw:frame>
      </presentation:notes>
    </style:master-page>
    <style:master-page style:name="Master1-Layout1-cust-SBA-Logo-Slide" style:page-layout-name="pageLayout1" draw:style-name="a74">
      <draw:custom-shape svg:x="0in" svg:y="-0.00863in" svg:width="10in" svg:height="7.51357in" draw:id="id19" draw:style-name="a77" draw:name="Rectangle 9">
        <svg:title/>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draw:frame draw:id="id20" draw:style-name="a78" draw:name="Picture 1" svg:x="3.16635in" svg:y="1.7569in" svg:width="3.6673in" svg:height="3.98619in" style:rel-width="scale" style:rel-height="scale">
        <draw:image xlink:href="media/image22.png" xlink:type="simple" xlink:show="embed" xlink:actuate="onLoad"/>
        <svg:title/>
        <svg:desc/>
      </draw:frame>
      <draw:g draw:name="Group 5" draw:id="id21">
        <svg:title/>
        <svg:desc/>
        <draw:custom-shape svg:x="0.1408in" svg:y="-0.00431in" svg:width="2.10345in" svg:height="7.50862in" draw:id="id25" draw:style-name="a87" draw:name="Rectangle 2">
          <svg:title/>
          <svg:desc/>
          <text:p text:style-name="a86" text:class-names="" text:cond-style-name=""><text:span text:style-name="a85" text:class-names=""/></text:p>
          <draw:enhanced-geometry xmlns:dr3d="urn:oasis:names:tc:opendocument:xmlns:dr3d:1.0" draw:type="non-primitive" svg:viewBox="0 0 1923393 6865884" draw:enhanced-path="M ?f0 ?f0 L ?f1 ?f0 ?f3 ?f2 ?f0 ?f4 ?f0 ?f0 Z N" draw:text-areas="?f21 ?f23 ?f22 ?f24" draw:glue-points="?f25 ?f26 ?f27 ?f26 ?f28 ?f29 ?f25 ?f30 ?f25 ?f26" draw:glue-point-leaving-directions="-90, -90, -90, -90, -90">
            <draw:equation draw:name="f0" draw:formula="0"/>
            <draw:equation draw:name="f1" draw:formula="1923393"/>
            <draw:equation draw:name="f2" draw:formula="6865884"/>
            <draw:equation draw:name="f3" draw:formula="299545"/>
            <draw:equation draw:name="f4" draw:formula="6858000"/>
            <draw:equation draw:name="f5" draw:formula="?f2 - ?f0"/>
            <draw:equation draw:name="f6" draw:formula="?f1 - ?f0"/>
            <draw:equation draw:name="f7" draw:formula="?f6 / 1923393"/>
            <draw:equation draw:name="f8" draw:formula="?f5 / 6865884"/>
            <draw:equation draw:name="f9" draw:formula="0 * ?f6"/>
            <draw:equation draw:name="f10" draw:formula="1923393 * ?f6"/>
            <draw:equation draw:name="f11" draw:formula="0 * ?f5"/>
            <draw:equation draw:name="f12" draw:formula="299545 * ?f6"/>
            <draw:equation draw:name="f13" draw:formula="6865884 * ?f5"/>
            <draw:equation draw:name="f14" draw:formula="6858000 * ?f5"/>
            <draw:equation draw:name="f15" draw:formula="?f9 / 1923393"/>
            <draw:equation draw:name="f16" draw:formula="?f10 / 1923393"/>
            <draw:equation draw:name="f17" draw:formula="?f11 / 6865884"/>
            <draw:equation draw:name="f18" draw:formula="?f12 / 1923393"/>
            <draw:equation draw:name="f19" draw:formula="?f13 / 6865884"/>
            <draw:equation draw:name="f20" draw:formula="?f14 / 6865884"/>
            <draw:equation draw:name="f21" draw:formula="?f0 / ?f7"/>
            <draw:equation draw:name="f22" draw:formula="?f1 / ?f7"/>
            <draw:equation draw:name="f23" draw:formula="?f0 / ?f8"/>
            <draw:equation draw:name="f24" draw:formula="?f2 / ?f8"/>
            <draw:equation draw:name="f25" draw:formula="?f15 / ?f7"/>
            <draw:equation draw:name="f26" draw:formula="?f17 / ?f8"/>
            <draw:equation draw:name="f27" draw:formula="?f16 / ?f7"/>
            <draw:equation draw:name="f28" draw:formula="?f18 / ?f7"/>
            <draw:equation draw:name="f29" draw:formula="?f19 / ?f8"/>
            <draw:equation draw:name="f30" draw:formula="?f20 / ?f8"/>
          </draw:enhanced-geometry>
        </draw:custom-shape>
        <draw:custom-shape svg:x="-0.00453in" svg:y="0in" svg:width="2.10797in" svg:height="7.51357in" draw:id="id26" draw:style-name="a90" draw:name="Rectangle 2">
          <svg:title/>
          <svg:desc/>
          <text:p text:style-name="a89" text:class-names="" text:cond-style-name=""><text:span text:style-name="a88" text:class-names=""/></text:p>
          <draw:enhanced-geometry xmlns:dr3d="urn:oasis:names:tc:opendocument:xmlns:dr3d:1.0" draw:type="non-primitive" svg:viewBox="0 0 1927531 6870412" draw:enhanced-path="M ?f3 ?f0 L ?f1 ?f0 ?f4 ?f5 ?f0 ?f2 C ?f6 ?f7 ?f8 ?f9 ?f3 ?f0 Z N" draw:text-areas="?f28 ?f30 ?f29 ?f31" draw:glue-points="?f32 ?f33 ?f34 ?f33 ?f35 ?f36 ?f37 ?f38 ?f32 ?f33" draw:glue-point-leaving-directions="-90, -90, -90, -90, -90">
            <draw:equation draw:name="f0" draw:formula="0"/>
            <draw:equation draw:name="f1" draw:formula="1927531"/>
            <draw:equation draw:name="f2" draw:formula="6870412"/>
            <draw:equation draw:name="f3" draw:formula="4138"/>
            <draw:equation draw:name="f4" draw:formula="303683"/>
            <draw:equation draw:name="f5" draw:formula="6865884"/>
            <draw:equation draw:name="f6" draw:formula="1379"/>
            <draw:equation draw:name="f7" draw:formula="4583033"/>
            <draw:equation draw:name="f8" draw:formula="2759"/>
            <draw:equation draw:name="f9" draw:formula="2287379"/>
            <draw:equation draw:name="f10" draw:formula="?f2 - ?f0"/>
            <draw:equation draw:name="f11" draw:formula="?f1 - ?f0"/>
            <draw:equation draw:name="f12" draw:formula="?f11 / 1927531"/>
            <draw:equation draw:name="f13" draw:formula="?f10 / 6870412"/>
            <draw:equation draw:name="f14" draw:formula="4138 * ?f11"/>
            <draw:equation draw:name="f15" draw:formula="1927531 * ?f11"/>
            <draw:equation draw:name="f16" draw:formula="303683 * ?f11"/>
            <draw:equation draw:name="f17" draw:formula="0 * ?f11"/>
            <draw:equation draw:name="f18" draw:formula="0 * ?f10"/>
            <draw:equation draw:name="f19" draw:formula="6865884 * ?f10"/>
            <draw:equation draw:name="f20" draw:formula="6870412 * ?f10"/>
            <draw:equation draw:name="f21" draw:formula="?f14 / 1927531"/>
            <draw:equation draw:name="f22" draw:formula="?f15 / 1927531"/>
            <draw:equation draw:name="f23" draw:formula="?f16 / 1927531"/>
            <draw:equation draw:name="f24" draw:formula="?f17 / 1927531"/>
            <draw:equation draw:name="f25" draw:formula="?f18 / 6870412"/>
            <draw:equation draw:name="f26" draw:formula="?f19 / 6870412"/>
            <draw:equation draw:name="f27" draw:formula="?f20 / 6870412"/>
            <draw:equation draw:name="f28" draw:formula="?f0 / ?f12"/>
            <draw:equation draw:name="f29" draw:formula="?f1 / ?f12"/>
            <draw:equation draw:name="f30" draw:formula="?f0 / ?f13"/>
            <draw:equation draw:name="f31" draw:formula="?f2 / ?f13"/>
            <draw:equation draw:name="f32" draw:formula="?f21 / ?f12"/>
            <draw:equation draw:name="f33" draw:formula="?f25 / ?f13"/>
            <draw:equation draw:name="f34" draw:formula="?f22 / ?f12"/>
            <draw:equation draw:name="f35" draw:formula="?f23 / ?f12"/>
            <draw:equation draw:name="f36" draw:formula="?f26 / ?f13"/>
            <draw:equation draw:name="f37" draw:formula="?f24 / ?f12"/>
            <draw:equation draw:name="f38" draw:formula="?f27 / ?f13"/>
          </draw:enhanced-geometry>
        </draw:custom-shape>
      </draw:g>
      <draw:g draw:name="Group 6" draw:id="id22">
        <svg:title/>
        <svg:desc/>
        <draw:custom-shape svg:width="2.10345in" svg:height="7.50862in" draw:id="id23" draw:style-name="a81" draw:transform="translate(-1.05172in -3.75431in) rotate(-3.14159) translate(8.81219in 3.75495in)" draw:name="Rectangle 2">
          <svg:title/>
          <svg:desc/>
          <text:p text:style-name="a80" text:class-names="" text:cond-style-name=""><text:span text:style-name="a79" text:class-names=""/></text:p>
          <draw:enhanced-geometry xmlns:dr3d="urn:oasis:names:tc:opendocument:xmlns:dr3d:1.0" draw:type="non-primitive" svg:viewBox="0 0 1923393 6865884" draw:enhanced-path="M ?f0 ?f0 L ?f1 ?f0 ?f3 ?f2 ?f0 ?f4 ?f0 ?f0 Z N" draw:text-areas="?f21 ?f23 ?f22 ?f24" draw:glue-points="?f25 ?f26 ?f27 ?f26 ?f28 ?f29 ?f25 ?f30 ?f25 ?f26" draw:glue-point-leaving-directions="-90, -90, -90, -90, -90">
            <draw:equation draw:name="f0" draw:formula="0"/>
            <draw:equation draw:name="f1" draw:formula="1923393"/>
            <draw:equation draw:name="f2" draw:formula="6865884"/>
            <draw:equation draw:name="f3" draw:formula="299545"/>
            <draw:equation draw:name="f4" draw:formula="6858000"/>
            <draw:equation draw:name="f5" draw:formula="?f2 - ?f0"/>
            <draw:equation draw:name="f6" draw:formula="?f1 - ?f0"/>
            <draw:equation draw:name="f7" draw:formula="?f6 / 1923393"/>
            <draw:equation draw:name="f8" draw:formula="?f5 / 6865884"/>
            <draw:equation draw:name="f9" draw:formula="0 * ?f6"/>
            <draw:equation draw:name="f10" draw:formula="1923393 * ?f6"/>
            <draw:equation draw:name="f11" draw:formula="0 * ?f5"/>
            <draw:equation draw:name="f12" draw:formula="299545 * ?f6"/>
            <draw:equation draw:name="f13" draw:formula="6865884 * ?f5"/>
            <draw:equation draw:name="f14" draw:formula="6858000 * ?f5"/>
            <draw:equation draw:name="f15" draw:formula="?f9 / 1923393"/>
            <draw:equation draw:name="f16" draw:formula="?f10 / 1923393"/>
            <draw:equation draw:name="f17" draw:formula="?f11 / 6865884"/>
            <draw:equation draw:name="f18" draw:formula="?f12 / 1923393"/>
            <draw:equation draw:name="f19" draw:formula="?f13 / 6865884"/>
            <draw:equation draw:name="f20" draw:formula="?f14 / 6865884"/>
            <draw:equation draw:name="f21" draw:formula="?f0 / ?f7"/>
            <draw:equation draw:name="f22" draw:formula="?f1 / ?f7"/>
            <draw:equation draw:name="f23" draw:formula="?f0 / ?f8"/>
            <draw:equation draw:name="f24" draw:formula="?f2 / ?f8"/>
            <draw:equation draw:name="f25" draw:formula="?f15 / ?f7"/>
            <draw:equation draw:name="f26" draw:formula="?f17 / ?f8"/>
            <draw:equation draw:name="f27" draw:formula="?f16 / ?f7"/>
            <draw:equation draw:name="f28" draw:formula="?f18 / ?f7"/>
            <draw:equation draw:name="f29" draw:formula="?f19 / ?f8"/>
            <draw:equation draw:name="f30" draw:formula="?f20 / ?f8"/>
          </draw:enhanced-geometry>
        </draw:custom-shape>
        <draw:custom-shape svg:width="2.10797in" svg:height="7.51357in" draw:id="id24" draw:style-name="a84" draw:transform="translate(-1.05398in -3.75678in) rotate(-3.14159) translate(8.95527in 3.74816in)" draw:name="Rectangle 2">
          <svg:title/>
          <svg:desc/>
          <text:p text:style-name="a83" text:class-names="" text:cond-style-name=""><text:span text:style-name="a82" text:class-names=""/></text:p>
          <draw:enhanced-geometry xmlns:dr3d="urn:oasis:names:tc:opendocument:xmlns:dr3d:1.0" draw:type="non-primitive" svg:viewBox="0 0 1927531 6870412" draw:enhanced-path="M ?f3 ?f0 L ?f1 ?f0 ?f4 ?f5 ?f0 ?f2 C ?f6 ?f7 ?f8 ?f9 ?f3 ?f0 Z N" draw:text-areas="?f28 ?f30 ?f29 ?f31" draw:glue-points="?f32 ?f33 ?f34 ?f33 ?f35 ?f36 ?f37 ?f38 ?f32 ?f33" draw:glue-point-leaving-directions="-90, -90, -90, -90, -90">
            <draw:equation draw:name="f0" draw:formula="0"/>
            <draw:equation draw:name="f1" draw:formula="1927531"/>
            <draw:equation draw:name="f2" draw:formula="6870412"/>
            <draw:equation draw:name="f3" draw:formula="4138"/>
            <draw:equation draw:name="f4" draw:formula="303683"/>
            <draw:equation draw:name="f5" draw:formula="6865884"/>
            <draw:equation draw:name="f6" draw:formula="1379"/>
            <draw:equation draw:name="f7" draw:formula="4583033"/>
            <draw:equation draw:name="f8" draw:formula="2759"/>
            <draw:equation draw:name="f9" draw:formula="2287379"/>
            <draw:equation draw:name="f10" draw:formula="?f2 - ?f0"/>
            <draw:equation draw:name="f11" draw:formula="?f1 - ?f0"/>
            <draw:equation draw:name="f12" draw:formula="?f11 / 1927531"/>
            <draw:equation draw:name="f13" draw:formula="?f10 / 6870412"/>
            <draw:equation draw:name="f14" draw:formula="4138 * ?f11"/>
            <draw:equation draw:name="f15" draw:formula="1927531 * ?f11"/>
            <draw:equation draw:name="f16" draw:formula="303683 * ?f11"/>
            <draw:equation draw:name="f17" draw:formula="0 * ?f11"/>
            <draw:equation draw:name="f18" draw:formula="0 * ?f10"/>
            <draw:equation draw:name="f19" draw:formula="6865884 * ?f10"/>
            <draw:equation draw:name="f20" draw:formula="6870412 * ?f10"/>
            <draw:equation draw:name="f21" draw:formula="?f14 / 1927531"/>
            <draw:equation draw:name="f22" draw:formula="?f15 / 1927531"/>
            <draw:equation draw:name="f23" draw:formula="?f16 / 1927531"/>
            <draw:equation draw:name="f24" draw:formula="?f17 / 1927531"/>
            <draw:equation draw:name="f25" draw:formula="?f18 / 6870412"/>
            <draw:equation draw:name="f26" draw:formula="?f19 / 6870412"/>
            <draw:equation draw:name="f27" draw:formula="?f20 / 6870412"/>
            <draw:equation draw:name="f28" draw:formula="?f0 / ?f12"/>
            <draw:equation draw:name="f29" draw:formula="?f1 / ?f12"/>
            <draw:equation draw:name="f30" draw:formula="?f0 / ?f13"/>
            <draw:equation draw:name="f31" draw:formula="?f2 / ?f13"/>
            <draw:equation draw:name="f32" draw:formula="?f21 / ?f12"/>
            <draw:equation draw:name="f33" draw:formula="?f25 / ?f13"/>
            <draw:equation draw:name="f34" draw:formula="?f22 / ?f12"/>
            <draw:equation draw:name="f35" draw:formula="?f23 / ?f12"/>
            <draw:equation draw:name="f36" draw:formula="?f26 / ?f13"/>
            <draw:equation draw:name="f37" draw:formula="?f24 / ?f12"/>
            <draw:equation draw:name="f38" draw:formula="?f27 / ?f13"/>
          </draw:enhanced-geometry>
        </draw:custom-shape>
      </draw:g>
      <presentation:notes style:page-layout-name="pageLayout2" draw:style-name="a120">
        <draw:frame draw:id="id13" presentation:style-name="a93" draw:name="Header Placeholder 1" svg:x="0in" svg:y="0in" svg:width="3.32222in" svg:height="0.5101in" presentation:class="header" presentation:placeholder="false">
          <draw:text-box>
            <text:p text:style-name="a92" text:class-names="" text:cond-style-name=""><text:span text:style-name="a91" text:class-names=""/></text:p>
          </draw:text-box>
          <svg:title/>
          <svg:desc/>
        </draw:frame>
        <draw:frame draw:id="id14" presentation:style-name="a97" draw:name="Date Placeholder 2" svg:x="4.34267in" svg:y="0in" svg:width="3.32222in" svg:height="0.5101in" presentation:class="date-time" presentation:placeholder="false">
          <draw:text-box>
            <text:p text:style-name="a96" text:class-names="" text:cond-style-name=""><text:span text:style-name="a94" text:class-names=""><text:date text:fixed="false" style:data-style-name="a95">2/15/2026</text:date></text:span></text:p>
          </draw:text-box>
          <svg:title/>
          <svg:desc/>
        </draw:frame>
        <draw:page-thumbnail svg:x="1.54688in" svg:y="1.27083in" svg:width="4.57292in" svg:height="3.43056in" presentation:class="page" draw:id="id15" presentation:style-name="a98" draw:name="Slide Image Placeholder 3">
          <svg:title/>
          <svg:desc/>
        </draw:page-thumbnail>
        <draw:frame draw:id="id16" presentation:style-name="a113" draw:name="Notes Placeholder 4" svg:x="0.76667in" svg:y="4.89271in" svg:width="6.13333in" svg:height="4.00313in" presentation:class="notes" presentation:placeholder="false">
          <draw:text-box>
            <text:p text:style-name="a100" text:class-names="" text:cond-style-name=""><text:span text:style-name="a99" text:class-names="">Click to edit Master text styles</text:span></text:p>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17" presentation:style-name="a116" draw:name="Footer Placeholder 5" svg:x="0in" svg:y="9.65657in" svg:width="3.32222in" svg:height="0.5101in" presentation:class="footer" presentation:placeholder="false">
          <draw:text-box>
            <text:p text:style-name="a115" text:class-names="" text:cond-style-name=""><text:span text:style-name="a114" text:class-names=""/></text:p>
          </draw:text-box>
          <svg:title/>
          <svg:desc/>
        </draw:frame>
        <draw:frame draw:id="id18" presentation:style-name="a119" draw:name="Slide Number Placeholder 6" svg:x="4.34267in" svg:y="9.65657in" svg:width="3.32222in" svg:height="0.5101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master-page>
    <style:master-page style:name="Master1-Layout2-cust-4_Title-Slide-Texture,-SBA-Only" style:page-layout-name="pageLayout1" draw:style-name="a121">
      <draw:frame draw:id="id27" draw:style-name="a122" draw:name="Picture 3" svg:x="0.01035in" svg:y="0.05234in" svg:width="9.99638in" svg:height="7.5in" style:rel-width="scale" style:rel-height="scale">
        <draw:image xlink:href="media/image23.jpeg" xlink:type="simple" xlink:show="embed" xlink:actuate="onLoad"/>
        <svg:title/>
        <svg:desc/>
      </draw:frame>
      <draw:custom-shape svg:width="10.00984in" svg:height="1.59071in" draw:id="id28" draw:style-name="a125" draw:transform="translate(-5.00492in -0.79535in) rotate(-3.14159) translate(4.99507in 0.79492in)" draw:name="Rectangle 1">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g draw:name="Group 9" draw:id="id29">
        <svg:title/>
        <svg:desc/>
        <draw:custom-shape svg:width="10.00984in" svg:height="1.26201in" draw:id="id34" draw:style-name="a140" draw:transform="translate(-5.00492in -0.631in) rotate(-3.14159) translate(4.99508in 6.86898in)" draw:name="Rectangle 10">
          <svg:title/>
          <svg:desc/>
          <text:p text:style-name="a139" text:class-names="" text:cond-style-name=""><text:span text:style-name="a138" text:class-names="">v</text:span></text:p>
          <draw:enhanced-geometry xmlns:dr3d="urn:oasis:names:tc:opendocument:xmlns:dr3d:1.0" draw:type="non-primitive" svg:viewBox="0 0 21600 21600" draw:enhanced-path="M 0 0 L 21600 0 21600 21600 0 21600 Z N"/>
        </draw:custom-shape>
        <draw:custom-shape svg:width="10.00984in" svg:height="0.26724in" draw:id="id35" draw:style-name="a143" draw:transform="translate(-5.00492in -0.13362in) rotate(-3.14159) translate(4.99508in 6.19071in)" draw:name="Rectangle 11">
          <svg:title/>
          <svg:desc/>
          <text:p text:style-name="a142" text:class-names="" text:cond-style-name=""><text:span text:style-name="a141" text:class-names=""/></text:p>
          <draw:enhanced-geometry xmlns:dr3d="urn:oasis:names:tc:opendocument:xmlns:dr3d:1.0" draw:type="non-primitive" svg:viewBox="0 0 21600 21600" draw:enhanced-path="M 0 0 L 21600 0 21600 21600 0 21600 Z N"/>
        </draw:custom-shape>
      </draw:g>
      <draw:frame draw:id="id30" presentation:style-name="a128" draw:name="Title 1" svg:x="1.25in" svg:y="1.67069in" svg:width="7.5in" svg:height="2.336in" presentation:class="title" presentation:placeholder="false">
        <draw:text-box>
          <text:p text:style-name="a127" text:class-names="" text:cond-style-name=""><text:span text:style-name="a126" text:class-names="">Boots to Business Module 1</text:span></text:p>
        </draw:text-box>
        <svg:title/>
        <svg:desc/>
      </draw:frame>
      <draw:frame draw:id="id31" presentation:style-name="a135" draw:name="Text Placeholder 7" svg:x="1.25in" svg:y="4.15206in" svg:width="7.5in" svg:height="1.80035in" presentation:class="outline" presentation:placeholder="false">
        <draw:text-box>
          <text:list text:style-name="a131">
            <text:list-item>
              <text:p text:style-name="a130" text:class-names="" text:cond-style-name=""><text:span text:style-name="a129" text:class-names="">Introduction to Business<text:s text:c="1"/></text:span></text:p>
            </text:list-item>
          </text:list>
          <text:list text:style-name="a134">
            <text:list-item>
              <text:p text:style-name="a133" text:class-names="" text:cond-style-name=""><text:span text:style-name="a132" text:class-names="">Ownership</text:span></text:p>
            </text:list-item>
          </text:list>
        </draw:text-box>
        <svg:title/>
        <svg:desc/>
      </draw:frame>
      <draw:frame draw:id="id32" draw:style-name="a136" draw:name="Picture 2" svg:x="3.68257in" svg:y="0.54169in" svg:width="2.63487in" svg:height="0.72371in" style:rel-width="scale" style:rel-height="scale">
        <draw:image xlink:href="media/image24.png" xlink:type="simple" xlink:show="embed" xlink:actuate="onLoad"/>
        <svg:title/>
        <svg:desc/>
      </draw:frame>
      <draw:frame draw:id="id33" draw:style-name="a137" draw:name="Picture 5" svg:x="-0.01658in" svg:y="6.30862in" svg:width="10.00984in" svg:height="1.24372in" style:rel-width="scale" style:rel-height="scale">
        <draw:image xlink:href="media/image25.png" xlink:type="simple" xlink:show="embed" xlink:actuate="onLoad"/>
        <svg:title/>
        <svg:desc/>
      </draw:frame>
      <presentation:notes style:page-layout-name="pageLayout2" draw:style-name="a173">
        <draw:frame draw:id="id13" presentation:style-name="a146" draw:name="Header Placeholder 1" svg:x="0in" svg:y="0in" svg:width="3.32222in" svg:height="0.5101in" presentation:class="header" presentation:placeholder="false">
          <draw:text-box>
            <text:p text:style-name="a145" text:class-names="" text:cond-style-name=""><text:span text:style-name="a144" text:class-names=""/></text:p>
          </draw:text-box>
          <svg:title/>
          <svg:desc/>
        </draw:frame>
        <draw:frame draw:id="id14" presentation:style-name="a150" draw:name="Date Placeholder 2" svg:x="4.34267in" svg:y="0in" svg:width="3.32222in" svg:height="0.5101in" presentation:class="date-time" presentation:placeholder="false">
          <draw:text-box>
            <text:p text:style-name="a149" text:class-names="" text:cond-style-name=""><text:span text:style-name="a147" text:class-names=""><text:date text:fixed="false" style:data-style-name="a148">2/15/2026</text:date></text:span></text:p>
          </draw:text-box>
          <svg:title/>
          <svg:desc/>
        </draw:frame>
        <draw:page-thumbnail svg:x="1.54688in" svg:y="1.27083in" svg:width="4.57292in" svg:height="3.43056in" presentation:class="page" draw:id="id15" presentation:style-name="a151" draw:name="Slide Image Placeholder 3">
          <svg:title/>
          <svg:desc/>
        </draw:page-thumbnail>
        <draw:frame draw:id="id16" presentation:style-name="a166" draw:name="Notes Placeholder 4" svg:x="0.76667in" svg:y="4.89271in" svg:width="6.13333in" svg:height="4.00313in" presentation:class="notes" presentation:placeholder="false">
          <draw:text-box>
            <text:p text:style-name="a153" text:class-names="" text:cond-style-name=""><text:span text:style-name="a152" text:class-names="">Click to edit Master text styles</text:span></text:p>
            <text:list text:style-name="a156">
              <text:list-item>
                <text:list text:style-name="a156">
                  <text:list-item>
                    <text:p text:style-name="a155" text:class-names="" text:cond-style-name=""><text:span text:style-name="a154" text:class-names="">Second level</text:span></text:p>
                  </text:list-item>
                </text:list>
              </text:list-item>
            </text:list>
            <text:list text:style-name="a159">
              <text:list-item>
                <text:list text:style-name="a159">
                  <text:list-item>
                    <text:list text:style-name="a159">
                      <text:list-item>
                        <text:p text:style-name="a158" text:class-names="" text:cond-style-name=""><text:span text:style-name="a157" text:class-names="">Third level</text:span></text:p>
                      </text:list-item>
                    </text:list>
                  </text:list-item>
                </text:list>
              </text:list-item>
            </text:list>
            <text:list text:style-name="a162">
              <text:list-item>
                <text:list text:style-name="a162">
                  <text:list-item>
                    <text:list text:style-name="a162">
                      <text:list-item>
                        <text:list text:style-name="a162">
                          <text:list-item>
                            <text:p text:style-name="a161" text:class-names="" text:cond-style-name=""><text:span text:style-name="a160" text:class-names="">Fourth level</text:span></text:p>
                          </text:list-item>
                        </text:list>
                      </text:list-item>
                    </text:list>
                  </text:list-item>
                </text:list>
              </text:list-item>
            </text:list>
            <text:list text:style-name="a165">
              <text:list-item>
                <text:list text:style-name="a165">
                  <text:list-item>
                    <text:list text:style-name="a165">
                      <text:list-item>
                        <text:list text:style-name="a165">
                          <text:list-item>
                            <text:list text:style-name="a165">
                              <text:list-item>
                                <text:p text:style-name="a164" text:class-names="" text:cond-style-name=""><text:span text:style-name="a163" text:class-names="">Fifth level</text:span></text:p>
                              </text:list-item>
                            </text:list>
                          </text:list-item>
                        </text:list>
                      </text:list-item>
                    </text:list>
                  </text:list-item>
                </text:list>
              </text:list-item>
            </text:list>
          </draw:text-box>
          <svg:title/>
          <svg:desc/>
        </draw:frame>
        <draw:frame draw:id="id17" presentation:style-name="a169" draw:name="Footer Placeholder 5" svg:x="0in" svg:y="9.65657in" svg:width="3.32222in" svg:height="0.5101in" presentation:class="footer" presentation:placeholder="false">
          <draw:text-box>
            <text:p text:style-name="a168" text:class-names="" text:cond-style-name=""><text:span text:style-name="a167" text:class-names=""/></text:p>
          </draw:text-box>
          <svg:title/>
          <svg:desc/>
        </draw:frame>
        <draw:frame draw:id="id18" presentation:style-name="a172" draw:name="Slide Number Placeholder 6" svg:x="4.34267in" svg:y="9.65657in" svg:width="3.32222in" svg:height="0.5101in" presentation:class="page-number" presentation:placeholder="false">
          <draw:text-box>
            <text:p text:style-name="a171" text:class-names="" text:cond-style-name=""><text:span text:style-name="a170" text:class-names=""><text:page-number style:num-format="1" text:fixed="false"/></text:span></text:p>
          </draw:text-box>
          <svg:title/>
          <svg:desc/>
        </draw:frame>
      </presentation:notes>
    </style:master-page>
    <style:master-page style:name="Master1-Layout3-cust-2_Title-Slide-Texture,-SBA-Boots" style:page-layout-name="pageLayout1" draw:style-name="a174">
      <draw:frame draw:id="id36" draw:style-name="a175" draw:name="Picture 21" svg:x="0.00181in" svg:y="0in" svg:width="9.99716in" svg:height="7.50059in" style:rel-width="scale" style:rel-height="scale">
        <draw:image xlink:href="media/image23.jpeg" xlink:type="simple" xlink:show="embed" xlink:actuate="onLoad"/>
        <svg:title/>
        <svg:desc/>
      </draw:frame>
      <draw:frame draw:id="id37" presentation:style-name="a178" draw:name="Title 1" svg:x="1.25in" svg:y="1.67069in" svg:width="7.5in" svg:height="2.336in" presentation:class="title" presentation:placeholder="false">
        <draw:text-box>
          <text:p text:style-name="a177" text:class-names="" text:cond-style-name=""><text:span text:style-name="a176" text:class-names="">Click to edit master title</text:span></text:p>
        </draw:text-box>
        <svg:title/>
        <svg:desc/>
      </draw:frame>
      <draw:frame draw:id="id38" draw:style-name="a179" draw:name="Picture 3" svg:x="0.50149in" svg:y="0.72673in" svg:width="2.63331in" svg:height="0.72328in" style:rel-width="scale" style:rel-height="scale">
        <draw:image xlink:href="media/image26.png" xlink:type="simple" xlink:show="embed" xlink:actuate="onLoad"/>
        <svg:title/>
        <svg:desc/>
      </draw:frame>
      <draw:frame draw:id="id39" draw:style-name="a180" draw:name="Picture 13" svg:x="7.70886in" svg:y="0.72726in" svg:width="1.72635in" svg:height="0.69331in" style:rel-width="scale" style:rel-height="scale">
        <draw:image xlink:href="media/image27.png" xlink:type="simple" xlink:show="embed" xlink:actuate="onLoad"/>
        <svg:title/>
        <svg:desc>A picture containing text, font, graphics, graphic design

Description automatically generated</svg:desc>
      </draw:frame>
      <draw:frame draw:id="id40" presentation:style-name="a184" draw:name="Text Placeholder 7" svg:x="1.25in" svg:y="4.15206in" svg:width="7.5in" svg:height="1.80035in" presentation:class="outline" presentation:placeholder="false">
        <draw:text-box>
          <text:list text:style-name="a183">
            <text:list-item>
              <text:p text:style-name="a182" text:class-names="" text:cond-style-name=""><text:span text:style-name="a181" text:class-names="">Click to edit subtitle</text:span></text:p>
            </text:list-item>
          </text:list>
        </draw:text-box>
        <svg:title/>
        <svg:desc/>
      </draw:frame>
      <presentation:notes style:page-layout-name="pageLayout2" draw:style-name="a214">
        <draw:frame draw:id="id13" presentation:style-name="a187" draw:name="Header Placeholder 1" svg:x="0in" svg:y="0in" svg:width="3.32222in" svg:height="0.5101in" presentation:class="header" presentation:placeholder="false">
          <draw:text-box>
            <text:p text:style-name="a186" text:class-names="" text:cond-style-name=""><text:span text:style-name="a185" text:class-names=""/></text:p>
          </draw:text-box>
          <svg:title/>
          <svg:desc/>
        </draw:frame>
        <draw:frame draw:id="id14" presentation:style-name="a191" draw:name="Date Placeholder 2" svg:x="4.34267in" svg:y="0in" svg:width="3.32222in" svg:height="0.5101in" presentation:class="date-time" presentation:placeholder="false">
          <draw:text-box>
            <text:p text:style-name="a190" text:class-names="" text:cond-style-name=""><text:span text:style-name="a188" text:class-names=""><text:date text:fixed="false" style:data-style-name="a189">2/15/2026</text:date></text:span></text:p>
          </draw:text-box>
          <svg:title/>
          <svg:desc/>
        </draw:frame>
        <draw:page-thumbnail svg:x="1.54688in" svg:y="1.27083in" svg:width="4.57292in" svg:height="3.43056in" presentation:class="page" draw:id="id15" presentation:style-name="a192" draw:name="Slide Image Placeholder 3">
          <svg:title/>
          <svg:desc/>
        </draw:page-thumbnail>
        <draw:frame draw:id="id16" presentation:style-name="a207" draw:name="Notes Placeholder 4" svg:x="0.76667in" svg:y="4.89271in" svg:width="6.13333in" svg:height="4.00313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17" presentation:style-name="a210" draw:name="Footer Placeholder 5" svg:x="0in" svg:y="9.65657in" svg:width="3.32222in" svg:height="0.5101in" presentation:class="footer" presentation:placeholder="false">
          <draw:text-box>
            <text:p text:style-name="a209" text:class-names="" text:cond-style-name=""><text:span text:style-name="a208" text:class-names=""/></text:p>
          </draw:text-box>
          <svg:title/>
          <svg:desc/>
        </draw:frame>
        <draw:frame draw:id="id18" presentation:style-name="a213" draw:name="Slide Number Placeholder 6" svg:x="4.34267in" svg:y="9.65657in" svg:width="3.32222in" svg:height="0.5101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cust-3_Title-Slide-Texture,-SBA-Only" style:page-layout-name="pageLayout1" draw:style-name="a215">
      <draw:frame draw:id="id41" draw:style-name="a216" draw:name="Picture 11" svg:x="0.00181in" svg:y="0in" svg:width="9.99716in" svg:height="7.50059in" style:rel-width="scale" style:rel-height="scale">
        <draw:image xlink:href="media/image23.jpeg" xlink:type="simple" xlink:show="embed" xlink:actuate="onLoad"/>
        <svg:title/>
        <svg:desc/>
      </draw:frame>
      <draw:frame draw:id="id42" draw:style-name="a217" draw:name="Picture 9" svg:x="3.68334in" svg:y="0.7647in" svg:width="2.63331in" svg:height="0.72328in" style:rel-width="scale" style:rel-height="scale">
        <draw:image xlink:href="media/image26.png" xlink:type="simple" xlink:show="embed" xlink:actuate="onLoad"/>
        <svg:title/>
        <svg:desc/>
      </draw:frame>
      <draw:frame draw:id="id43" presentation:style-name="a220" draw:name="Title 1" svg:x="1.25in" svg:y="1.67069in" svg:width="7.5in" svg:height="2.336in" presentation:class="title" presentation:placeholder="false">
        <draw:text-box>
          <text:p text:style-name="a219" text:class-names="" text:cond-style-name=""><text:span text:style-name="a218" text:class-names="">Click to edit master title</text:span></text:p>
        </draw:text-box>
        <svg:title/>
        <svg:desc/>
      </draw:frame>
      <draw:frame draw:id="id44" presentation:style-name="a224" draw:name="Text Placeholder 7" svg:x="1.25in" svg:y="4.15206in" svg:width="7.5in" svg:height="1.80035in" presentation:class="outline" presentation:placeholder="false">
        <draw:text-box>
          <text:list text:style-name="a223">
            <text:list-item>
              <text:p text:style-name="a222" text:class-names="" text:cond-style-name=""><text:span text:style-name="a221" text:class-names="">Click to edit subtitle</text:span></text:p>
            </text:list-item>
          </text:list>
        </draw:text-box>
        <svg:title/>
        <svg:desc/>
      </draw:frame>
      <presentation:notes style:page-layout-name="pageLayout2" draw:style-name="a254">
        <draw:frame draw:id="id13" presentation:style-name="a227" draw:name="Header Placeholder 1" svg:x="0in" svg:y="0in" svg:width="3.32222in" svg:height="0.5101in" presentation:class="header" presentation:placeholder="false">
          <draw:text-box>
            <text:p text:style-name="a226" text:class-names="" text:cond-style-name=""><text:span text:style-name="a225" text:class-names=""/></text:p>
          </draw:text-box>
          <svg:title/>
          <svg:desc/>
        </draw:frame>
        <draw:frame draw:id="id14" presentation:style-name="a231" draw:name="Date Placeholder 2" svg:x="4.34267in" svg:y="0in" svg:width="3.32222in" svg:height="0.5101in" presentation:class="date-time" presentation:placeholder="false">
          <draw:text-box>
            <text:p text:style-name="a230" text:class-names="" text:cond-style-name=""><text:span text:style-name="a228" text:class-names=""><text:date text:fixed="false" style:data-style-name="a229">2/15/2026</text:date></text:span></text:p>
          </draw:text-box>
          <svg:title/>
          <svg:desc/>
        </draw:frame>
        <draw:page-thumbnail svg:x="1.54688in" svg:y="1.27083in" svg:width="4.57292in" svg:height="3.43056in" presentation:class="page" draw:id="id15" presentation:style-name="a232" draw:name="Slide Image Placeholder 3">
          <svg:title/>
          <svg:desc/>
        </draw:page-thumbnail>
        <draw:frame draw:id="id16" presentation:style-name="a247" draw:name="Notes Placeholder 4" svg:x="0.76667in" svg:y="4.89271in" svg:width="6.13333in" svg:height="4.00313in" presentation:class="notes" presentation:placeholder="false">
          <draw:text-box>
            <text:p text:style-name="a234" text:class-names="" text:cond-style-name=""><text:span text:style-name="a233" text:class-names="">Click to edit Master text styles</text:span></text:p>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4" text:class-names="">Fifth level</text:span></text:p>
                              </text:list-item>
                            </text:list>
                          </text:list-item>
                        </text:list>
                      </text:list-item>
                    </text:list>
                  </text:list-item>
                </text:list>
              </text:list-item>
            </text:list>
          </draw:text-box>
          <svg:title/>
          <svg:desc/>
        </draw:frame>
        <draw:frame draw:id="id17" presentation:style-name="a250" draw:name="Footer Placeholder 5" svg:x="0in" svg:y="9.65657in" svg:width="3.32222in" svg:height="0.5101in" presentation:class="footer" presentation:placeholder="false">
          <draw:text-box>
            <text:p text:style-name="a249" text:class-names="" text:cond-style-name=""><text:span text:style-name="a248" text:class-names=""/></text:p>
          </draw:text-box>
          <svg:title/>
          <svg:desc/>
        </draw:frame>
        <draw:frame draw:id="id18" presentation:style-name="a253" draw:name="Slide Number Placeholder 6" svg:x="4.34267in" svg:y="9.65657in" svg:width="3.32222in" svg:height="0.5101in" presentation:class="page-number" presentation:placeholder="false">
          <draw:text-box>
            <text:p text:style-name="a252" text:class-names="" text:cond-style-name=""><text:span text:style-name="a251" text:class-names=""><text:page-number style:num-format="1" text:fixed="false"/></text:span></text:p>
          </draw:text-box>
          <svg:title/>
          <svg:desc/>
        </draw:frame>
      </presentation:notes>
    </style:master-page>
    <style:master-page style:name="Master1-Layout5-title-Chapter-Slide-Blue-Screen-Only" style:page-layout-name="pageLayout1" draw:style-name="a255">
      <draw:custom-shape svg:x="-0.01272in" svg:y="0in" svg:width="10.01272in" svg:height="7.5in" draw:id="id45" draw:style-name="a258" draw:name="Rectangle 9">
        <svg:title/>
        <svg:desc/>
        <text:p text:style-name="a257" text:class-names="" text:cond-style-name=""><text:span text:style-name="a256" text:class-names=""/></text:p>
        <draw:enhanced-geometry xmlns:dr3d="urn:oasis:names:tc:opendocument:xmlns:dr3d:1.0" draw:type="non-primitive" svg:viewBox="0 0 21600 21600" draw:enhanced-path="M 0 0 L 21600 0 21600 21600 0 21600 Z N"/>
      </draw:custom-shape>
      <draw:frame draw:id="id46" presentation:style-name="a261" draw:name="Title 1" svg:x="1.25in" svg:y="1.22743in" svg:width="7.5in" svg:height="2.61111in" presentation:class="title" presentation:placeholder="false">
        <draw:text-box>
          <text:p text:style-name="a260" text:class-names="" text:cond-style-name=""><text:span text:style-name="a259" text:class-names="">Click to edit master chapter</text:span></text:p>
        </draw:text-box>
        <svg:title/>
        <svg:desc/>
      </draw:frame>
      <draw:frame draw:id="id47" presentation:style-name="a264" draw:name="Subtitle 2" svg:x="1.25in" svg:y="3.93924in" svg:width="7.5in" svg:height="1.81076in" presentation:class="subtitle" presentation:placeholder="false">
        <draw:text-box>
          <text:p text:style-name="a263" text:class-names="" text:cond-style-name=""><text:span text:style-name="a262" text:class-names="">Click to edit subtitle</text:span></text:p>
        </draw:text-box>
        <svg:title/>
        <svg:desc/>
      </draw:frame>
      <draw:custom-shape svg:x="-0.01272in" svg:y="0in" svg:width="1.2801in" svg:height="5.59554in" draw:id="id48" draw:style-name="a267" draw:name="Rectangle 2">
        <svg:title/>
        <svg:desc/>
        <text:p text:style-name="a266" text:class-names="" text:cond-style-name=""><text:span text:style-name="a265" text:class-names=""/></text:p>
        <draw:enhanced-geometry xmlns:dr3d="urn:oasis:names:tc:opendocument:xmlns:dr3d:1.0" draw:type="non-primitive" svg:viewBox="0 0 1170528 5116563" draw:enhanced-path="M ?f3 ?f0 L ?f1 ?f0 ?f4 ?f5 ?f0 ?f2 C ?f6 ?f7 ?f8 ?f9 ?f3 ?f0 Z N" draw:text-areas="?f28 ?f30 ?f29 ?f31" draw:glue-points="?f32 ?f33 ?f34 ?f33 ?f35 ?f36 ?f37 ?f38 ?f32 ?f33" draw:glue-point-leaving-directions="-90, -90, -90, -90, -90">
          <draw:equation draw:name="f0" draw:formula="0"/>
          <draw:equation draw:name="f1" draw:formula="1170528"/>
          <draw:equation draw:name="f2" draw:formula="5116563"/>
          <draw:equation draw:name="f3" draw:formula="11633"/>
          <draw:equation draw:name="f4" draw:formula="3880"/>
          <draw:equation draw:name="f5" draw:formula="4992114"/>
          <draw:equation draw:name="f6" draw:formula="1379"/>
          <draw:equation draw:name="f7" draw:formula="2829184"/>
          <draw:equation draw:name="f8" draw:formula="10254"/>
          <draw:equation draw:name="f9" draw:formula="2287379"/>
          <draw:equation draw:name="f10" draw:formula="?f2 - ?f0"/>
          <draw:equation draw:name="f11" draw:formula="?f1 - ?f0"/>
          <draw:equation draw:name="f12" draw:formula="?f11 / 1170528"/>
          <draw:equation draw:name="f13" draw:formula="?f10 / 5116563"/>
          <draw:equation draw:name="f14" draw:formula="11633 * ?f11"/>
          <draw:equation draw:name="f15" draw:formula="1170528 * ?f11"/>
          <draw:equation draw:name="f16" draw:formula="3880 * ?f11"/>
          <draw:equation draw:name="f17" draw:formula="0 * ?f11"/>
          <draw:equation draw:name="f18" draw:formula="0 * ?f10"/>
          <draw:equation draw:name="f19" draw:formula="4992114 * ?f10"/>
          <draw:equation draw:name="f20" draw:formula="5116563 * ?f10"/>
          <draw:equation draw:name="f21" draw:formula="?f14 / 1170528"/>
          <draw:equation draw:name="f22" draw:formula="?f15 / 1170528"/>
          <draw:equation draw:name="f23" draw:formula="?f16 / 1170528"/>
          <draw:equation draw:name="f24" draw:formula="?f17 / 1170528"/>
          <draw:equation draw:name="f25" draw:formula="?f18 / 5116563"/>
          <draw:equation draw:name="f26" draw:formula="?f19 / 5116563"/>
          <draw:equation draw:name="f27" draw:formula="?f20 / 5116563"/>
          <draw:equation draw:name="f28" draw:formula="?f0 / ?f12"/>
          <draw:equation draw:name="f29" draw:formula="?f1 / ?f12"/>
          <draw:equation draw:name="f30" draw:formula="?f0 / ?f13"/>
          <draw:equation draw:name="f31" draw:formula="?f2 / ?f13"/>
          <draw:equation draw:name="f32" draw:formula="?f21 / ?f12"/>
          <draw:equation draw:name="f33" draw:formula="?f25 / ?f13"/>
          <draw:equation draw:name="f34" draw:formula="?f22 / ?f12"/>
          <draw:equation draw:name="f35" draw:formula="?f23 / ?f12"/>
          <draw:equation draw:name="f36" draw:formula="?f26 / ?f13"/>
          <draw:equation draw:name="f37" draw:formula="?f24 / ?f12"/>
          <draw:equation draw:name="f38" draw:formula="?f27 / ?f13"/>
        </draw:enhanced-geometry>
      </draw:custom-shape>
      <draw:custom-shape svg:width="1.2801in" svg:height="5.59554in" draw:id="id49" draw:style-name="a270" draw:transform="translate(-0.64005in -2.79777in) rotate(-3.14159) translate(9.39005in 4.70223in)" draw:name="Rectangle 2">
        <svg:title/>
        <svg:desc/>
        <text:p text:style-name="a269" text:class-names="" text:cond-style-name=""><text:span text:style-name="a268" text:class-names=""/></text:p>
        <draw:enhanced-geometry xmlns:dr3d="urn:oasis:names:tc:opendocument:xmlns:dr3d:1.0" draw:type="non-primitive" svg:viewBox="0 0 1170528 5116563" draw:enhanced-path="M ?f3 ?f0 L ?f1 ?f0 ?f4 ?f5 ?f0 ?f2 C ?f6 ?f7 ?f8 ?f9 ?f3 ?f0 Z N" draw:text-areas="?f28 ?f30 ?f29 ?f31" draw:glue-points="?f32 ?f33 ?f34 ?f33 ?f35 ?f36 ?f37 ?f38 ?f32 ?f33" draw:glue-point-leaving-directions="-90, -90, -90, -90, -90">
          <draw:equation draw:name="f0" draw:formula="0"/>
          <draw:equation draw:name="f1" draw:formula="1170528"/>
          <draw:equation draw:name="f2" draw:formula="5116563"/>
          <draw:equation draw:name="f3" draw:formula="11633"/>
          <draw:equation draw:name="f4" draw:formula="3880"/>
          <draw:equation draw:name="f5" draw:formula="4992114"/>
          <draw:equation draw:name="f6" draw:formula="1379"/>
          <draw:equation draw:name="f7" draw:formula="2829184"/>
          <draw:equation draw:name="f8" draw:formula="10254"/>
          <draw:equation draw:name="f9" draw:formula="2287379"/>
          <draw:equation draw:name="f10" draw:formula="?f2 - ?f0"/>
          <draw:equation draw:name="f11" draw:formula="?f1 - ?f0"/>
          <draw:equation draw:name="f12" draw:formula="?f11 / 1170528"/>
          <draw:equation draw:name="f13" draw:formula="?f10 / 5116563"/>
          <draw:equation draw:name="f14" draw:formula="11633 * ?f11"/>
          <draw:equation draw:name="f15" draw:formula="1170528 * ?f11"/>
          <draw:equation draw:name="f16" draw:formula="3880 * ?f11"/>
          <draw:equation draw:name="f17" draw:formula="0 * ?f11"/>
          <draw:equation draw:name="f18" draw:formula="0 * ?f10"/>
          <draw:equation draw:name="f19" draw:formula="4992114 * ?f10"/>
          <draw:equation draw:name="f20" draw:formula="5116563 * ?f10"/>
          <draw:equation draw:name="f21" draw:formula="?f14 / 1170528"/>
          <draw:equation draw:name="f22" draw:formula="?f15 / 1170528"/>
          <draw:equation draw:name="f23" draw:formula="?f16 / 1170528"/>
          <draw:equation draw:name="f24" draw:formula="?f17 / 1170528"/>
          <draw:equation draw:name="f25" draw:formula="?f18 / 5116563"/>
          <draw:equation draw:name="f26" draw:formula="?f19 / 5116563"/>
          <draw:equation draw:name="f27" draw:formula="?f20 / 5116563"/>
          <draw:equation draw:name="f28" draw:formula="?f0 / ?f12"/>
          <draw:equation draw:name="f29" draw:formula="?f1 / ?f12"/>
          <draw:equation draw:name="f30" draw:formula="?f0 / ?f13"/>
          <draw:equation draw:name="f31" draw:formula="?f2 / ?f13"/>
          <draw:equation draw:name="f32" draw:formula="?f21 / ?f12"/>
          <draw:equation draw:name="f33" draw:formula="?f25 / ?f13"/>
          <draw:equation draw:name="f34" draw:formula="?f22 / ?f12"/>
          <draw:equation draw:name="f35" draw:formula="?f23 / ?f12"/>
          <draw:equation draw:name="f36" draw:formula="?f26 / ?f13"/>
          <draw:equation draw:name="f37" draw:formula="?f24 / ?f12"/>
          <draw:equation draw:name="f38" draw:formula="?f27 / ?f13"/>
        </draw:enhanced-geometry>
      </draw:custom-shape>
      <presentation:notes style:page-layout-name="pageLayout2" draw:style-name="a300">
        <draw:frame draw:id="id13" presentation:style-name="a273" draw:name="Header Placeholder 1" svg:x="0in" svg:y="0in" svg:width="3.32222in" svg:height="0.5101in" presentation:class="header" presentation:placeholder="false">
          <draw:text-box>
            <text:p text:style-name="a272" text:class-names="" text:cond-style-name=""><text:span text:style-name="a271" text:class-names=""/></text:p>
          </draw:text-box>
          <svg:title/>
          <svg:desc/>
        </draw:frame>
        <draw:frame draw:id="id14" presentation:style-name="a277" draw:name="Date Placeholder 2" svg:x="4.34267in" svg:y="0in" svg:width="3.32222in" svg:height="0.5101in" presentation:class="date-time" presentation:placeholder="false">
          <draw:text-box>
            <text:p text:style-name="a276" text:class-names="" text:cond-style-name=""><text:span text:style-name="a274" text:class-names=""><text:date text:fixed="false" style:data-style-name="a275">2/15/2026</text:date></text:span></text:p>
          </draw:text-box>
          <svg:title/>
          <svg:desc/>
        </draw:frame>
        <draw:page-thumbnail svg:x="1.54688in" svg:y="1.27083in" svg:width="4.57292in" svg:height="3.43056in" presentation:class="page" draw:id="id15" presentation:style-name="a278" draw:name="Slide Image Placeholder 3">
          <svg:title/>
          <svg:desc/>
        </draw:page-thumbnail>
        <draw:frame draw:id="id16" presentation:style-name="a293" draw:name="Notes Placeholder 4" svg:x="0.76667in" svg:y="4.89271in" svg:width="6.13333in" svg:height="4.00313in" presentation:class="notes" presentation:placeholder="false">
          <draw:text-box>
            <text:p text:style-name="a280" text:class-names="" text:cond-style-name=""><text:span text:style-name="a279" text:class-names="">Click to edit Master text styles</text:span></text:p>
            <text:list text:style-name="a283">
              <text:list-item>
                <text:list text:style-name="a283">
                  <text:list-item>
                    <text:p text:style-name="a282" text:class-names="" text:cond-style-name=""><text:span text:style-name="a281" text:class-names="">Second level</text:span></text:p>
                  </text:list-item>
                </text:list>
              </text:list-item>
            </text:list>
            <text:list text:style-name="a286">
              <text:list-item>
                <text:list text:style-name="a286">
                  <text:list-item>
                    <text:list text:style-name="a286">
                      <text:list-item>
                        <text:p text:style-name="a285" text:class-names="" text:cond-style-name=""><text:span text:style-name="a284" text:class-names="">Third level</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90" text:class-names="">Fifth level</text:span></text:p>
                              </text:list-item>
                            </text:list>
                          </text:list-item>
                        </text:list>
                      </text:list-item>
                    </text:list>
                  </text:list-item>
                </text:list>
              </text:list-item>
            </text:list>
          </draw:text-box>
          <svg:title/>
          <svg:desc/>
        </draw:frame>
        <draw:frame draw:id="id17" presentation:style-name="a296" draw:name="Footer Placeholder 5" svg:x="0in" svg:y="9.65657in" svg:width="3.32222in" svg:height="0.5101in" presentation:class="footer" presentation:placeholder="false">
          <draw:text-box>
            <text:p text:style-name="a295" text:class-names="" text:cond-style-name=""><text:span text:style-name="a294" text:class-names=""/></text:p>
          </draw:text-box>
          <svg:title/>
          <svg:desc/>
        </draw:frame>
        <draw:frame draw:id="id18" presentation:style-name="a299" draw:name="Slide Number Placeholder 6" svg:x="4.34267in" svg:y="9.65657in" svg:width="3.32222in" svg:height="0.5101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master-page>
    <style:master-page style:name="Master1-Layout6-title-Chapter-Slide-White-Screen-Only" style:page-layout-name="pageLayout1" draw:style-name="a301">
      <draw:custom-shape svg:x="-0.01272in" svg:y="0in" svg:width="1.2801in" svg:height="5.59554in" draw:id="id50" draw:style-name="a304" draw:name="Rectangle 2">
        <svg:title/>
        <svg:desc/>
        <text:p text:style-name="a303" text:class-names="" text:cond-style-name=""><text:span text:style-name="a302" text:class-names=""/></text:p>
        <draw:enhanced-geometry xmlns:dr3d="urn:oasis:names:tc:opendocument:xmlns:dr3d:1.0" draw:type="non-primitive" svg:viewBox="0 0 1170528 5116563" draw:enhanced-path="M ?f3 ?f0 L ?f1 ?f0 ?f4 ?f5 ?f0 ?f2 C ?f6 ?f7 ?f8 ?f9 ?f3 ?f0 Z N" draw:text-areas="?f28 ?f30 ?f29 ?f31" draw:glue-points="?f32 ?f33 ?f34 ?f33 ?f35 ?f36 ?f37 ?f38 ?f32 ?f33" draw:glue-point-leaving-directions="-90, -90, -90, -90, -90">
          <draw:equation draw:name="f0" draw:formula="0"/>
          <draw:equation draw:name="f1" draw:formula="1170528"/>
          <draw:equation draw:name="f2" draw:formula="5116563"/>
          <draw:equation draw:name="f3" draw:formula="11633"/>
          <draw:equation draw:name="f4" draw:formula="3880"/>
          <draw:equation draw:name="f5" draw:formula="4992114"/>
          <draw:equation draw:name="f6" draw:formula="1379"/>
          <draw:equation draw:name="f7" draw:formula="2829184"/>
          <draw:equation draw:name="f8" draw:formula="10254"/>
          <draw:equation draw:name="f9" draw:formula="2287379"/>
          <draw:equation draw:name="f10" draw:formula="?f2 - ?f0"/>
          <draw:equation draw:name="f11" draw:formula="?f1 - ?f0"/>
          <draw:equation draw:name="f12" draw:formula="?f11 / 1170528"/>
          <draw:equation draw:name="f13" draw:formula="?f10 / 5116563"/>
          <draw:equation draw:name="f14" draw:formula="11633 * ?f11"/>
          <draw:equation draw:name="f15" draw:formula="1170528 * ?f11"/>
          <draw:equation draw:name="f16" draw:formula="3880 * ?f11"/>
          <draw:equation draw:name="f17" draw:formula="0 * ?f11"/>
          <draw:equation draw:name="f18" draw:formula="0 * ?f10"/>
          <draw:equation draw:name="f19" draw:formula="4992114 * ?f10"/>
          <draw:equation draw:name="f20" draw:formula="5116563 * ?f10"/>
          <draw:equation draw:name="f21" draw:formula="?f14 / 1170528"/>
          <draw:equation draw:name="f22" draw:formula="?f15 / 1170528"/>
          <draw:equation draw:name="f23" draw:formula="?f16 / 1170528"/>
          <draw:equation draw:name="f24" draw:formula="?f17 / 1170528"/>
          <draw:equation draw:name="f25" draw:formula="?f18 / 5116563"/>
          <draw:equation draw:name="f26" draw:formula="?f19 / 5116563"/>
          <draw:equation draw:name="f27" draw:formula="?f20 / 5116563"/>
          <draw:equation draw:name="f28" draw:formula="?f0 / ?f12"/>
          <draw:equation draw:name="f29" draw:formula="?f1 / ?f12"/>
          <draw:equation draw:name="f30" draw:formula="?f0 / ?f13"/>
          <draw:equation draw:name="f31" draw:formula="?f2 / ?f13"/>
          <draw:equation draw:name="f32" draw:formula="?f21 / ?f12"/>
          <draw:equation draw:name="f33" draw:formula="?f25 / ?f13"/>
          <draw:equation draw:name="f34" draw:formula="?f22 / ?f12"/>
          <draw:equation draw:name="f35" draw:formula="?f23 / ?f12"/>
          <draw:equation draw:name="f36" draw:formula="?f26 / ?f13"/>
          <draw:equation draw:name="f37" draw:formula="?f24 / ?f12"/>
          <draw:equation draw:name="f38" draw:formula="?f27 / ?f13"/>
        </draw:enhanced-geometry>
      </draw:custom-shape>
      <draw:custom-shape svg:width="1.2801in" svg:height="5.59554in" draw:id="id51" draw:style-name="a307" draw:transform="translate(-0.64005in -2.79777in) rotate(-3.14159) translate(9.39005in 4.70223in)" draw:name="Rectangle 2">
        <svg:title/>
        <svg:desc/>
        <text:p text:style-name="a306" text:class-names="" text:cond-style-name=""><text:span text:style-name="a305" text:class-names=""/></text:p>
        <draw:enhanced-geometry xmlns:dr3d="urn:oasis:names:tc:opendocument:xmlns:dr3d:1.0" draw:type="non-primitive" svg:viewBox="0 0 1170528 5116563" draw:enhanced-path="M ?f3 ?f0 L ?f1 ?f0 ?f4 ?f5 ?f0 ?f2 C ?f6 ?f7 ?f8 ?f9 ?f3 ?f0 Z N" draw:text-areas="?f28 ?f30 ?f29 ?f31" draw:glue-points="?f32 ?f33 ?f34 ?f33 ?f35 ?f36 ?f37 ?f38 ?f32 ?f33" draw:glue-point-leaving-directions="-90, -90, -90, -90, -90">
          <draw:equation draw:name="f0" draw:formula="0"/>
          <draw:equation draw:name="f1" draw:formula="1170528"/>
          <draw:equation draw:name="f2" draw:formula="5116563"/>
          <draw:equation draw:name="f3" draw:formula="11633"/>
          <draw:equation draw:name="f4" draw:formula="3880"/>
          <draw:equation draw:name="f5" draw:formula="4992114"/>
          <draw:equation draw:name="f6" draw:formula="1379"/>
          <draw:equation draw:name="f7" draw:formula="2829184"/>
          <draw:equation draw:name="f8" draw:formula="10254"/>
          <draw:equation draw:name="f9" draw:formula="2287379"/>
          <draw:equation draw:name="f10" draw:formula="?f2 - ?f0"/>
          <draw:equation draw:name="f11" draw:formula="?f1 - ?f0"/>
          <draw:equation draw:name="f12" draw:formula="?f11 / 1170528"/>
          <draw:equation draw:name="f13" draw:formula="?f10 / 5116563"/>
          <draw:equation draw:name="f14" draw:formula="11633 * ?f11"/>
          <draw:equation draw:name="f15" draw:formula="1170528 * ?f11"/>
          <draw:equation draw:name="f16" draw:formula="3880 * ?f11"/>
          <draw:equation draw:name="f17" draw:formula="0 * ?f11"/>
          <draw:equation draw:name="f18" draw:formula="0 * ?f10"/>
          <draw:equation draw:name="f19" draw:formula="4992114 * ?f10"/>
          <draw:equation draw:name="f20" draw:formula="5116563 * ?f10"/>
          <draw:equation draw:name="f21" draw:formula="?f14 / 1170528"/>
          <draw:equation draw:name="f22" draw:formula="?f15 / 1170528"/>
          <draw:equation draw:name="f23" draw:formula="?f16 / 1170528"/>
          <draw:equation draw:name="f24" draw:formula="?f17 / 1170528"/>
          <draw:equation draw:name="f25" draw:formula="?f18 / 5116563"/>
          <draw:equation draw:name="f26" draw:formula="?f19 / 5116563"/>
          <draw:equation draw:name="f27" draw:formula="?f20 / 5116563"/>
          <draw:equation draw:name="f28" draw:formula="?f0 / ?f12"/>
          <draw:equation draw:name="f29" draw:formula="?f1 / ?f12"/>
          <draw:equation draw:name="f30" draw:formula="?f0 / ?f13"/>
          <draw:equation draw:name="f31" draw:formula="?f2 / ?f13"/>
          <draw:equation draw:name="f32" draw:formula="?f21 / ?f12"/>
          <draw:equation draw:name="f33" draw:formula="?f25 / ?f13"/>
          <draw:equation draw:name="f34" draw:formula="?f22 / ?f12"/>
          <draw:equation draw:name="f35" draw:formula="?f23 / ?f12"/>
          <draw:equation draw:name="f36" draw:formula="?f26 / ?f13"/>
          <draw:equation draw:name="f37" draw:formula="?f24 / ?f12"/>
          <draw:equation draw:name="f38" draw:formula="?f27 / ?f13"/>
        </draw:enhanced-geometry>
      </draw:custom-shape>
      <draw:frame draw:id="id52" presentation:style-name="a310" draw:name="Title 1" svg:x="1.25in" svg:y="1.22743in" svg:width="7.5in" svg:height="2.61111in" presentation:class="title" presentation:placeholder="false">
        <draw:text-box>
          <text:p text:style-name="a309" text:class-names="" text:cond-style-name=""><text:span text:style-name="a308" text:class-names="">Click to edit master chapter</text:span></text:p>
        </draw:text-box>
        <svg:title/>
        <svg:desc/>
      </draw:frame>
      <draw:frame draw:id="id53" presentation:style-name="a313" draw:name="Subtitle 2" svg:x="1.25in" svg:y="3.93924in" svg:width="7.5in" svg:height="1.81076in" presentation:class="subtitle" presentation:placeholder="false">
        <draw:text-box>
          <text:p text:style-name="a312" text:class-names="" text:cond-style-name=""><text:span text:style-name="a311" text:class-names="">Click to edit subtitle</text:span></text:p>
        </draw:text-box>
        <svg:title/>
        <svg:desc/>
      </draw:frame>
      <presentation:notes style:page-layout-name="pageLayout2" draw:style-name="a343">
        <draw:frame draw:id="id13" presentation:style-name="a316" draw:name="Header Placeholder 1" svg:x="0in" svg:y="0in" svg:width="3.32222in" svg:height="0.5101in" presentation:class="header" presentation:placeholder="false">
          <draw:text-box>
            <text:p text:style-name="a315" text:class-names="" text:cond-style-name=""><text:span text:style-name="a314" text:class-names=""/></text:p>
          </draw:text-box>
          <svg:title/>
          <svg:desc/>
        </draw:frame>
        <draw:frame draw:id="id14" presentation:style-name="a320" draw:name="Date Placeholder 2" svg:x="4.34267in" svg:y="0in" svg:width="3.32222in" svg:height="0.5101in" presentation:class="date-time" presentation:placeholder="false">
          <draw:text-box>
            <text:p text:style-name="a319" text:class-names="" text:cond-style-name=""><text:span text:style-name="a317" text:class-names=""><text:date text:fixed="false" style:data-style-name="a318">2/15/2026</text:date></text:span></text:p>
          </draw:text-box>
          <svg:title/>
          <svg:desc/>
        </draw:frame>
        <draw:page-thumbnail svg:x="1.54688in" svg:y="1.27083in" svg:width="4.57292in" svg:height="3.43056in" presentation:class="page" draw:id="id15" presentation:style-name="a321" draw:name="Slide Image Placeholder 3">
          <svg:title/>
          <svg:desc/>
        </draw:page-thumbnail>
        <draw:frame draw:id="id16" presentation:style-name="a336" draw:name="Notes Placeholder 4" svg:x="0.76667in" svg:y="4.89271in" svg:width="6.13333in" svg:height="4.00313in" presentation:class="notes" presentation:placeholder="false">
          <draw:text-box>
            <text:p text:style-name="a323" text:class-names="" text:cond-style-name=""><text:span text:style-name="a322" text:class-names="">Click to edit Master text styles</text:span></text:p>
            <text:list text:style-name="a326">
              <text:list-item>
                <text:list text:style-name="a326">
                  <text:list-item>
                    <text:p text:style-name="a325" text:class-names="" text:cond-style-name=""><text:span text:style-name="a324" text:class-names="">Second level</text:span></text:p>
                  </text:list-item>
                </text:list>
              </text:list-item>
            </text:list>
            <text:list text:style-name="a329">
              <text:list-item>
                <text:list text:style-name="a329">
                  <text:list-item>
                    <text:list text:style-name="a329">
                      <text:list-item>
                        <text:p text:style-name="a328" text:class-names="" text:cond-style-name=""><text:span text:style-name="a327" text:class-names="">Third le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3" text:class-names="">Fifth level</text:span></text:p>
                              </text:list-item>
                            </text:list>
                          </text:list-item>
                        </text:list>
                      </text:list-item>
                    </text:list>
                  </text:list-item>
                </text:list>
              </text:list-item>
            </text:list>
          </draw:text-box>
          <svg:title/>
          <svg:desc/>
        </draw:frame>
        <draw:frame draw:id="id17" presentation:style-name="a339" draw:name="Footer Placeholder 5" svg:x="0in" svg:y="9.65657in" svg:width="3.32222in" svg:height="0.5101in" presentation:class="footer" presentation:placeholder="false">
          <draw:text-box>
            <text:p text:style-name="a338" text:class-names="" text:cond-style-name=""><text:span text:style-name="a337" text:class-names=""/></text:p>
          </draw:text-box>
          <svg:title/>
          <svg:desc/>
        </draw:frame>
        <draw:frame draw:id="id18" presentation:style-name="a342" draw:name="Slide Number Placeholder 6" svg:x="4.34267in" svg:y="9.65657in" svg:width="3.32222in" svg:height="0.5101in" presentation:class="page-number" presentation:placeholder="false">
          <draw:text-box>
            <text:p text:style-name="a341" text:class-names="" text:cond-style-name=""><text:span text:style-name="a340" text:class-names=""><text:page-number style:num-format="1" text:fixed="false"/></text:span></text:p>
          </draw:text-box>
          <svg:title/>
          <svg:desc/>
        </draw:frame>
      </presentation:notes>
    </style:master-page>
    <style:master-page style:name="Master1-Layout7-cust-Chapter-Slide-Text-Only" style:page-layout-name="pageLayout1" draw:style-name="a344">
      <draw:frame draw:id="id54" draw:layer="Master1-bg" draw:style-name="a345" draw:name="Picture 31" svg:x="0.12029in" svg:y="7.12207in" svg:width="0.36324in" svg:height="0.27765in" style:rel-width="scale" style:rel-height="scale">
        <draw:image xlink:href="media/image19.png" xlink:type="simple" xlink:show="embed" xlink:actuate="onLoad"/>
        <svg:title/>
        <svg:desc/>
      </draw:frame>
      <draw:g draw:name="Group 13" draw:id="id55">
        <svg:title/>
        <svg:desc/>
        <draw:custom-shape svg:width="0.13823in" svg:height="9.65059in" draw:id="id60" draw:layer="Master1-bg" draw:style-name="a356" draw:transform="translate(-0.06911in -4.82529in) rotate(-1.5708) translate(4.93089in 0.16101in)" draw:name="Rectangle 14">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61" draw:layer="Master1-bg" draw:style-name="a359" draw:name="Rectangle 15">
          <svg:title/>
          <svg:desc/>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62" draw:layer="Master1-bg" draw:style-name="a362" draw:name="Rectangle 17">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g>
      <draw:custom-shape svg:width="0.13823in" svg:height="9.20063in" draw:id="id56" draw:layer="Master1-bg" draw:style-name="a348" draw:transform="translate(-0.06911in -4.60031in) rotate(-1.5708) translate(5.15586in 7.33714in)" draw:name="Rectangle 6">
        <svg:title/>
        <svg:desc/>
        <text:p text:style-name="a347" text:class-names="" text:cond-style-name=""><text:span text:style-name="a346"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57" draw:layer="Master1-bg" draw:style-name="a351" draw:name="Rectangle 30">
        <svg:title/>
        <svg:desc/>
        <text:p text:style-name="a350" text:class-names="" text:cond-style-name=""><text:span text:style-name="a349"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58" draw:layer="Master1-bg" draw:style-name="a352"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59" draw:layer="Master1-bg" draw:style-name="a353" draw:name="Picture 12" svg:x="8.42949in" svg:y="0.16453in" svg:width="1.38651in" svg:height="0.67125in" style:rel-width="scale" style:rel-height="scale">
        <draw:image xlink:href="media/image21.png" xlink:type="simple" xlink:show="embed" xlink:actuate="onLoad"/>
        <svg:title/>
        <svg:desc/>
      </draw:frame>
      <presentation:notes style:page-layout-name="pageLayout2" draw:style-name="a392">
        <draw:frame draw:id="id13" presentation:style-name="a365" draw:name="Header Placeholder 1" svg:x="0in" svg:y="0in" svg:width="3.32222in" svg:height="0.5101in" presentation:class="header" presentation:placeholder="false">
          <draw:text-box>
            <text:p text:style-name="a364" text:class-names="" text:cond-style-name=""><text:span text:style-name="a363" text:class-names=""/></text:p>
          </draw:text-box>
          <svg:title/>
          <svg:desc/>
        </draw:frame>
        <draw:frame draw:id="id14" presentation:style-name="a369" draw:name="Date Placeholder 2" svg:x="4.34267in" svg:y="0in" svg:width="3.32222in" svg:height="0.5101in" presentation:class="date-time" presentation:placeholder="false">
          <draw:text-box>
            <text:p text:style-name="a368" text:class-names="" text:cond-style-name=""><text:span text:style-name="a366" text:class-names=""><text:date text:fixed="false" style:data-style-name="a367">2/15/2026</text:date></text:span></text:p>
          </draw:text-box>
          <svg:title/>
          <svg:desc/>
        </draw:frame>
        <draw:page-thumbnail svg:x="1.54688in" svg:y="1.27083in" svg:width="4.57292in" svg:height="3.43056in" presentation:class="page" draw:id="id15" presentation:style-name="a370" draw:name="Slide Image Placeholder 3">
          <svg:title/>
          <svg:desc/>
        </draw:page-thumbnail>
        <draw:frame draw:id="id16" presentation:style-name="a385" draw:name="Notes Placeholder 4" svg:x="0.76667in" svg:y="4.89271in" svg:width="6.13333in" svg:height="4.00313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2" text:class-names="">Fifth level</text:span></text:p>
                              </text:list-item>
                            </text:list>
                          </text:list-item>
                        </text:list>
                      </text:list-item>
                    </text:list>
                  </text:list-item>
                </text:list>
              </text:list-item>
            </text:list>
          </draw:text-box>
          <svg:title/>
          <svg:desc/>
        </draw:frame>
        <draw:frame draw:id="id17" presentation:style-name="a388" draw:name="Footer Placeholder 5" svg:x="0in" svg:y="9.65657in" svg:width="3.32222in" svg:height="0.5101in" presentation:class="footer" presentation:placeholder="false">
          <draw:text-box>
            <text:p text:style-name="a387" text:class-names="" text:cond-style-name=""><text:span text:style-name="a386" text:class-names=""/></text:p>
          </draw:text-box>
          <svg:title/>
          <svg:desc/>
        </draw:frame>
        <draw:frame draw:id="id18" presentation:style-name="a391" draw:name="Slide Number Placeholder 6" svg:x="4.34267in" svg:y="9.65657in" svg:width="3.32222in" svg:height="0.5101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master-page>
    <style:master-page style:name="Master1-Layout8-cust-Title-and-Content-with-Subtitle" style:page-layout-name="pageLayout1" draw:style-name="a393">
      <draw:frame draw:id="id63" draw:layer="Master1-bg" draw:style-name="a394" draw:name="Picture 31" svg:x="0.12029in" svg:y="7.12207in" svg:width="0.36324in" svg:height="0.27765in" style:rel-width="scale" style:rel-height="scale">
        <draw:image xlink:href="media/image19.png" xlink:type="simple" xlink:show="embed" xlink:actuate="onLoad"/>
        <svg:title/>
        <svg:desc/>
      </draw:frame>
      <draw:g draw:name="Group 13" draw:id="id64">
        <svg:title/>
        <svg:desc/>
        <draw:custom-shape svg:width="0.13823in" svg:height="9.65059in" draw:id="id69" draw:layer="Master1-bg" draw:style-name="a405" draw:transform="translate(-0.06911in -4.82529in) rotate(-1.5708) translate(4.93089in 0.16101in)" draw:name="Rectangle 14">
          <svg:title/>
          <svg:desc/>
          <text:p text:style-name="a404" text:class-names="" text:cond-style-name=""><text:span text:style-name="a403"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70" draw:layer="Master1-bg" draw:style-name="a408" draw:name="Rectangle 15">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71" draw:layer="Master1-bg" draw:style-name="a411" draw:name="Rectangle 17">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g>
      <draw:custom-shape svg:width="0.13823in" svg:height="9.20063in" draw:id="id65" draw:layer="Master1-bg" draw:style-name="a397" draw:transform="translate(-0.06911in -4.60031in) rotate(-1.5708) translate(5.15586in 7.33714in)" draw:name="Rectangle 6">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66" draw:layer="Master1-bg" draw:style-name="a400" draw:name="Rectangle 30">
        <svg:title/>
        <svg:desc/>
        <text:p text:style-name="a399" text:class-names="" text:cond-style-name=""><text:span text:style-name="a398"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67" draw:layer="Master1-bg" draw:style-name="a401"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68" draw:layer="Master1-bg" draw:style-name="a402" draw:name="Picture 12" svg:x="8.42949in" svg:y="0.16453in" svg:width="1.38651in" svg:height="0.67125in" style:rel-width="scale" style:rel-height="scale">
        <draw:image xlink:href="media/image21.png" xlink:type="simple" xlink:show="embed" xlink:actuate="onLoad"/>
        <svg:title/>
        <svg:desc/>
      </draw:frame>
      <presentation:notes style:page-layout-name="pageLayout2" draw:style-name="a441">
        <draw:frame draw:id="id13" presentation:style-name="a414" draw:name="Header Placeholder 1" svg:x="0in" svg:y="0in" svg:width="3.32222in" svg:height="0.5101in" presentation:class="header" presentation:placeholder="false">
          <draw:text-box>
            <text:p text:style-name="a413" text:class-names="" text:cond-style-name=""><text:span text:style-name="a412" text:class-names=""/></text:p>
          </draw:text-box>
          <svg:title/>
          <svg:desc/>
        </draw:frame>
        <draw:frame draw:id="id14" presentation:style-name="a418" draw:name="Date Placeholder 2" svg:x="4.34267in" svg:y="0in" svg:width="3.32222in" svg:height="0.5101in" presentation:class="date-time" presentation:placeholder="false">
          <draw:text-box>
            <text:p text:style-name="a417" text:class-names="" text:cond-style-name=""><text:span text:style-name="a415" text:class-names=""><text:date text:fixed="false" style:data-style-name="a416">2/15/2026</text:date></text:span></text:p>
          </draw:text-box>
          <svg:title/>
          <svg:desc/>
        </draw:frame>
        <draw:page-thumbnail svg:x="1.54688in" svg:y="1.27083in" svg:width="4.57292in" svg:height="3.43056in" presentation:class="page" draw:id="id15" presentation:style-name="a419" draw:name="Slide Image Placeholder 3">
          <svg:title/>
          <svg:desc/>
        </draw:page-thumbnail>
        <draw:frame draw:id="id16" presentation:style-name="a434" draw:name="Notes Placeholder 4" svg:x="0.76667in" svg:y="4.89271in" svg:width="6.13333in" svg:height="4.00313in" presentation:class="notes" presentation:placeholder="false">
          <draw:text-box>
            <text:p text:style-name="a421" text:class-names="" text:cond-style-name=""><text:span text:style-name="a420" text:class-names="">Click to edit Master text styles</text:span></text:p>
            <text:list text:style-name="a424">
              <text:list-item>
                <text:list text:style-name="a424">
                  <text:list-item>
                    <text:p text:style-name="a423" text:class-names="" text:cond-style-name=""><text:span text:style-name="a422" text:class-names="">Second level</text:span></text:p>
                  </text:list-item>
                </text:list>
              </text:list-item>
            </text:list>
            <text:list text:style-name="a427">
              <text:list-item>
                <text:list text:style-name="a427">
                  <text:list-item>
                    <text:list text:style-name="a427">
                      <text:list-item>
                        <text:p text:style-name="a426" text:class-names="" text:cond-style-name=""><text:span text:style-name="a425" text:class-names="">Third level</text:span></text:p>
                      </text:list-item>
                    </text:list>
                  </text:list-item>
                </text:list>
              </text:list-item>
            </text:list>
            <text:list text:style-name="a430">
              <text:list-item>
                <text:list text:style-name="a430">
                  <text:list-item>
                    <text:list text:style-name="a430">
                      <text:list-item>
                        <text:list text:style-name="a430">
                          <text:list-item>
                            <text:p text:style-name="a429" text:class-names="" text:cond-style-name=""><text:span text:style-name="a428" text:class-names="">Fourth level</text:span></text:p>
                          </text:list-item>
                        </text:list>
                      </text:list-item>
                    </text:list>
                  </text:list-item>
                </text:list>
              </text:list-item>
            </text:list>
            <text:list text:style-name="a433">
              <text:list-item>
                <text:list text:style-name="a433">
                  <text:list-item>
                    <text:list text:style-name="a433">
                      <text:list-item>
                        <text:list text:style-name="a433">
                          <text:list-item>
                            <text:list text:style-name="a433">
                              <text:list-item>
                                <text:p text:style-name="a432" text:class-names="" text:cond-style-name=""><text:span text:style-name="a431" text:class-names="">Fifth level</text:span></text:p>
                              </text:list-item>
                            </text:list>
                          </text:list-item>
                        </text:list>
                      </text:list-item>
                    </text:list>
                  </text:list-item>
                </text:list>
              </text:list-item>
            </text:list>
          </draw:text-box>
          <svg:title/>
          <svg:desc/>
        </draw:frame>
        <draw:frame draw:id="id17" presentation:style-name="a437" draw:name="Footer Placeholder 5" svg:x="0in" svg:y="9.65657in" svg:width="3.32222in" svg:height="0.5101in" presentation:class="footer" presentation:placeholder="false">
          <draw:text-box>
            <text:p text:style-name="a436" text:class-names="" text:cond-style-name=""><text:span text:style-name="a435" text:class-names=""/></text:p>
          </draw:text-box>
          <svg:title/>
          <svg:desc/>
        </draw:frame>
        <draw:frame draw:id="id18" presentation:style-name="a440" draw:name="Slide Number Placeholder 6" svg:x="4.34267in" svg:y="9.65657in" svg:width="3.32222in" svg:height="0.510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master-page>
    <style:master-page style:name="Master1-Layout9-cust-Title-only" style:page-layout-name="pageLayout1" draw:style-name="a442">
      <draw:frame draw:id="id72" draw:layer="Master1-bg" draw:style-name="a443" draw:name="Picture 31" svg:x="0.12029in" svg:y="7.12207in" svg:width="0.36324in" svg:height="0.27765in" style:rel-width="scale" style:rel-height="scale">
        <draw:image xlink:href="media/image19.png" xlink:type="simple" xlink:show="embed" xlink:actuate="onLoad"/>
        <svg:title/>
        <svg:desc/>
      </draw:frame>
      <draw:g draw:name="Group 13" draw:id="id73">
        <svg:title/>
        <svg:desc/>
        <draw:custom-shape svg:width="0.13823in" svg:height="9.65059in" draw:id="id78" draw:layer="Master1-bg" draw:style-name="a454" draw:transform="translate(-0.06911in -4.82529in) rotate(-1.5708) translate(4.93089in 0.16101in)" draw:name="Rectangle 14">
          <svg:title/>
          <svg:desc/>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79" draw:layer="Master1-bg" draw:style-name="a457" draw:name="Rectangle 15">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80" draw:layer="Master1-bg" draw:style-name="a460" draw:name="Rectangle 17">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g>
      <draw:custom-shape svg:width="0.13823in" svg:height="9.20063in" draw:id="id74" draw:layer="Master1-bg" draw:style-name="a446" draw:transform="translate(-0.06911in -4.60031in) rotate(-1.5708) translate(5.15586in 7.33714in)" draw:name="Rectangle 6">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75" draw:layer="Master1-bg" draw:style-name="a449" draw:name="Rectangle 30">
        <svg:title/>
        <svg:desc/>
        <text:p text:style-name="a448" text:class-names="" text:cond-style-name=""><text:span text:style-name="a447"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76" draw:layer="Master1-bg" draw:style-name="a450"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77" draw:layer="Master1-bg" draw:style-name="a451" draw:name="Picture 12" svg:x="8.42949in" svg:y="0.16453in" svg:width="1.38651in" svg:height="0.67125in" style:rel-width="scale" style:rel-height="scale">
        <draw:image xlink:href="media/image21.png" xlink:type="simple" xlink:show="embed" xlink:actuate="onLoad"/>
        <svg:title/>
        <svg:desc/>
      </draw:frame>
      <presentation:notes style:page-layout-name="pageLayout2" draw:style-name="a490">
        <draw:frame draw:id="id13" presentation:style-name="a463" draw:name="Header Placeholder 1" svg:x="0in" svg:y="0in" svg:width="3.32222in" svg:height="0.5101in" presentation:class="header" presentation:placeholder="false">
          <draw:text-box>
            <text:p text:style-name="a462" text:class-names="" text:cond-style-name=""><text:span text:style-name="a461" text:class-names=""/></text:p>
          </draw:text-box>
          <svg:title/>
          <svg:desc/>
        </draw:frame>
        <draw:frame draw:id="id14" presentation:style-name="a467" draw:name="Date Placeholder 2" svg:x="4.34267in" svg:y="0in" svg:width="3.32222in" svg:height="0.5101in" presentation:class="date-time" presentation:placeholder="false">
          <draw:text-box>
            <text:p text:style-name="a466" text:class-names="" text:cond-style-name=""><text:span text:style-name="a464" text:class-names=""><text:date text:fixed="false" style:data-style-name="a465">2/15/2026</text:date></text:span></text:p>
          </draw:text-box>
          <svg:title/>
          <svg:desc/>
        </draw:frame>
        <draw:page-thumbnail svg:x="1.54688in" svg:y="1.27083in" svg:width="4.57292in" svg:height="3.43056in" presentation:class="page" draw:id="id15" presentation:style-name="a468" draw:name="Slide Image Placeholder 3">
          <svg:title/>
          <svg:desc/>
        </draw:page-thumbnail>
        <draw:frame draw:id="id16" presentation:style-name="a483" draw:name="Notes Placeholder 4" svg:x="0.76667in" svg:y="4.89271in" svg:width="6.13333in" svg:height="4.00313in" presentation:class="notes" presentation:placeholder="false">
          <draw:text-box>
            <text:p text:style-name="a470" text:class-names="" text:cond-style-name=""><text:span text:style-name="a469" text:class-names="">Click to edit Master text styles</text:span></text:p>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80" text:class-names="">Fifth level</text:span></text:p>
                              </text:list-item>
                            </text:list>
                          </text:list-item>
                        </text:list>
                      </text:list-item>
                    </text:list>
                  </text:list-item>
                </text:list>
              </text:list-item>
            </text:list>
          </draw:text-box>
          <svg:title/>
          <svg:desc/>
        </draw:frame>
        <draw:frame draw:id="id17" presentation:style-name="a486" draw:name="Footer Placeholder 5" svg:x="0in" svg:y="9.65657in" svg:width="3.32222in" svg:height="0.5101in" presentation:class="footer" presentation:placeholder="false">
          <draw:text-box>
            <text:p text:style-name="a485" text:class-names="" text:cond-style-name=""><text:span text:style-name="a484" text:class-names=""/></text:p>
          </draw:text-box>
          <svg:title/>
          <svg:desc/>
        </draw:frame>
        <draw:frame draw:id="id18" presentation:style-name="a489" draw:name="Slide Number Placeholder 6" svg:x="4.34267in" svg:y="9.65657in" svg:width="3.32222in" svg:height="0.5101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10-cust-Comparison" style:page-layout-name="pageLayout1" draw:style-name="a491">
      <draw:frame draw:id="id81" draw:layer="Master1-bg" draw:style-name="a492" draw:name="Picture 31" svg:x="0.12029in" svg:y="7.12207in" svg:width="0.36324in" svg:height="0.27765in" style:rel-width="scale" style:rel-height="scale">
        <draw:image xlink:href="media/image19.png" xlink:type="simple" xlink:show="embed" xlink:actuate="onLoad"/>
        <svg:title/>
        <svg:desc/>
      </draw:frame>
      <draw:g draw:name="Group 13" draw:id="id82">
        <svg:title/>
        <svg:desc/>
        <draw:custom-shape svg:width="0.13823in" svg:height="9.65059in" draw:id="id88" draw:layer="Master1-bg" draw:style-name="a506" draw:transform="translate(-0.06911in -4.82529in) rotate(-1.5708) translate(4.93089in 0.16101in)" draw:name="Rectangle 14">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89" draw:layer="Master1-bg" draw:style-name="a509" draw:name="Rectangle 15">
          <svg:title/>
          <svg:desc/>
          <text:p text:style-name="a508" text:class-names="" text:cond-style-name=""><text:span text:style-name="a507"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90" draw:layer="Master1-bg" draw:style-name="a512" draw:name="Rectangle 17">
          <svg:title/>
          <svg:desc/>
          <text:p text:style-name="a511" text:class-names="" text:cond-style-name=""><text:span text:style-name="a510" text:class-names=""/></text:p>
          <draw:enhanced-geometry xmlns:dr3d="urn:oasis:names:tc:opendocument:xmlns:dr3d:1.0" draw:type="non-primitive" svg:viewBox="0 0 21600 21600" draw:enhanced-path="M 0 0 L 21600 0 21600 21600 0 21600 Z N"/>
        </draw:custom-shape>
      </draw:g>
      <draw:custom-shape svg:width="0.13823in" svg:height="9.20063in" draw:id="id83" draw:layer="Master1-bg" draw:style-name="a495" draw:transform="translate(-0.06911in -4.60031in) rotate(-1.5708) translate(5.15586in 7.33714in)" draw:name="Rectangle 6">
        <svg:title/>
        <svg:desc/>
        <text:p text:style-name="a494" text:class-names="" text:cond-style-name=""><text:span text:style-name="a493"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84" draw:layer="Master1-bg" draw:style-name="a498" draw:name="Rectangle 30">
        <svg:title/>
        <svg:desc/>
        <text:p text:style-name="a497" text:class-names="" text:cond-style-name=""><text:span text:style-name="a496"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85" draw:layer="Master1-bg" draw:style-name="a499"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86" draw:layer="Master1-bg" draw:style-name="a500" draw:name="Picture 12" svg:x="8.42949in" svg:y="0.16453in" svg:width="1.38651in" svg:height="0.67125in" style:rel-width="scale" style:rel-height="scale">
        <draw:image xlink:href="media/image21.png" xlink:type="simple" xlink:show="embed" xlink:actuate="onLoad"/>
        <svg:title/>
        <svg:desc/>
      </draw:frame>
      <draw:frame draw:id="id87" presentation:style-name="a503" draw:name="Title Placeholder 1" svg:x="1.30303in" svg:y="0.40138in" svg:width="7.2018in" svg:height="0.79856in" presentation:class="title" presentation:placeholder="false">
        <draw:text-box>
          <text:p text:style-name="a502" text:class-names="" text:cond-style-name=""><text:span text:style-name="a501" text:class-names="">Click to edit title</text:span></text:p>
        </draw:text-box>
        <svg:title/>
        <svg:desc/>
      </draw:frame>
      <presentation:notes style:page-layout-name="pageLayout2" draw:style-name="a542">
        <draw:frame draw:id="id13" presentation:style-name="a515" draw:name="Header Placeholder 1" svg:x="0in" svg:y="0in" svg:width="3.32222in" svg:height="0.5101in" presentation:class="header" presentation:placeholder="false">
          <draw:text-box>
            <text:p text:style-name="a514" text:class-names="" text:cond-style-name=""><text:span text:style-name="a513" text:class-names=""/></text:p>
          </draw:text-box>
          <svg:title/>
          <svg:desc/>
        </draw:frame>
        <draw:frame draw:id="id14" presentation:style-name="a519" draw:name="Date Placeholder 2" svg:x="4.34267in" svg:y="0in" svg:width="3.32222in" svg:height="0.5101in" presentation:class="date-time" presentation:placeholder="false">
          <draw:text-box>
            <text:p text:style-name="a518" text:class-names="" text:cond-style-name=""><text:span text:style-name="a516" text:class-names=""><text:date text:fixed="false" style:data-style-name="a517">2/15/2026</text:date></text:span></text:p>
          </draw:text-box>
          <svg:title/>
          <svg:desc/>
        </draw:frame>
        <draw:page-thumbnail svg:x="1.54688in" svg:y="1.27083in" svg:width="4.57292in" svg:height="3.43056in" presentation:class="page" draw:id="id15" presentation:style-name="a520" draw:name="Slide Image Placeholder 3">
          <svg:title/>
          <svg:desc/>
        </draw:page-thumbnail>
        <draw:frame draw:id="id16" presentation:style-name="a535" draw:name="Notes Placeholder 4" svg:x="0.76667in" svg:y="4.89271in" svg:width="6.13333in" svg:height="4.00313in" presentation:class="notes" presentation:placeholder="false">
          <draw:text-box>
            <text:p text:style-name="a522" text:class-names="" text:cond-style-name=""><text:span text:style-name="a521" text:class-names="">Click to edit Master text styles</text:span></text:p>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2" text:class-names="">Fifth level</text:span></text:p>
                              </text:list-item>
                            </text:list>
                          </text:list-item>
                        </text:list>
                      </text:list-item>
                    </text:list>
                  </text:list-item>
                </text:list>
              </text:list-item>
            </text:list>
          </draw:text-box>
          <svg:title/>
          <svg:desc/>
        </draw:frame>
        <draw:frame draw:id="id17" presentation:style-name="a538" draw:name="Footer Placeholder 5" svg:x="0in" svg:y="9.65657in" svg:width="3.32222in" svg:height="0.5101in" presentation:class="footer" presentation:placeholder="false">
          <draw:text-box>
            <text:p text:style-name="a537" text:class-names="" text:cond-style-name=""><text:span text:style-name="a536" text:class-names=""/></text:p>
          </draw:text-box>
          <svg:title/>
          <svg:desc/>
        </draw:frame>
        <draw:frame draw:id="id18" presentation:style-name="a541" draw:name="Slide Number Placeholder 6" svg:x="4.34267in" svg:y="9.65657in" svg:width="3.32222in" svg:height="0.5101in" presentation:class="page-number" presentation:placeholder="false">
          <draw:text-box>
            <text:p text:style-name="a540" text:class-names="" text:cond-style-name=""><text:span text:style-name="a539" text:class-names=""><text:page-number style:num-format="1" text:fixed="false"/></text:span></text:p>
          </draw:text-box>
          <svg:title/>
          <svg:desc/>
        </draw:frame>
      </presentation:notes>
    </style:master-page>
    <style:master-page style:name="Master1-Layout11-cust-Comparison,-header" style:page-layout-name="pageLayout1" draw:style-name="a543">
      <draw:frame draw:id="id91" draw:layer="Master1-bg" draw:style-name="a544" draw:name="Picture 31" svg:x="0.12029in" svg:y="7.12207in" svg:width="0.36324in" svg:height="0.27765in" style:rel-width="scale" style:rel-height="scale">
        <draw:image xlink:href="media/image19.png" xlink:type="simple" xlink:show="embed" xlink:actuate="onLoad"/>
        <svg:title/>
        <svg:desc/>
      </draw:frame>
      <draw:g draw:name="Group 13" draw:id="id92">
        <svg:title/>
        <svg:desc/>
        <draw:custom-shape svg:width="0.13823in" svg:height="9.65059in" draw:id="id100" draw:layer="Master1-bg" draw:style-name="a578" draw:transform="translate(-0.06911in -4.82529in) rotate(-1.5708) translate(4.93089in 0.16101in)" draw:name="Rectangle 14">
          <svg:title/>
          <svg:desc/>
          <text:p text:style-name="a577" text:class-names="" text:cond-style-name=""><text:span text:style-name="a576"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101" draw:layer="Master1-bg" draw:style-name="a581" draw:name="Rectangle 15">
          <svg:title/>
          <svg:desc/>
          <text:p text:style-name="a580" text:class-names="" text:cond-style-name=""><text:span text:style-name="a579"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102" draw:layer="Master1-bg" draw:style-name="a584" draw:name="Rectangle 17">
          <svg:title/>
          <svg:desc/>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custom-shape>
      </draw:g>
      <draw:custom-shape svg:width="0.13823in" svg:height="9.20063in" draw:id="id93" draw:layer="Master1-bg" draw:style-name="a547" draw:transform="translate(-0.06911in -4.60031in) rotate(-1.5708) translate(5.15586in 7.33714in)"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94" draw:layer="Master1-bg" draw:style-name="a550" draw:name="Rectangle 30">
        <svg:title/>
        <svg:desc/>
        <text:p text:style-name="a549" text:class-names="" text:cond-style-name=""><text:span text:style-name="a548"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95" draw:layer="Master1-bg" draw:style-name="a551"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96" draw:layer="Master1-bg" draw:style-name="a552" draw:name="Picture 12" svg:x="8.42949in" svg:y="0.16453in" svg:width="1.38651in" svg:height="0.67125in" style:rel-width="scale" style:rel-height="scale">
        <draw:image xlink:href="media/image21.png" xlink:type="simple" xlink:show="embed" xlink:actuate="onLoad"/>
        <svg:title/>
        <svg:desc/>
      </draw:frame>
      <draw:frame draw:id="id97" presentation:style-name="a556" draw:name="Text Placeholder 2" svg:x="5.12121in" svg:y="1.68205in" svg:width="4.23047in" svg:height="0.64185in" presentation:class="outline" presentation:placeholder="false">
        <draw:text-box>
          <text:list text:style-name="a555">
            <text:list-item>
              <text:p text:style-name="a554" text:class-names="" text:cond-style-name=""><text:span text:style-name="a553" text:class-names="">Edit text</text:span></text:p>
            </text:list-item>
          </text:list>
        </draw:text-box>
        <svg:title/>
        <svg:desc/>
      </draw:frame>
      <draw:frame draw:id="id98" presentation:style-name="a572" draw:name="Content Placeholder 2" svg:x="5.2103in" svg:y="2.51402in" svg:width="4.07026in" svg:height="3.84085in" presentation:class="object" presentation:placeholder="false">
        <draw:text-box>
          <text:list text:style-name="a559">
            <text:list-item>
              <text:p text:style-name="a558" text:class-names="" text:cond-style-name=""><text:span text:style-name="a557" text:class-names="">Edit text</text:span></text:p>
            </text:list-item>
          </text:list>
          <text:list text:style-name="a562">
            <text:list-item>
              <text:list text:style-name="a562">
                <text:list-item>
                  <text:p text:style-name="a561" text:class-names="" text:cond-style-name=""><text:span text:style-name="a560" text:class-names="">Second level</text:span></text:p>
                </text:list-item>
              </text:list>
            </text:list-item>
          </text:list>
          <text:list text:style-name="a565">
            <text:list-item>
              <text:list text:style-name="a565">
                <text:list-item>
                  <text:list text:style-name="a565">
                    <text:list-item>
                      <text:p text:style-name="a564" text:class-names="" text:cond-style-name=""><text:span text:style-name="a563" text:class-names="">Third level</text:span></text:p>
                    </text:list-item>
                  </text:list>
                </text:list-item>
              </text:list>
            </text:list-item>
          </text:list>
          <text:list text:style-name="a568">
            <text:list-item>
              <text:list text:style-name="a568">
                <text:list-item>
                  <text:list text:style-name="a568">
                    <text:list-item>
                      <text:list text:style-name="a568">
                        <text:list-item>
                          <text:p text:style-name="a567" text:class-names="" text:cond-style-name=""><text:span text:style-name="a566" text:class-names="">Fourth level</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9" text:class-names="">Fifth level</text:span></text:p>
                            </text:list-item>
                          </text:list>
                        </text:list-item>
                      </text:list>
                    </text:list-item>
                  </text:list>
                </text:list-item>
              </text:list>
            </text:list-item>
          </text:list>
        </draw:text-box>
        <svg:title/>
        <svg:desc/>
      </draw:frame>
      <draw:frame draw:id="id99" presentation:style-name="a575" draw:name="Title Placeholder 1" svg:x="1.30303in" svg:y="0.40138in" svg:width="7.2018in" svg:height="0.79856in" presentation:class="title" presentation:placeholder="false">
        <draw:text-box>
          <text:p text:style-name="a574" text:class-names="" text:cond-style-name=""><text:span text:style-name="a573" text:class-names="">Click to edit title</text:span></text:p>
        </draw:text-box>
        <svg:title/>
        <svg:desc/>
      </draw:frame>
      <presentation:notes style:page-layout-name="pageLayout2" draw:style-name="a614">
        <draw:frame draw:id="id13" presentation:style-name="a587" draw:name="Header Placeholder 1" svg:x="0in" svg:y="0in" svg:width="3.32222in" svg:height="0.5101in" presentation:class="header" presentation:placeholder="false">
          <draw:text-box>
            <text:p text:style-name="a586" text:class-names="" text:cond-style-name=""><text:span text:style-name="a585" text:class-names=""/></text:p>
          </draw:text-box>
          <svg:title/>
          <svg:desc/>
        </draw:frame>
        <draw:frame draw:id="id14" presentation:style-name="a591" draw:name="Date Placeholder 2" svg:x="4.34267in" svg:y="0in" svg:width="3.32222in" svg:height="0.5101in" presentation:class="date-time" presentation:placeholder="false">
          <draw:text-box>
            <text:p text:style-name="a590" text:class-names="" text:cond-style-name=""><text:span text:style-name="a588" text:class-names=""><text:date text:fixed="false" style:data-style-name="a589">2/15/2026</text:date></text:span></text:p>
          </draw:text-box>
          <svg:title/>
          <svg:desc/>
        </draw:frame>
        <draw:page-thumbnail svg:x="1.54688in" svg:y="1.27083in" svg:width="4.57292in" svg:height="3.43056in" presentation:class="page" draw:id="id15" presentation:style-name="a592" draw:name="Slide Image Placeholder 3">
          <svg:title/>
          <svg:desc/>
        </draw:page-thumbnail>
        <draw:frame draw:id="id16" presentation:style-name="a607" draw:name="Notes Placeholder 4" svg:x="0.76667in" svg:y="4.89271in" svg:width="6.13333in" svg:height="4.00313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4" text:class-names="">Fifth level</text:span></text:p>
                              </text:list-item>
                            </text:list>
                          </text:list-item>
                        </text:list>
                      </text:list-item>
                    </text:list>
                  </text:list-item>
                </text:list>
              </text:list-item>
            </text:list>
          </draw:text-box>
          <svg:title/>
          <svg:desc/>
        </draw:frame>
        <draw:frame draw:id="id17" presentation:style-name="a610" draw:name="Footer Placeholder 5" svg:x="0in" svg:y="9.65657in" svg:width="3.32222in" svg:height="0.5101in" presentation:class="footer" presentation:placeholder="false">
          <draw:text-box>
            <text:p text:style-name="a609" text:class-names="" text:cond-style-name=""><text:span text:style-name="a608" text:class-names=""/></text:p>
          </draw:text-box>
          <svg:title/>
          <svg:desc/>
        </draw:frame>
        <draw:frame draw:id="id18" presentation:style-name="a613" draw:name="Slide Number Placeholder 6" svg:x="4.34267in" svg:y="9.65657in" svg:width="3.32222in" svg:height="0.5101in" presentation:class="page-number" presentation:placeholder="false">
          <draw:text-box>
            <text:p text:style-name="a612" text:class-names="" text:cond-style-name=""><text:span text:style-name="a611" text:class-names=""><text:page-number style:num-format="1" text:fixed="false"/></text:span></text:p>
          </draw:text-box>
          <svg:title/>
          <svg:desc/>
        </draw:frame>
      </presentation:notes>
    </style:master-page>
    <style:master-page style:name="Master1-Layout12-cust-Photo" style:page-layout-name="pageLayout1" draw:style-name="a615">
      <draw:frame draw:id="id103" draw:layer="Master1-bg" draw:style-name="a616" draw:name="Picture 31" svg:x="0.12029in" svg:y="7.12207in" svg:width="0.36324in" svg:height="0.27765in" style:rel-width="scale" style:rel-height="scale">
        <draw:image xlink:href="media/image19.png" xlink:type="simple" xlink:show="embed" xlink:actuate="onLoad"/>
        <svg:title/>
        <svg:desc/>
      </draw:frame>
      <draw:g draw:name="Group 13" draw:id="id104">
        <svg:title/>
        <svg:desc/>
        <draw:custom-shape svg:width="0.13823in" svg:height="9.65059in" draw:id="id109" draw:layer="Master1-bg" draw:style-name="a627" draw:transform="translate(-0.06911in -4.82529in) rotate(-1.5708) translate(4.93089in 0.16101in)" draw:name="Rectangle 14">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110" draw:layer="Master1-bg" draw:style-name="a630" draw:name="Rectangle 15">
          <svg:title/>
          <svg:desc/>
          <text:p text:style-name="a629" text:class-names="" text:cond-style-name=""><text:span text:style-name="a628"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111" draw:layer="Master1-bg" draw:style-name="a633" draw:name="Rectangle 17">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g>
      <draw:custom-shape svg:width="0.13823in" svg:height="9.20063in" draw:id="id105" draw:layer="Master1-bg" draw:style-name="a619" draw:transform="translate(-0.06911in -4.60031in) rotate(-1.5708) translate(5.15586in 7.33714in)" draw:name="Rectangle 6">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106" draw:layer="Master1-bg" draw:style-name="a622" draw:name="Rectangle 30">
        <svg:title/>
        <svg:desc/>
        <text:p text:style-name="a621" text:class-names="" text:cond-style-name=""><text:span text:style-name="a620"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107" draw:layer="Master1-bg" draw:style-name="a623"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108" draw:layer="Master1-bg" draw:style-name="a624" draw:name="Picture 12" svg:x="8.42949in" svg:y="0.16453in" svg:width="1.38651in" svg:height="0.67125in" style:rel-width="scale" style:rel-height="scale">
        <draw:image xlink:href="media/image21.png" xlink:type="simple" xlink:show="embed" xlink:actuate="onLoad"/>
        <svg:title/>
        <svg:desc/>
      </draw:frame>
      <presentation:notes style:page-layout-name="pageLayout2" draw:style-name="a663">
        <draw:frame draw:id="id13" presentation:style-name="a636" draw:name="Header Placeholder 1" svg:x="0in" svg:y="0in" svg:width="3.32222in" svg:height="0.5101in" presentation:class="header" presentation:placeholder="false">
          <draw:text-box>
            <text:p text:style-name="a635" text:class-names="" text:cond-style-name=""><text:span text:style-name="a634" text:class-names=""/></text:p>
          </draw:text-box>
          <svg:title/>
          <svg:desc/>
        </draw:frame>
        <draw:frame draw:id="id14" presentation:style-name="a640" draw:name="Date Placeholder 2" svg:x="4.34267in" svg:y="0in" svg:width="3.32222in" svg:height="0.5101in" presentation:class="date-time" presentation:placeholder="false">
          <draw:text-box>
            <text:p text:style-name="a639" text:class-names="" text:cond-style-name=""><text:span text:style-name="a637" text:class-names=""><text:date text:fixed="false" style:data-style-name="a638">2/15/2026</text:date></text:span></text:p>
          </draw:text-box>
          <svg:title/>
          <svg:desc/>
        </draw:frame>
        <draw:page-thumbnail svg:x="1.54688in" svg:y="1.27083in" svg:width="4.57292in" svg:height="3.43056in" presentation:class="page" draw:id="id15" presentation:style-name="a641" draw:name="Slide Image Placeholder 3">
          <svg:title/>
          <svg:desc/>
        </draw:page-thumbnail>
        <draw:frame draw:id="id16" presentation:style-name="a656" draw:name="Notes Placeholder 4" svg:x="0.76667in" svg:y="4.89271in" svg:width="6.13333in" svg:height="4.00313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5">
              <text:list-item>
                <text:list text:style-name="a655">
                  <text:list-item>
                    <text:list text:style-name="a655">
                      <text:list-item>
                        <text:list text:style-name="a655">
                          <text:list-item>
                            <text:list text:style-name="a655">
                              <text:list-item>
                                <text:p text:style-name="a654" text:class-names="" text:cond-style-name=""><text:span text:style-name="a653" text:class-names="">Fifth level</text:span></text:p>
                              </text:list-item>
                            </text:list>
                          </text:list-item>
                        </text:list>
                      </text:list-item>
                    </text:list>
                  </text:list-item>
                </text:list>
              </text:list-item>
            </text:list>
          </draw:text-box>
          <svg:title/>
          <svg:desc/>
        </draw:frame>
        <draw:frame draw:id="id17" presentation:style-name="a659" draw:name="Footer Placeholder 5" svg:x="0in" svg:y="9.65657in" svg:width="3.32222in" svg:height="0.5101in" presentation:class="footer" presentation:placeholder="false">
          <draw:text-box>
            <text:p text:style-name="a658" text:class-names="" text:cond-style-name=""><text:span text:style-name="a657" text:class-names=""/></text:p>
          </draw:text-box>
          <svg:title/>
          <svg:desc/>
        </draw:frame>
        <draw:frame draw:id="id18" presentation:style-name="a662" draw:name="Slide Number Placeholder 6" svg:x="4.34267in" svg:y="9.65657in" svg:width="3.32222in" svg:height="0.5101in" presentation:class="page-number" presentation:placeholder="false">
          <draw:text-box>
            <text:p text:style-name="a661" text:class-names="" text:cond-style-name=""><text:span text:style-name="a660" text:class-names=""><text:page-number style:num-format="1" text:fixed="false"/></text:span></text:p>
          </draw:text-box>
          <svg:title/>
          <svg:desc/>
        </draw:frame>
      </presentation:notes>
    </style:master-page>
    <style:master-page style:name="Master1-Layout13-cust-Title,-Two-Column,-Header-Bullet-List,-Paragraph" style:page-layout-name="pageLayout1" draw:style-name="a664">
      <draw:frame draw:id="id112" draw:layer="Master1-bg" draw:style-name="a665" draw:name="Picture 31" svg:x="0.12029in" svg:y="7.12207in" svg:width="0.36324in" svg:height="0.27765in" style:rel-width="scale" style:rel-height="scale">
        <draw:image xlink:href="media/image19.png" xlink:type="simple" xlink:show="embed" xlink:actuate="onLoad"/>
        <svg:title/>
        <svg:desc/>
      </draw:frame>
      <draw:g draw:name="Group 13" draw:id="id113">
        <svg:title/>
        <svg:desc/>
        <draw:custom-shape svg:width="0.13823in" svg:height="9.65059in" draw:id="id121" draw:layer="Master1-bg" draw:style-name="a687" draw:transform="translate(-0.06911in -4.82529in) rotate(-1.5708) translate(4.93089in 0.16101in)" draw:name="Rectangle 14">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122" draw:layer="Master1-bg" draw:style-name="a690" draw:name="Rectangle 15">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123" draw:layer="Master1-bg" draw:style-name="a693" draw:name="Rectangle 17">
          <svg:title/>
          <svg:desc/>
          <text:p text:style-name="a692" text:class-names="" text:cond-style-name=""><text:span text:style-name="a691" text:class-names=""/></text:p>
          <draw:enhanced-geometry xmlns:dr3d="urn:oasis:names:tc:opendocument:xmlns:dr3d:1.0" draw:type="non-primitive" svg:viewBox="0 0 21600 21600" draw:enhanced-path="M 0 0 L 21600 0 21600 21600 0 21600 Z N"/>
        </draw:custom-shape>
      </draw:g>
      <draw:custom-shape svg:width="0.13823in" svg:height="9.20063in" draw:id="id114" draw:layer="Master1-bg" draw:style-name="a668" draw:transform="translate(-0.06911in -4.60031in) rotate(-1.5708) translate(5.15586in 7.33714in)" draw:name="Rectangle 6">
        <svg:title/>
        <svg:desc/>
        <text:p text:style-name="a667" text:class-names="" text:cond-style-name=""><text:span text:style-name="a666"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115" draw:layer="Master1-bg" draw:style-name="a671" draw:name="Rectangle 30">
        <svg:title/>
        <svg:desc/>
        <text:p text:style-name="a670" text:class-names="" text:cond-style-name=""><text:span text:style-name="a669"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116" draw:layer="Master1-bg" draw:style-name="a672"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117" draw:layer="Master1-bg" draw:style-name="a673" draw:name="Picture 12" svg:x="8.42949in" svg:y="0.16453in" svg:width="1.38651in" svg:height="0.67125in" style:rel-width="scale" style:rel-height="scale">
        <draw:image xlink:href="media/image21.png" xlink:type="simple" xlink:show="embed" xlink:actuate="onLoad"/>
        <svg:title/>
        <svg:desc/>
      </draw:frame>
      <draw:frame draw:id="id118" presentation:style-name="a677" draw:name="Text Placeholder 3" svg:x="0.63157in" svg:y="2.29807in" svg:width="3.22526in" svg:height="4.18553in" presentation:class="outline" presentation:placeholder="false">
        <draw:text-box>
          <text:list text:style-name="a676">
            <text:list-item>
              <text:p text:style-name="a675" text:class-names="" text:cond-style-name=""><text:span text:style-name="a674" text:class-names="">Edit text</text:span></text:p>
            </text:list-item>
          </text:list>
        </draw:text-box>
        <svg:title/>
        <svg:desc/>
      </draw:frame>
      <draw:frame draw:id="id119" presentation:style-name="a681" draw:name="Text Placeholder 2" svg:x="0.52968in" svg:y="1.44533in" svg:width="3.41656in" svg:height="0.64185in" presentation:class="outline" presentation:placeholder="false">
        <draw:text-box>
          <text:list text:style-name="a680">
            <text:list-item>
              <text:p text:style-name="a679" text:class-names="" text:cond-style-name=""><text:span text:style-name="a678" text:class-names="">Edit text</text:span></text:p>
            </text:list-item>
          </text:list>
        </draw:text-box>
        <svg:title/>
        <svg:desc/>
      </draw:frame>
      <draw:frame draw:id="id120" presentation:style-name="a684" draw:name="Title Placeholder 1" svg:x="1.30303in" svg:y="0.40138in" svg:width="7.2018in" svg:height="0.79856in" presentation:class="title" presentation:placeholder="false">
        <draw:text-box>
          <text:p text:style-name="a683" text:class-names="" text:cond-style-name=""><text:span text:style-name="a682" text:class-names="">Click to edit title</text:span></text:p>
        </draw:text-box>
        <svg:title/>
        <svg:desc/>
      </draw:frame>
      <presentation:notes style:page-layout-name="pageLayout2" draw:style-name="a723">
        <draw:frame draw:id="id13" presentation:style-name="a696" draw:name="Header Placeholder 1" svg:x="0in" svg:y="0in" svg:width="3.32222in" svg:height="0.5101in" presentation:class="header" presentation:placeholder="false">
          <draw:text-box>
            <text:p text:style-name="a695" text:class-names="" text:cond-style-name=""><text:span text:style-name="a694" text:class-names=""/></text:p>
          </draw:text-box>
          <svg:title/>
          <svg:desc/>
        </draw:frame>
        <draw:frame draw:id="id14" presentation:style-name="a700" draw:name="Date Placeholder 2" svg:x="4.34267in" svg:y="0in" svg:width="3.32222in" svg:height="0.5101in" presentation:class="date-time" presentation:placeholder="false">
          <draw:text-box>
            <text:p text:style-name="a699" text:class-names="" text:cond-style-name=""><text:span text:style-name="a697" text:class-names=""><text:date text:fixed="false" style:data-style-name="a698">2/15/2026</text:date></text:span></text:p>
          </draw:text-box>
          <svg:title/>
          <svg:desc/>
        </draw:frame>
        <draw:page-thumbnail svg:x="1.54688in" svg:y="1.27083in" svg:width="4.57292in" svg:height="3.43056in" presentation:class="page" draw:id="id15" presentation:style-name="a701" draw:name="Slide Image Placeholder 3">
          <svg:title/>
          <svg:desc/>
        </draw:page-thumbnail>
        <draw:frame draw:id="id16" presentation:style-name="a716" draw:name="Notes Placeholder 4" svg:x="0.76667in" svg:y="4.89271in" svg:width="6.13333in" svg:height="4.00313in" presentation:class="notes" presentation:placeholder="false">
          <draw:text-box>
            <text:p text:style-name="a703" text:class-names="" text:cond-style-name=""><text:span text:style-name="a702" text:class-names="">Click to edit Master text styles</text:span></text:p>
            <text:list text:style-name="a706">
              <text:list-item>
                <text:list text:style-name="a706">
                  <text:list-item>
                    <text:p text:style-name="a705" text:class-names="" text:cond-style-name=""><text:span text:style-name="a704" text:class-names="">Second level</text:span></text:p>
                  </text:list-item>
                </text:list>
              </text:list-item>
            </text:list>
            <text:list text:style-name="a709">
              <text:list-item>
                <text:list text:style-name="a709">
                  <text:list-item>
                    <text:list text:style-name="a709">
                      <text:list-item>
                        <text:p text:style-name="a708" text:class-names="" text:cond-style-name=""><text:span text:style-name="a707" text:class-names="">Third level</text:span></text:p>
                      </text:list-item>
                    </text:list>
                  </text:list-item>
                </text:list>
              </text:list-item>
            </text:list>
            <text:list text:style-name="a712">
              <text:list-item>
                <text:list text:style-name="a712">
                  <text:list-item>
                    <text:list text:style-name="a712">
                      <text:list-item>
                        <text:list text:style-name="a712">
                          <text:list-item>
                            <text:p text:style-name="a711" text:class-names="" text:cond-style-name=""><text:span text:style-name="a710" text:class-names="">Fourth level</text:span></text:p>
                          </text:list-item>
                        </text:list>
                      </text:list-item>
                    </text:list>
                  </text:list-item>
                </text:list>
              </text:list-item>
            </text:list>
            <text:list text:style-name="a715">
              <text:list-item>
                <text:list text:style-name="a715">
                  <text:list-item>
                    <text:list text:style-name="a715">
                      <text:list-item>
                        <text:list text:style-name="a715">
                          <text:list-item>
                            <text:list text:style-name="a715">
                              <text:list-item>
                                <text:p text:style-name="a714" text:class-names="" text:cond-style-name=""><text:span text:style-name="a713" text:class-names="">Fifth level</text:span></text:p>
                              </text:list-item>
                            </text:list>
                          </text:list-item>
                        </text:list>
                      </text:list-item>
                    </text:list>
                  </text:list-item>
                </text:list>
              </text:list-item>
            </text:list>
          </draw:text-box>
          <svg:title/>
          <svg:desc/>
        </draw:frame>
        <draw:frame draw:id="id17" presentation:style-name="a719" draw:name="Footer Placeholder 5" svg:x="0in" svg:y="9.65657in" svg:width="3.32222in" svg:height="0.5101in" presentation:class="footer" presentation:placeholder="false">
          <draw:text-box>
            <text:p text:style-name="a718" text:class-names="" text:cond-style-name=""><text:span text:style-name="a717" text:class-names=""/></text:p>
          </draw:text-box>
          <svg:title/>
          <svg:desc/>
        </draw:frame>
        <draw:frame draw:id="id18" presentation:style-name="a722" draw:name="Slide Number Placeholder 6" svg:x="4.34267in" svg:y="9.65657in" svg:width="3.32222in" svg:height="0.5101in" presentation:class="page-number" presentation:placeholder="false">
          <draw:text-box>
            <text:p text:style-name="a721" text:class-names="" text:cond-style-name=""><text:span text:style-name="a720" text:class-names=""><text:page-number style:num-format="1" text:fixed="false"/></text:span></text:p>
          </draw:text-box>
          <svg:title/>
          <svg:desc/>
        </draw:frame>
      </presentation:notes>
    </style:master-page>
    <style:master-page style:name="Master1-Layout14-cust-Title,-Two-Column,-Header-Bullet-List,-Photo" style:page-layout-name="pageLayout1" draw:style-name="a724">
      <draw:frame draw:id="id124" draw:layer="Master1-bg" draw:style-name="a725" draw:name="Picture 31" svg:x="0.12029in" svg:y="7.12207in" svg:width="0.36324in" svg:height="0.27765in" style:rel-width="scale" style:rel-height="scale">
        <draw:image xlink:href="media/image19.png" xlink:type="simple" xlink:show="embed" xlink:actuate="onLoad"/>
        <svg:title/>
        <svg:desc/>
      </draw:frame>
      <draw:g draw:name="Group 13" draw:id="id125">
        <svg:title/>
        <svg:desc/>
        <draw:custom-shape svg:width="0.13823in" svg:height="9.65059in" draw:id="id133" draw:layer="Master1-bg" draw:style-name="a746" draw:transform="translate(-0.06911in -4.82529in) rotate(-1.5708) translate(4.93089in 0.16101in)" draw:name="Rectangle 14">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134" draw:layer="Master1-bg" draw:style-name="a749" draw:name="Rectangle 15">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135" draw:layer="Master1-bg" draw:style-name="a752" draw:name="Rectangle 17">
          <svg:title/>
          <svg:desc/>
          <text:p text:style-name="a751" text:class-names="" text:cond-style-name=""><text:span text:style-name="a750" text:class-names=""/></text:p>
          <draw:enhanced-geometry xmlns:dr3d="urn:oasis:names:tc:opendocument:xmlns:dr3d:1.0" draw:type="non-primitive" svg:viewBox="0 0 21600 21600" draw:enhanced-path="M 0 0 L 21600 0 21600 21600 0 21600 Z N"/>
        </draw:custom-shape>
      </draw:g>
      <draw:custom-shape svg:width="0.13823in" svg:height="9.20063in" draw:id="id126" draw:layer="Master1-bg" draw:style-name="a728" draw:transform="translate(-0.06911in -4.60031in) rotate(-1.5708) translate(5.15586in 7.33714in)" draw:name="Rectangle 6">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127" draw:layer="Master1-bg" draw:style-name="a731" draw:name="Rectangle 30">
        <svg:title/>
        <svg:desc/>
        <text:p text:style-name="a730" text:class-names="" text:cond-style-name=""><text:span text:style-name="a729"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128" draw:layer="Master1-bg" draw:style-name="a732"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129" draw:layer="Master1-bg" draw:style-name="a733" draw:name="Picture 12" svg:x="8.42949in" svg:y="0.16453in" svg:width="1.38651in" svg:height="0.67125in" style:rel-width="scale" style:rel-height="scale">
        <draw:image xlink:href="media/image21.png" xlink:type="simple" xlink:show="embed" xlink:actuate="onLoad"/>
        <svg:title/>
        <svg:desc/>
      </draw:frame>
      <draw:frame draw:id="id130" presentation:style-name="a736" draw:name="Slide Number Placeholder 5" svg:x="4.89868in" svg:y="6.77418in" svg:width="0.51437in" svg:height="0.39931in" presentation:class="page-number" presentation:placeholder="false">
        <draw:text-box>
          <text:p text:style-name="a735" text:class-names="" text:cond-style-name=""><text:span text:style-name="a734" text:class-names=""><text:page-number style:num-format="1" text:fixed="false"/></text:span></text:p>
        </draw:text-box>
        <svg:title/>
        <svg:desc/>
      </draw:frame>
      <draw:frame draw:id="id131" presentation:style-name="a740" draw:name="Text Placeholder 2" svg:x="0.52968in" svg:y="1.44533in" svg:width="3.41656in" svg:height="0.64185in" presentation:class="outline" presentation:placeholder="false">
        <draw:text-box>
          <text:list text:style-name="a739">
            <text:list-item>
              <text:p text:style-name="a738" text:class-names="" text:cond-style-name=""><text:span text:style-name="a737" text:class-names="">Edit text</text:span></text:p>
            </text:list-item>
          </text:list>
        </draw:text-box>
        <svg:title/>
        <svg:desc/>
      </draw:frame>
      <draw:frame draw:id="id132" presentation:style-name="a743" draw:name="Title Placeholder 1" svg:x="1.30303in" svg:y="0.40138in" svg:width="7.2018in" svg:height="0.79856in" presentation:class="title" presentation:placeholder="false">
        <draw:text-box>
          <text:p text:style-name="a742" text:class-names="" text:cond-style-name=""><text:span text:style-name="a741" text:class-names="">Click to edit title</text:span></text:p>
        </draw:text-box>
        <svg:title/>
        <svg:desc/>
      </draw:frame>
      <presentation:notes style:page-layout-name="pageLayout2" draw:style-name="a782">
        <draw:frame draw:id="id13" presentation:style-name="a755" draw:name="Header Placeholder 1" svg:x="0in" svg:y="0in" svg:width="3.32222in" svg:height="0.5101in" presentation:class="header" presentation:placeholder="false">
          <draw:text-box>
            <text:p text:style-name="a754" text:class-names="" text:cond-style-name=""><text:span text:style-name="a753" text:class-names=""/></text:p>
          </draw:text-box>
          <svg:title/>
          <svg:desc/>
        </draw:frame>
        <draw:frame draw:id="id14" presentation:style-name="a759" draw:name="Date Placeholder 2" svg:x="4.34267in" svg:y="0in" svg:width="3.32222in" svg:height="0.5101in" presentation:class="date-time" presentation:placeholder="false">
          <draw:text-box>
            <text:p text:style-name="a758" text:class-names="" text:cond-style-name=""><text:span text:style-name="a756" text:class-names=""><text:date text:fixed="false" style:data-style-name="a757">2/15/2026</text:date></text:span></text:p>
          </draw:text-box>
          <svg:title/>
          <svg:desc/>
        </draw:frame>
        <draw:page-thumbnail svg:x="1.54688in" svg:y="1.27083in" svg:width="4.57292in" svg:height="3.43056in" presentation:class="page" draw:id="id15" presentation:style-name="a760" draw:name="Slide Image Placeholder 3">
          <svg:title/>
          <svg:desc/>
        </draw:page-thumbnail>
        <draw:frame draw:id="id16" presentation:style-name="a775" draw:name="Notes Placeholder 4" svg:x="0.76667in" svg:y="4.89271in" svg:width="6.13333in" svg:height="4.00313in" presentation:class="notes" presentation:placeholder="false">
          <draw:text-box>
            <text:p text:style-name="a762" text:class-names="" text:cond-style-name=""><text:span text:style-name="a761" text:class-names="">Click to edit Master text styles</text:span></text:p>
            <text:list text:style-name="a765">
              <text:list-item>
                <text:list text:style-name="a765">
                  <text:list-item>
                    <text:p text:style-name="a764" text:class-names="" text:cond-style-name=""><text:span text:style-name="a763" text:class-names="">Second level</text:span></text:p>
                  </text:list-item>
                </text:list>
              </text:list-item>
            </text:list>
            <text:list text:style-name="a768">
              <text:list-item>
                <text:list text:style-name="a768">
                  <text:list-item>
                    <text:list text:style-name="a768">
                      <text:list-item>
                        <text:p text:style-name="a767" text:class-names="" text:cond-style-name=""><text:span text:style-name="a766" text:class-names="">Third level</text:span></text:p>
                      </text:list-item>
                    </text:list>
                  </text:list-item>
                </text:list>
              </text:list-item>
            </text:list>
            <text:list text:style-name="a771">
              <text:list-item>
                <text:list text:style-name="a771">
                  <text:list-item>
                    <text:list text:style-name="a771">
                      <text:list-item>
                        <text:list text:style-name="a771">
                          <text:list-item>
                            <text:p text:style-name="a770" text:class-names="" text:cond-style-name=""><text:span text:style-name="a769" text:class-names="">Fourth level</text:span></text:p>
                          </text:list-item>
                        </text:list>
                      </text:list-item>
                    </text:list>
                  </text:list-item>
                </text:list>
              </text:list-item>
            </text:list>
            <text:list text:style-name="a774">
              <text:list-item>
                <text:list text:style-name="a774">
                  <text:list-item>
                    <text:list text:style-name="a774">
                      <text:list-item>
                        <text:list text:style-name="a774">
                          <text:list-item>
                            <text:list text:style-name="a774">
                              <text:list-item>
                                <text:p text:style-name="a773" text:class-names="" text:cond-style-name=""><text:span text:style-name="a772" text:class-names="">Fifth level</text:span></text:p>
                              </text:list-item>
                            </text:list>
                          </text:list-item>
                        </text:list>
                      </text:list-item>
                    </text:list>
                  </text:list-item>
                </text:list>
              </text:list-item>
            </text:list>
          </draw:text-box>
          <svg:title/>
          <svg:desc/>
        </draw:frame>
        <draw:frame draw:id="id17" presentation:style-name="a778" draw:name="Footer Placeholder 5" svg:x="0in" svg:y="9.65657in" svg:width="3.32222in" svg:height="0.5101in" presentation:class="footer" presentation:placeholder="false">
          <draw:text-box>
            <text:p text:style-name="a777" text:class-names="" text:cond-style-name=""><text:span text:style-name="a776" text:class-names=""/></text:p>
          </draw:text-box>
          <svg:title/>
          <svg:desc/>
        </draw:frame>
        <draw:frame draw:id="id18" presentation:style-name="a781" draw:name="Slide Number Placeholder 6" svg:x="4.34267in" svg:y="9.65657in" svg:width="3.32222in" svg:height="0.5101in" presentation:class="page-number" presentation:placeholder="false">
          <draw:text-box>
            <text:p text:style-name="a780" text:class-names="" text:cond-style-name=""><text:span text:style-name="a779" text:class-names=""><text:page-number style:num-format="1" text:fixed="false"/></text:span></text:p>
          </draw:text-box>
          <svg:title/>
          <svg:desc/>
        </draw:frame>
      </presentation:notes>
    </style:master-page>
    <style:master-page style:name="Master1-Layout15-cust-Two-Column,-Header-Bullet-List,-Paragraph" style:page-layout-name="pageLayout1" draw:style-name="a783">
      <draw:frame draw:id="id136" draw:layer="Master1-bg" draw:style-name="a784" draw:name="Picture 31" svg:x="0.12029in" svg:y="7.12207in" svg:width="0.36324in" svg:height="0.27765in" style:rel-width="scale" style:rel-height="scale">
        <draw:image xlink:href="media/image19.png" xlink:type="simple" xlink:show="embed" xlink:actuate="onLoad"/>
        <svg:title/>
        <svg:desc/>
      </draw:frame>
      <draw:g draw:name="Group 13" draw:id="id137">
        <svg:title/>
        <svg:desc/>
        <draw:custom-shape svg:width="0.13823in" svg:height="9.65059in" draw:id="id144" draw:layer="Master1-bg" draw:style-name="a802" draw:transform="translate(-0.06911in -4.82529in) rotate(-1.5708) translate(4.93089in 0.16101in)" draw:name="Rectangle 14">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145" draw:layer="Master1-bg" draw:style-name="a805" draw:name="Rectangle 15">
          <svg:title/>
          <svg:desc/>
          <text:p text:style-name="a804" text:class-names="" text:cond-style-name=""><text:span text:style-name="a803"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146" draw:layer="Master1-bg" draw:style-name="a808" draw:name="Rectangle 17">
          <svg:title/>
          <svg:desc/>
          <text:p text:style-name="a807" text:class-names="" text:cond-style-name=""><text:span text:style-name="a806" text:class-names=""/></text:p>
          <draw:enhanced-geometry xmlns:dr3d="urn:oasis:names:tc:opendocument:xmlns:dr3d:1.0" draw:type="non-primitive" svg:viewBox="0 0 21600 21600" draw:enhanced-path="M 0 0 L 21600 0 21600 21600 0 21600 Z N"/>
        </draw:custom-shape>
      </draw:g>
      <draw:custom-shape svg:width="0.13823in" svg:height="9.20063in" draw:id="id138" draw:layer="Master1-bg" draw:style-name="a787" draw:transform="translate(-0.06911in -4.60031in) rotate(-1.5708) translate(5.15586in 7.33714in)" draw:name="Rectangle 6">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139" draw:layer="Master1-bg" draw:style-name="a790" draw:name="Rectangle 30">
        <svg:title/>
        <svg:desc/>
        <text:p text:style-name="a789" text:class-names="" text:cond-style-name=""><text:span text:style-name="a788"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140" draw:layer="Master1-bg" draw:style-name="a791"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141" draw:layer="Master1-bg" draw:style-name="a792" draw:name="Picture 12" svg:x="8.42949in" svg:y="0.16453in" svg:width="1.38651in" svg:height="0.67125in" style:rel-width="scale" style:rel-height="scale">
        <draw:image xlink:href="media/image21.png" xlink:type="simple" xlink:show="embed" xlink:actuate="onLoad"/>
        <svg:title/>
        <svg:desc/>
      </draw:frame>
      <draw:frame draw:id="id142" presentation:style-name="a796" draw:name="Text Placeholder 3" svg:x="0.63157in" svg:y="2.07855in" svg:width="3.22526in" svg:height="4.21115in" presentation:class="outline" presentation:placeholder="false">
        <draw:text-box>
          <text:list text:style-name="a795">
            <text:list-item>
              <text:p text:style-name="a794" text:class-names="" text:cond-style-name=""><text:span text:style-name="a793" text:class-names="">Edit text</text:span></text:p>
            </text:list-item>
          </text:list>
        </draw:text-box>
        <svg:title/>
        <svg:desc/>
      </draw:frame>
      <draw:frame draw:id="id143" presentation:style-name="a799" draw:name="Slide Number Placeholder 5" svg:x="4.89868in" svg:y="6.77418in" svg:width="0.51437in" svg:height="0.39931in" presentation:class="page-number" presentation:placeholder="false">
        <draw:text-box>
          <text:p text:style-name="a798" text:class-names="" text:cond-style-name=""><text:span text:style-name="a797" text:class-names=""><text:page-number style:num-format="1" text:fixed="false"/></text:span></text:p>
        </draw:text-box>
        <svg:title/>
        <svg:desc/>
      </draw:frame>
      <presentation:notes style:page-layout-name="pageLayout2" draw:style-name="a838">
        <draw:frame draw:id="id13" presentation:style-name="a811" draw:name="Header Placeholder 1" svg:x="0in" svg:y="0in" svg:width="3.32222in" svg:height="0.5101in" presentation:class="header" presentation:placeholder="false">
          <draw:text-box>
            <text:p text:style-name="a810" text:class-names="" text:cond-style-name=""><text:span text:style-name="a809" text:class-names=""/></text:p>
          </draw:text-box>
          <svg:title/>
          <svg:desc/>
        </draw:frame>
        <draw:frame draw:id="id14" presentation:style-name="a815" draw:name="Date Placeholder 2" svg:x="4.34267in" svg:y="0in" svg:width="3.32222in" svg:height="0.5101in" presentation:class="date-time" presentation:placeholder="false">
          <draw:text-box>
            <text:p text:style-name="a814" text:class-names="" text:cond-style-name=""><text:span text:style-name="a812" text:class-names=""><text:date text:fixed="false" style:data-style-name="a813">2/15/2026</text:date></text:span></text:p>
          </draw:text-box>
          <svg:title/>
          <svg:desc/>
        </draw:frame>
        <draw:page-thumbnail svg:x="1.54688in" svg:y="1.27083in" svg:width="4.57292in" svg:height="3.43056in" presentation:class="page" draw:id="id15" presentation:style-name="a816" draw:name="Slide Image Placeholder 3">
          <svg:title/>
          <svg:desc/>
        </draw:page-thumbnail>
        <draw:frame draw:id="id16" presentation:style-name="a831" draw:name="Notes Placeholder 4" svg:x="0.76667in" svg:y="4.89271in" svg:width="6.13333in" svg:height="4.00313in" presentation:class="notes" presentation:placeholder="false">
          <draw:text-box>
            <text:p text:style-name="a818" text:class-names="" text:cond-style-name=""><text:span text:style-name="a817" text:class-names="">Click to edit Master text styles</text:span></text:p>
            <text:list text:style-name="a821">
              <text:list-item>
                <text:list text:style-name="a821">
                  <text:list-item>
                    <text:p text:style-name="a820" text:class-names="" text:cond-style-name=""><text:span text:style-name="a819" text:class-names="">Second level</text:span></text:p>
                  </text:list-item>
                </text:list>
              </text:list-item>
            </text:list>
            <text:list text:style-name="a824">
              <text:list-item>
                <text:list text:style-name="a824">
                  <text:list-item>
                    <text:list text:style-name="a824">
                      <text:list-item>
                        <text:p text:style-name="a823" text:class-names="" text:cond-style-name=""><text:span text:style-name="a822" text:class-names="">Third level</text:span></text:p>
                      </text:list-item>
                    </text:list>
                  </text:list-item>
                </text:list>
              </text:list-item>
            </text:list>
            <text:list text:style-name="a827">
              <text:list-item>
                <text:list text:style-name="a827">
                  <text:list-item>
                    <text:list text:style-name="a827">
                      <text:list-item>
                        <text:list text:style-name="a827">
                          <text:list-item>
                            <text:p text:style-name="a826" text:class-names="" text:cond-style-name=""><text:span text:style-name="a825" text:class-names="">Fourth level</text:span></text:p>
                          </text:list-item>
                        </text:list>
                      </text:list-item>
                    </text:list>
                  </text:list-item>
                </text:list>
              </text:list-item>
            </text:list>
            <text:list text:style-name="a830">
              <text:list-item>
                <text:list text:style-name="a830">
                  <text:list-item>
                    <text:list text:style-name="a830">
                      <text:list-item>
                        <text:list text:style-name="a830">
                          <text:list-item>
                            <text:list text:style-name="a830">
                              <text:list-item>
                                <text:p text:style-name="a829" text:class-names="" text:cond-style-name=""><text:span text:style-name="a828" text:class-names="">Fifth level</text:span></text:p>
                              </text:list-item>
                            </text:list>
                          </text:list-item>
                        </text:list>
                      </text:list-item>
                    </text:list>
                  </text:list-item>
                </text:list>
              </text:list-item>
            </text:list>
          </draw:text-box>
          <svg:title/>
          <svg:desc/>
        </draw:frame>
        <draw:frame draw:id="id17" presentation:style-name="a834" draw:name="Footer Placeholder 5" svg:x="0in" svg:y="9.65657in" svg:width="3.32222in" svg:height="0.5101in" presentation:class="footer" presentation:placeholder="false">
          <draw:text-box>
            <text:p text:style-name="a833" text:class-names="" text:cond-style-name=""><text:span text:style-name="a832" text:class-names=""/></text:p>
          </draw:text-box>
          <svg:title/>
          <svg:desc/>
        </draw:frame>
        <draw:frame draw:id="id18" presentation:style-name="a837" draw:name="Slide Number Placeholder 6" svg:x="4.34267in" svg:y="9.65657in" svg:width="3.32222in" svg:height="0.5101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1-Layout16-cust-Two-Column,-Header-Bullet-List,-Photo" style:page-layout-name="pageLayout1" draw:style-name="a839">
      <draw:frame draw:id="id147" draw:layer="Master1-bg" draw:style-name="a840" draw:name="Picture 31" svg:x="0.12029in" svg:y="7.12207in" svg:width="0.36324in" svg:height="0.27765in" style:rel-width="scale" style:rel-height="scale">
        <draw:image xlink:href="media/image19.png" xlink:type="simple" xlink:show="embed" xlink:actuate="onLoad"/>
        <svg:title/>
        <svg:desc/>
      </draw:frame>
      <draw:g draw:name="Group 13" draw:id="id148">
        <svg:title/>
        <svg:desc/>
        <draw:custom-shape svg:width="0.13823in" svg:height="9.65059in" draw:id="id155" draw:layer="Master1-bg" draw:style-name="a859" draw:transform="translate(-0.06911in -4.82529in) rotate(-1.5708) translate(4.93089in 0.16101in)" draw:name="Rectangle 14">
          <svg:title/>
          <svg:desc/>
          <text:p text:style-name="a858" text:class-names="" text:cond-style-name=""><text:span text:style-name="a857"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156" draw:layer="Master1-bg" draw:style-name="a862" draw:name="Rectangle 15">
          <svg:title/>
          <svg:desc/>
          <text:p text:style-name="a861" text:class-names="" text:cond-style-name=""><text:span text:style-name="a860"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157" draw:layer="Master1-bg" draw:style-name="a865" draw:name="Rectangle 17">
          <svg:title/>
          <svg:desc/>
          <text:p text:style-name="a864" text:class-names="" text:cond-style-name=""><text:span text:style-name="a863" text:class-names=""/></text:p>
          <draw:enhanced-geometry xmlns:dr3d="urn:oasis:names:tc:opendocument:xmlns:dr3d:1.0" draw:type="non-primitive" svg:viewBox="0 0 21600 21600" draw:enhanced-path="M 0 0 L 21600 0 21600 21600 0 21600 Z N"/>
        </draw:custom-shape>
      </draw:g>
      <draw:custom-shape svg:width="0.13823in" svg:height="9.20063in" draw:id="id149" draw:layer="Master1-bg" draw:style-name="a843" draw:transform="translate(-0.06911in -4.60031in) rotate(-1.5708) translate(5.15586in 7.33714in)" draw:name="Rectangle 6">
        <svg:title/>
        <svg:desc/>
        <text:p text:style-name="a842" text:class-names="" text:cond-style-name=""><text:span text:style-name="a841"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150" draw:layer="Master1-bg" draw:style-name="a846" draw:name="Rectangle 30">
        <svg:title/>
        <svg:desc/>
        <text:p text:style-name="a845" text:class-names="" text:cond-style-name=""><text:span text:style-name="a844"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151" draw:layer="Master1-bg" draw:style-name="a847"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152" draw:layer="Master1-bg" draw:style-name="a848" draw:name="Picture 12" svg:x="8.42949in" svg:y="0.16453in" svg:width="1.38651in" svg:height="0.67125in" style:rel-width="scale" style:rel-height="scale">
        <draw:image xlink:href="media/image21.png" xlink:type="simple" xlink:show="embed" xlink:actuate="onLoad"/>
        <svg:title/>
        <svg:desc/>
      </draw:frame>
      <draw:frame draw:id="id153" presentation:style-name="a852" draw:name="Text Placeholder 2" svg:x="0.52968in" svg:y="1.13877in" svg:width="3.41656in" svg:height="0.64185in" presentation:class="outline" presentation:placeholder="false">
        <draw:text-box>
          <text:list text:style-name="a851">
            <text:list-item>
              <text:p text:style-name="a850" text:class-names="" text:cond-style-name=""><text:span text:style-name="a849" text:class-names="">Edit text</text:span></text:p>
            </text:list-item>
          </text:list>
        </draw:text-box>
        <svg:title/>
        <svg:desc/>
      </draw:frame>
      <draw:frame draw:id="id154" presentation:style-name="a856" draw:name="Text Placeholder 3" svg:x="0.63157in" svg:y="2.07855in" svg:width="3.22526in" svg:height="4.21115in" presentation:class="outline" presentation:placeholder="false">
        <draw:text-box>
          <text:list text:style-name="a855">
            <text:list-item>
              <text:p text:style-name="a854" text:class-names="" text:cond-style-name=""><text:span text:style-name="a853" text:class-names="">Edit text</text:span></text:p>
            </text:list-item>
          </text:list>
        </draw:text-box>
        <svg:title/>
        <svg:desc/>
      </draw:frame>
      <presentation:notes style:page-layout-name="pageLayout2" draw:style-name="a895">
        <draw:frame draw:id="id13" presentation:style-name="a868" draw:name="Header Placeholder 1" svg:x="0in" svg:y="0in" svg:width="3.32222in" svg:height="0.5101in" presentation:class="header" presentation:placeholder="false">
          <draw:text-box>
            <text:p text:style-name="a867" text:class-names="" text:cond-style-name=""><text:span text:style-name="a866" text:class-names=""/></text:p>
          </draw:text-box>
          <svg:title/>
          <svg:desc/>
        </draw:frame>
        <draw:frame draw:id="id14" presentation:style-name="a872" draw:name="Date Placeholder 2" svg:x="4.34267in" svg:y="0in" svg:width="3.32222in" svg:height="0.5101in" presentation:class="date-time" presentation:placeholder="false">
          <draw:text-box>
            <text:p text:style-name="a871" text:class-names="" text:cond-style-name=""><text:span text:style-name="a869" text:class-names=""><text:date text:fixed="false" style:data-style-name="a870">2/15/2026</text:date></text:span></text:p>
          </draw:text-box>
          <svg:title/>
          <svg:desc/>
        </draw:frame>
        <draw:page-thumbnail svg:x="1.54688in" svg:y="1.27083in" svg:width="4.57292in" svg:height="3.43056in" presentation:class="page" draw:id="id15" presentation:style-name="a873" draw:name="Slide Image Placeholder 3">
          <svg:title/>
          <svg:desc/>
        </draw:page-thumbnail>
        <draw:frame draw:id="id16" presentation:style-name="a888" draw:name="Notes Placeholder 4" svg:x="0.76667in" svg:y="4.89271in" svg:width="6.13333in" svg:height="4.00313in" presentation:class="notes" presentation:placeholder="false">
          <draw:text-box>
            <text:p text:style-name="a875" text:class-names="" text:cond-style-name=""><text:span text:style-name="a874" text:class-names="">Click to edit Master text styles</text:span></text:p>
            <text:list text:style-name="a878">
              <text:list-item>
                <text:list text:style-name="a878">
                  <text:list-item>
                    <text:p text:style-name="a877" text:class-names="" text:cond-style-name=""><text:span text:style-name="a876" text:class-names="">Second level</text:span></text:p>
                  </text:list-item>
                </text:list>
              </text:list-item>
            </text:list>
            <text:list text:style-name="a881">
              <text:list-item>
                <text:list text:style-name="a881">
                  <text:list-item>
                    <text:list text:style-name="a881">
                      <text:list-item>
                        <text:p text:style-name="a880" text:class-names="" text:cond-style-name=""><text:span text:style-name="a879" text:class-names="">Third level</text:span></text:p>
                      </text:list-item>
                    </text:list>
                  </text:list-item>
                </text:list>
              </text:list-item>
            </text:list>
            <text:list text:style-name="a884">
              <text:list-item>
                <text:list text:style-name="a884">
                  <text:list-item>
                    <text:list text:style-name="a884">
                      <text:list-item>
                        <text:list text:style-name="a884">
                          <text:list-item>
                            <text:p text:style-name="a883" text:class-names="" text:cond-style-name=""><text:span text:style-name="a882" text:class-names="">Fourth level</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5" text:class-names="">Fifth level</text:span></text:p>
                              </text:list-item>
                            </text:list>
                          </text:list-item>
                        </text:list>
                      </text:list-item>
                    </text:list>
                  </text:list-item>
                </text:list>
              </text:list-item>
            </text:list>
          </draw:text-box>
          <svg:title/>
          <svg:desc/>
        </draw:frame>
        <draw:frame draw:id="id17" presentation:style-name="a891" draw:name="Footer Placeholder 5" svg:x="0in" svg:y="9.65657in" svg:width="3.32222in" svg:height="0.5101in" presentation:class="footer" presentation:placeholder="false">
          <draw:text-box>
            <text:p text:style-name="a890" text:class-names="" text:cond-style-name=""><text:span text:style-name="a889" text:class-names=""/></text:p>
          </draw:text-box>
          <svg:title/>
          <svg:desc/>
        </draw:frame>
        <draw:frame draw:id="id18" presentation:style-name="a894" draw:name="Slide Number Placeholder 6" svg:x="4.34267in" svg:y="9.65657in" svg:width="3.32222in" svg:height="0.5101in" presentation:class="page-number" presentation:placeholder="false">
          <draw:text-box>
            <text:p text:style-name="a893" text:class-names="" text:cond-style-name=""><text:span text:style-name="a892" text:class-names=""><text:page-number style:num-format="1" text:fixed="false"/></text:span></text:p>
          </draw:text-box>
          <svg:title/>
          <svg:desc/>
        </draw:frame>
      </presentation:notes>
    </style:master-page>
    <style:master-page style:name="Master1-Layout17-cust-Title,-Horizontal-Icon,-Header,-Paragraph" style:page-layout-name="pageLayout1" draw:style-name="a896">
      <draw:frame draw:id="id158" draw:layer="Master1-bg" draw:style-name="a897" draw:name="Picture 31" svg:x="0.12029in" svg:y="7.12207in" svg:width="0.36324in" svg:height="0.27765in" style:rel-width="scale" style:rel-height="scale">
        <draw:image xlink:href="media/image19.png" xlink:type="simple" xlink:show="embed" xlink:actuate="onLoad"/>
        <svg:title/>
        <svg:desc/>
      </draw:frame>
      <draw:g draw:name="Group 13" draw:id="id159">
        <svg:title/>
        <svg:desc/>
        <draw:custom-shape svg:width="0.13823in" svg:height="9.65059in" draw:id="id173" draw:layer="Master1-bg" draw:style-name="a940" draw:transform="translate(-0.06911in -4.82529in) rotate(-1.5708) translate(4.93089in 0.16101in)" draw:name="Rectangle 14">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174" draw:layer="Master1-bg" draw:style-name="a943" draw:name="Rectangle 15">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175" draw:layer="Master1-bg" draw:style-name="a946" draw:name="Rectangle 17">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custom-shape>
      </draw:g>
      <draw:custom-shape svg:width="0.13823in" svg:height="9.20063in" draw:id="id160" draw:layer="Master1-bg" draw:style-name="a900" draw:transform="translate(-0.06911in -4.60031in) rotate(-1.5708) translate(5.15586in 7.33714in)" draw:name="Rectangle 6">
        <svg:title/>
        <svg:desc/>
        <text:p text:style-name="a899" text:class-names="" text:cond-style-name=""><text:span text:style-name="a898"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161" draw:layer="Master1-bg" draw:style-name="a903" draw:name="Rectangle 30">
        <svg:title/>
        <svg:desc/>
        <text:p text:style-name="a902" text:class-names="" text:cond-style-name=""><text:span text:style-name="a901"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162" draw:layer="Master1-bg" draw:style-name="a904"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163" draw:layer="Master1-bg" draw:style-name="a905" draw:name="Picture 12" svg:x="8.42949in" svg:y="0.16453in" svg:width="1.38651in" svg:height="0.67125in" style:rel-width="scale" style:rel-height="scale">
        <draw:image xlink:href="media/image21.png" xlink:type="simple" xlink:show="embed" xlink:actuate="onLoad"/>
        <svg:title/>
        <svg:desc/>
      </draw:frame>
      <draw:frame draw:id="id164" presentation:style-name="a909" draw:name="Text Placeholder 46" svg:x="0.12946in" svg:y="2.96599in" svg:width="2.23589in" svg:height="0.43929in" presentation:class="outline" presentation:placeholder="false">
        <draw:text-box>
          <text:list text:style-name="a908">
            <text:list-item>
              <text:p text:style-name="a907" text:class-names="" text:cond-style-name=""><text:span text:style-name="a906" text:class-names="">Click to edit title</text:span></text:p>
            </text:list-item>
          </text:list>
        </draw:text-box>
        <svg:title/>
        <svg:desc/>
      </draw:frame>
      <draw:frame draw:id="id165" presentation:style-name="a913" draw:name="Text Placeholder 3" svg:x="7.60916in" svg:y="3.52848in" svg:width="2.26138in" svg:height="2.12712in" presentation:class="outline" presentation:placeholder="false">
        <draw:text-box>
          <text:list text:style-name="a912">
            <text:list-item>
              <text:p text:style-name="a911" text:class-names="" text:cond-style-name=""><text:span text:style-name="a910" text:class-names="">Edit text</text:span></text:p>
            </text:list-item>
          </text:list>
        </draw:text-box>
        <svg:title/>
        <svg:desc/>
      </draw:frame>
      <draw:frame draw:id="id166" presentation:style-name="a916" draw:name="Picture Placeholder 2" svg:x="8.31637in" svg:y="1.90213in" svg:width="0.84696in" svg:height="0.89169in" presentation:class="graphic" presentation:placeholder="false">
        <draw:text-box>
          <text:p text:style-name="a915" text:class-names="" text:cond-style-name=""><text:span text:style-name="a914" text:class-names="">Click icon to add picture</text:span></text:p>
        </draw:text-box>
        <svg:title/>
        <svg:desc/>
      </draw:frame>
      <draw:frame draw:id="id167" presentation:style-name="a920" draw:name="Text Placeholder 46" svg:x="7.60916in" svg:y="2.97391in" svg:width="2.26138in" svg:height="0.43929in" presentation:class="outline" presentation:placeholder="false">
        <draw:text-box>
          <text:list text:style-name="a919">
            <text:list-item>
              <text:p text:style-name="a918" text:class-names="" text:cond-style-name=""><text:span text:style-name="a917" text:class-names="">Click to edit title</text:span></text:p>
            </text:list-item>
          </text:list>
        </draw:text-box>
        <svg:title/>
        <svg:desc/>
      </draw:frame>
      <draw:frame draw:id="id168" presentation:style-name="a924" draw:name="Text Placeholder 3" svg:x="5.1039in" svg:y="3.52848in" svg:width="2.25393in" svg:height="2.12712in" presentation:class="outline" presentation:placeholder="false">
        <draw:text-box>
          <text:list text:style-name="a923">
            <text:list-item>
              <text:p text:style-name="a922" text:class-names="" text:cond-style-name=""><text:span text:style-name="a921" text:class-names="">Edit text</text:span></text:p>
            </text:list-item>
          </text:list>
        </draw:text-box>
        <svg:title/>
        <svg:desc/>
      </draw:frame>
      <draw:frame draw:id="id169" presentation:style-name="a927" draw:name="Picture Placeholder 2" svg:x="5.82025in" svg:y="1.90213in" svg:width="0.84696in" svg:height="0.89169in" presentation:class="graphic" presentation:placeholder="false">
        <draw:text-box>
          <text:p text:style-name="a926" text:class-names="" text:cond-style-name=""><text:span text:style-name="a925" text:class-names="">Click icon to add picture</text:span></text:p>
        </draw:text-box>
        <svg:title/>
        <svg:desc/>
      </draw:frame>
      <draw:frame draw:id="id170" presentation:style-name="a931" draw:name="Text Placeholder 46" svg:x="5.11677in" svg:y="2.97391in" svg:width="2.25393in" svg:height="0.43929in" presentation:class="outline" presentation:placeholder="false">
        <draw:text-box>
          <text:list text:style-name="a930">
            <text:list-item>
              <text:p text:style-name="a929" text:class-names="" text:cond-style-name=""><text:span text:style-name="a928" text:class-names="">Click to edit title</text:span></text:p>
            </text:list-item>
          </text:list>
        </draw:text-box>
        <svg:title/>
        <svg:desc/>
      </draw:frame>
      <draw:frame draw:id="id171" presentation:style-name="a934" draw:name="Slide Number Placeholder 5" svg:x="4.89868in" svg:y="6.77418in" svg:width="0.51437in" svg:height="0.39931in" presentation:class="page-number" presentation:placeholder="false">
        <draw:text-box>
          <text:p text:style-name="a933" text:class-names="" text:cond-style-name=""><text:span text:style-name="a932" text:class-names=""><text:page-number style:num-format="1" text:fixed="false"/></text:span></text:p>
        </draw:text-box>
        <svg:title/>
        <svg:desc/>
      </draw:frame>
      <draw:frame draw:id="id172" presentation:style-name="a937" draw:name="Title Placeholder 1" svg:x="1.30303in" svg:y="0.40138in" svg:width="7.2018in" svg:height="0.79856in" presentation:class="title" presentation:placeholder="false">
        <draw:text-box>
          <text:p text:style-name="a936" text:class-names="" text:cond-style-name=""><text:span text:style-name="a935" text:class-names="">Click to edit title</text:span></text:p>
        </draw:text-box>
        <svg:title/>
        <svg:desc/>
      </draw:frame>
      <presentation:notes style:page-layout-name="pageLayout2" draw:style-name="a976">
        <draw:frame draw:id="id13" presentation:style-name="a949" draw:name="Header Placeholder 1" svg:x="0in" svg:y="0in" svg:width="3.32222in" svg:height="0.5101in" presentation:class="header" presentation:placeholder="false">
          <draw:text-box>
            <text:p text:style-name="a948" text:class-names="" text:cond-style-name=""><text:span text:style-name="a947" text:class-names=""/></text:p>
          </draw:text-box>
          <svg:title/>
          <svg:desc/>
        </draw:frame>
        <draw:frame draw:id="id14" presentation:style-name="a953" draw:name="Date Placeholder 2" svg:x="4.34267in" svg:y="0in" svg:width="3.32222in" svg:height="0.5101in" presentation:class="date-time" presentation:placeholder="false">
          <draw:text-box>
            <text:p text:style-name="a952" text:class-names="" text:cond-style-name=""><text:span text:style-name="a950" text:class-names=""><text:date text:fixed="false" style:data-style-name="a951">2/15/2026</text:date></text:span></text:p>
          </draw:text-box>
          <svg:title/>
          <svg:desc/>
        </draw:frame>
        <draw:page-thumbnail svg:x="1.54688in" svg:y="1.27083in" svg:width="4.57292in" svg:height="3.43056in" presentation:class="page" draw:id="id15" presentation:style-name="a954" draw:name="Slide Image Placeholder 3">
          <svg:title/>
          <svg:desc/>
        </draw:page-thumbnail>
        <draw:frame draw:id="id16" presentation:style-name="a969" draw:name="Notes Placeholder 4" svg:x="0.76667in" svg:y="4.89271in" svg:width="6.13333in" svg:height="4.00313in" presentation:class="notes" presentation:placeholder="false">
          <draw:text-box>
            <text:p text:style-name="a956" text:class-names="" text:cond-style-name=""><text:span text:style-name="a955" text:class-names="">Click to edit Master text styles</text:span></text:p>
            <text:list text:style-name="a959">
              <text:list-item>
                <text:list text:style-name="a959">
                  <text:list-item>
                    <text:p text:style-name="a958" text:class-names="" text:cond-style-name=""><text:span text:style-name="a957" text:class-names="">Second level</text:span></text:p>
                  </text:list-item>
                </text:list>
              </text:list-item>
            </text:list>
            <text:list text:style-name="a962">
              <text:list-item>
                <text:list text:style-name="a962">
                  <text:list-item>
                    <text:list text:style-name="a962">
                      <text:list-item>
                        <text:p text:style-name="a961" text:class-names="" text:cond-style-name=""><text:span text:style-name="a960" text:class-names="">Third level</text:span></text:p>
                      </text:list-item>
                    </text:list>
                  </text:list-item>
                </text:list>
              </text:list-item>
            </text:list>
            <text:list text:style-name="a965">
              <text:list-item>
                <text:list text:style-name="a965">
                  <text:list-item>
                    <text:list text:style-name="a965">
                      <text:list-item>
                        <text:list text:style-name="a965">
                          <text:list-item>
                            <text:p text:style-name="a964" text:class-names="" text:cond-style-name=""><text:span text:style-name="a963" text:class-names="">Fourth level</text:span></text:p>
                          </text:list-item>
                        </text:list>
                      </text:list-item>
                    </text:list>
                  </text:list-item>
                </text:list>
              </text:list-item>
            </text:list>
            <text:list text:style-name="a968">
              <text:list-item>
                <text:list text:style-name="a968">
                  <text:list-item>
                    <text:list text:style-name="a968">
                      <text:list-item>
                        <text:list text:style-name="a968">
                          <text:list-item>
                            <text:list text:style-name="a968">
                              <text:list-item>
                                <text:p text:style-name="a967" text:class-names="" text:cond-style-name=""><text:span text:style-name="a966" text:class-names="">Fifth level</text:span></text:p>
                              </text:list-item>
                            </text:list>
                          </text:list-item>
                        </text:list>
                      </text:list-item>
                    </text:list>
                  </text:list-item>
                </text:list>
              </text:list-item>
            </text:list>
          </draw:text-box>
          <svg:title/>
          <svg:desc/>
        </draw:frame>
        <draw:frame draw:id="id17" presentation:style-name="a972" draw:name="Footer Placeholder 5" svg:x="0in" svg:y="9.65657in" svg:width="3.32222in" svg:height="0.5101in" presentation:class="footer" presentation:placeholder="false">
          <draw:text-box>
            <text:p text:style-name="a971" text:class-names="" text:cond-style-name=""><text:span text:style-name="a970" text:class-names=""/></text:p>
          </draw:text-box>
          <svg:title/>
          <svg:desc/>
        </draw:frame>
        <draw:frame draw:id="id18" presentation:style-name="a975" draw:name="Slide Number Placeholder 6" svg:x="4.34267in" svg:y="9.65657in" svg:width="3.32222in" svg:height="0.5101in" presentation:class="page-number" presentation:placeholder="false">
          <draw:text-box>
            <text:p text:style-name="a974" text:class-names="" text:cond-style-name=""><text:span text:style-name="a973" text:class-names=""><text:page-number style:num-format="1" text:fixed="false"/></text:span></text:p>
          </draw:text-box>
          <svg:title/>
          <svg:desc/>
        </draw:frame>
      </presentation:notes>
    </style:master-page>
    <style:master-page style:name="Master1-Layout18-cust-Horizontal-Icon,-Header,-Paragraph" style:page-layout-name="pageLayout1" draw:style-name="a977">
      <draw:frame draw:id="id176" draw:layer="Master1-bg" draw:style-name="a978" draw:name="Picture 31" svg:x="0.12029in" svg:y="7.12207in" svg:width="0.36324in" svg:height="0.27765in" style:rel-width="scale" style:rel-height="scale">
        <draw:image xlink:href="media/image19.png" xlink:type="simple" xlink:show="embed" xlink:actuate="onLoad"/>
        <svg:title/>
        <svg:desc/>
      </draw:frame>
      <draw:g draw:name="Group 13" draw:id="id177">
        <svg:title/>
        <svg:desc/>
        <draw:custom-shape svg:width="0.13823in" svg:height="9.65059in" draw:id="id190" draw:layer="Master1-bg" draw:style-name="a1018" draw:transform="translate(-0.06911in -4.82529in) rotate(-1.5708) translate(4.93089in 0.16101in)" draw:name="Rectangle 14">
          <svg:title/>
          <svg:desc/>
          <text:p text:style-name="a1017" text:class-names="" text:cond-style-name=""><text:span text:style-name="a1016"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191" draw:layer="Master1-bg" draw:style-name="a1021" draw:name="Rectangle 15">
          <svg:title/>
          <svg:desc/>
          <text:p text:style-name="a1020" text:class-names="" text:cond-style-name=""><text:span text:style-name="a1019"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192" draw:layer="Master1-bg" draw:style-name="a1024" draw:name="Rectangle 17">
          <svg:title/>
          <svg:desc/>
          <text:p text:style-name="a1023" text:class-names="" text:cond-style-name=""><text:span text:style-name="a1022" text:class-names=""/></text:p>
          <draw:enhanced-geometry xmlns:dr3d="urn:oasis:names:tc:opendocument:xmlns:dr3d:1.0" draw:type="non-primitive" svg:viewBox="0 0 21600 21600" draw:enhanced-path="M 0 0 L 21600 0 21600 21600 0 21600 Z N"/>
        </draw:custom-shape>
      </draw:g>
      <draw:custom-shape svg:width="0.13823in" svg:height="9.20063in" draw:id="id178" draw:layer="Master1-bg" draw:style-name="a981" draw:transform="translate(-0.06911in -4.60031in) rotate(-1.5708) translate(5.15586in 7.33714in)" draw:name="Rectangle 6">
        <svg:title/>
        <svg:desc/>
        <text:p text:style-name="a980" text:class-names="" text:cond-style-name=""><text:span text:style-name="a979"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179" draw:layer="Master1-bg" draw:style-name="a984" draw:name="Rectangle 30">
        <svg:title/>
        <svg:desc/>
        <text:p text:style-name="a983" text:class-names="" text:cond-style-name=""><text:span text:style-name="a982"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180" draw:layer="Master1-bg" draw:style-name="a985"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181" draw:layer="Master1-bg" draw:style-name="a986" draw:name="Picture 12" svg:x="8.42949in" svg:y="0.16453in" svg:width="1.38651in" svg:height="0.67125in" style:rel-width="scale" style:rel-height="scale">
        <draw:image xlink:href="media/image21.png" xlink:type="simple" xlink:show="embed" xlink:actuate="onLoad"/>
        <svg:title/>
        <svg:desc/>
      </draw:frame>
      <draw:frame draw:id="id182" presentation:style-name="a990" draw:name="Text Placeholder 46" svg:x="0.12946in" svg:y="2.77244in" svg:width="2.23589in" svg:height="0.43929in" presentation:class="outline" presentation:placeholder="false">
        <draw:text-box>
          <text:list text:style-name="a989">
            <text:list-item>
              <text:p text:style-name="a988" text:class-names="" text:cond-style-name=""><text:span text:style-name="a987" text:class-names="">Click to edit title</text:span></text:p>
            </text:list-item>
          </text:list>
        </draw:text-box>
        <svg:title/>
        <svg:desc/>
      </draw:frame>
      <draw:frame draw:id="id183" presentation:style-name="a994" draw:name="Text Placeholder 3" svg:x="7.60916in" svg:y="3.33494in" svg:width="2.26138in" svg:height="2.12712in" presentation:class="outline" presentation:placeholder="false">
        <draw:text-box>
          <text:list text:style-name="a993">
            <text:list-item>
              <text:p text:style-name="a992" text:class-names="" text:cond-style-name=""><text:span text:style-name="a991" text:class-names="">Edit Master text</text:span></text:p>
            </text:list-item>
          </text:list>
        </draw:text-box>
        <svg:title/>
        <svg:desc/>
      </draw:frame>
      <draw:frame draw:id="id184" presentation:style-name="a997" draw:name="Picture Placeholder 2" svg:x="8.31637in" svg:y="1.70858in" svg:width="0.84696in" svg:height="0.89169in" presentation:class="graphic" presentation:placeholder="false">
        <draw:text-box>
          <text:p text:style-name="a996" text:class-names="" text:cond-style-name=""><text:span text:style-name="a995" text:class-names="">Click icon to add picture</text:span></text:p>
        </draw:text-box>
        <svg:title/>
        <svg:desc/>
      </draw:frame>
      <draw:frame draw:id="id185" presentation:style-name="a1001" draw:name="Text Placeholder 46" svg:x="7.60916in" svg:y="2.78036in" svg:width="2.26138in" svg:height="0.43929in" presentation:class="outline" presentation:placeholder="false">
        <draw:text-box>
          <text:list text:style-name="a1000">
            <text:list-item>
              <text:p text:style-name="a999" text:class-names="" text:cond-style-name=""><text:span text:style-name="a998" text:class-names="">Click to edit title</text:span></text:p>
            </text:list-item>
          </text:list>
        </draw:text-box>
        <svg:title/>
        <svg:desc/>
      </draw:frame>
      <draw:frame draw:id="id186" presentation:style-name="a1005" draw:name="Text Placeholder 3" svg:x="5.1039in" svg:y="3.33494in" svg:width="2.25393in" svg:height="2.12712in" presentation:class="outline" presentation:placeholder="false">
        <draw:text-box>
          <text:list text:style-name="a1004">
            <text:list-item>
              <text:p text:style-name="a1003" text:class-names="" text:cond-style-name=""><text:span text:style-name="a1002" text:class-names="">Edit text</text:span></text:p>
            </text:list-item>
          </text:list>
        </draw:text-box>
        <svg:title/>
        <svg:desc/>
      </draw:frame>
      <draw:frame draw:id="id187" presentation:style-name="a1008" draw:name="Picture Placeholder 2" svg:x="5.82025in" svg:y="1.70858in" svg:width="0.84696in" svg:height="0.89169in" presentation:class="graphic" presentation:placeholder="false">
        <draw:text-box>
          <text:p text:style-name="a1007" text:class-names="" text:cond-style-name=""><text:span text:style-name="a1006" text:class-names="">Click icon to add picture</text:span></text:p>
        </draw:text-box>
        <svg:title/>
        <svg:desc/>
      </draw:frame>
      <draw:frame draw:id="id188" presentation:style-name="a1012" draw:name="Text Placeholder 46" svg:x="5.11677in" svg:y="2.78036in" svg:width="2.25393in" svg:height="0.43929in" presentation:class="outline" presentation:placeholder="false">
        <draw:text-box>
          <text:list text:style-name="a1011">
            <text:list-item>
              <text:p text:style-name="a1010" text:class-names="" text:cond-style-name=""><text:span text:style-name="a1009" text:class-names="">Click to edit title</text:span></text:p>
            </text:list-item>
          </text:list>
        </draw:text-box>
        <svg:title/>
        <svg:desc/>
      </draw:frame>
      <draw:frame draw:id="id189" presentation:style-name="a1015" draw:name="Slide Number Placeholder 5" svg:x="4.89868in" svg:y="6.77418in" svg:width="0.51437in" svg:height="0.39931in" presentation:class="page-number" presentation:placeholder="false">
        <draw:text-box>
          <text:p text:style-name="a1014" text:class-names="" text:cond-style-name=""><text:span text:style-name="a1013" text:class-names=""><text:page-number style:num-format="1" text:fixed="false"/></text:span></text:p>
        </draw:text-box>
        <svg:title/>
        <svg:desc/>
      </draw:frame>
      <presentation:notes style:page-layout-name="pageLayout2" draw:style-name="a1054">
        <draw:frame draw:id="id13" presentation:style-name="a1027" draw:name="Header Placeholder 1" svg:x="0in" svg:y="0in" svg:width="3.32222in" svg:height="0.5101in" presentation:class="header" presentation:placeholder="false">
          <draw:text-box>
            <text:p text:style-name="a1026" text:class-names="" text:cond-style-name=""><text:span text:style-name="a1025" text:class-names=""/></text:p>
          </draw:text-box>
          <svg:title/>
          <svg:desc/>
        </draw:frame>
        <draw:frame draw:id="id14" presentation:style-name="a1031" draw:name="Date Placeholder 2" svg:x="4.34267in" svg:y="0in" svg:width="3.32222in" svg:height="0.5101in" presentation:class="date-time" presentation:placeholder="false">
          <draw:text-box>
            <text:p text:style-name="a1030" text:class-names="" text:cond-style-name=""><text:span text:style-name="a1028" text:class-names=""><text:date text:fixed="false" style:data-style-name="a1029">2/15/2026</text:date></text:span></text:p>
          </draw:text-box>
          <svg:title/>
          <svg:desc/>
        </draw:frame>
        <draw:page-thumbnail svg:x="1.54688in" svg:y="1.27083in" svg:width="4.57292in" svg:height="3.43056in" presentation:class="page" draw:id="id15" presentation:style-name="a1032" draw:name="Slide Image Placeholder 3">
          <svg:title/>
          <svg:desc/>
        </draw:page-thumbnail>
        <draw:frame draw:id="id16" presentation:style-name="a1047" draw:name="Notes Placeholder 4" svg:x="0.76667in" svg:y="4.89271in" svg:width="6.13333in" svg:height="4.00313in" presentation:class="notes" presentation:placeholder="false">
          <draw:text-box>
            <text:p text:style-name="a1034" text:class-names="" text:cond-style-name=""><text:span text:style-name="a1033" text:class-names="">Click to edit Master text styles</text:span></text:p>
            <text:list text:style-name="a1037">
              <text:list-item>
                <text:list text:style-name="a1037">
                  <text:list-item>
                    <text:p text:style-name="a1036" text:class-names="" text:cond-style-name=""><text:span text:style-name="a1035" text:class-names="">Second level</text:span></text:p>
                  </text:list-item>
                </text:list>
              </text:list-item>
            </text:list>
            <text:list text:style-name="a1040">
              <text:list-item>
                <text:list text:style-name="a1040">
                  <text:list-item>
                    <text:list text:style-name="a1040">
                      <text:list-item>
                        <text:p text:style-name="a1039" text:class-names="" text:cond-style-name=""><text:span text:style-name="a1038" text:class-names="">Third level</text:span></text:p>
                      </text:list-item>
                    </text:list>
                  </text:list-item>
                </text:list>
              </text:list-item>
            </text:list>
            <text:list text:style-name="a1043">
              <text:list-item>
                <text:list text:style-name="a1043">
                  <text:list-item>
                    <text:list text:style-name="a1043">
                      <text:list-item>
                        <text:list text:style-name="a1043">
                          <text:list-item>
                            <text:p text:style-name="a1042" text:class-names="" text:cond-style-name=""><text:span text:style-name="a1041" text:class-names="">Fourth level</text:span></text:p>
                          </text:list-item>
                        </text:list>
                      </text:list-item>
                    </text:list>
                  </text:list-item>
                </text:list>
              </text:list-item>
            </text:list>
            <text:list text:style-name="a1046">
              <text:list-item>
                <text:list text:style-name="a1046">
                  <text:list-item>
                    <text:list text:style-name="a1046">
                      <text:list-item>
                        <text:list text:style-name="a1046">
                          <text:list-item>
                            <text:list text:style-name="a1046">
                              <text:list-item>
                                <text:p text:style-name="a1045" text:class-names="" text:cond-style-name=""><text:span text:style-name="a1044" text:class-names="">Fifth level</text:span></text:p>
                              </text:list-item>
                            </text:list>
                          </text:list-item>
                        </text:list>
                      </text:list-item>
                    </text:list>
                  </text:list-item>
                </text:list>
              </text:list-item>
            </text:list>
          </draw:text-box>
          <svg:title/>
          <svg:desc/>
        </draw:frame>
        <draw:frame draw:id="id17" presentation:style-name="a1050" draw:name="Footer Placeholder 5" svg:x="0in" svg:y="9.65657in" svg:width="3.32222in" svg:height="0.5101in" presentation:class="footer" presentation:placeholder="false">
          <draw:text-box>
            <text:p text:style-name="a1049" text:class-names="" text:cond-style-name=""><text:span text:style-name="a1048" text:class-names=""/></text:p>
          </draw:text-box>
          <svg:title/>
          <svg:desc/>
        </draw:frame>
        <draw:frame draw:id="id18" presentation:style-name="a1053" draw:name="Slide Number Placeholder 6" svg:x="4.34267in" svg:y="9.65657in" svg:width="3.32222in" svg:height="0.5101in" presentation:class="page-number" presentation:placeholder="false">
          <draw:text-box>
            <text:p text:style-name="a1052" text:class-names="" text:cond-style-name=""><text:span text:style-name="a1051" text:class-names=""><text:page-number style:num-format="1" text:fixed="false"/></text:span></text:p>
          </draw:text-box>
          <svg:title/>
          <svg:desc/>
        </draw:frame>
      </presentation:notes>
    </style:master-page>
    <style:master-page style:name="Master1-Layout19-cust-Title,-Vertical-Icon,-Header,-Paragraph" style:page-layout-name="pageLayout1" draw:style-name="a1055">
      <draw:frame draw:id="id193" draw:layer="Master1-bg" draw:style-name="a1056" draw:name="Picture 31" svg:x="0.12029in" svg:y="7.12207in" svg:width="0.36324in" svg:height="0.27765in" style:rel-width="scale" style:rel-height="scale">
        <draw:image xlink:href="media/image19.png" xlink:type="simple" xlink:show="embed" xlink:actuate="onLoad"/>
        <svg:title/>
        <svg:desc/>
      </draw:frame>
      <draw:g draw:name="Group 13" draw:id="id194">
        <svg:title/>
        <svg:desc/>
        <draw:custom-shape svg:width="0.13823in" svg:height="9.65059in" draw:id="id208" draw:layer="Master1-bg" draw:style-name="a1099" draw:transform="translate(-0.06911in -4.82529in) rotate(-1.5708) translate(4.93089in 0.16101in)" draw:name="Rectangle 14">
          <svg:title/>
          <svg:desc/>
          <text:p text:style-name="a1098" text:class-names="" text:cond-style-name=""><text:span text:style-name="a1097"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209" draw:layer="Master1-bg" draw:style-name="a1102" draw:name="Rectangle 15">
          <svg:title/>
          <svg:desc/>
          <text:p text:style-name="a1101" text:class-names="" text:cond-style-name=""><text:span text:style-name="a1100"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210" draw:layer="Master1-bg" draw:style-name="a1105" draw:name="Rectangle 17">
          <svg:title/>
          <svg:desc/>
          <text:p text:style-name="a1104" text:class-names="" text:cond-style-name=""><text:span text:style-name="a1103" text:class-names=""/></text:p>
          <draw:enhanced-geometry xmlns:dr3d="urn:oasis:names:tc:opendocument:xmlns:dr3d:1.0" draw:type="non-primitive" svg:viewBox="0 0 21600 21600" draw:enhanced-path="M 0 0 L 21600 0 21600 21600 0 21600 Z N"/>
        </draw:custom-shape>
      </draw:g>
      <draw:custom-shape svg:width="0.13823in" svg:height="9.20063in" draw:id="id195" draw:layer="Master1-bg" draw:style-name="a1059" draw:transform="translate(-0.06911in -4.60031in) rotate(-1.5708) translate(5.15586in 7.33714in)" draw:name="Rectangle 6">
        <svg:title/>
        <svg:desc/>
        <text:p text:style-name="a1058" text:class-names="" text:cond-style-name=""><text:span text:style-name="a1057"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196" draw:layer="Master1-bg" draw:style-name="a1062" draw:name="Rectangle 30">
        <svg:title/>
        <svg:desc/>
        <text:p text:style-name="a1061" text:class-names="" text:cond-style-name=""><text:span text:style-name="a1060"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197" draw:layer="Master1-bg" draw:style-name="a1063"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198" draw:layer="Master1-bg" draw:style-name="a1064" draw:name="Picture 12" svg:x="8.42949in" svg:y="0.16453in" svg:width="1.38651in" svg:height="0.67125in" style:rel-width="scale" style:rel-height="scale">
        <draw:image xlink:href="media/image21.png" xlink:type="simple" xlink:show="embed" xlink:actuate="onLoad"/>
        <svg:title/>
        <svg:desc/>
      </draw:frame>
      <draw:frame draw:id="id199" presentation:style-name="a1068" draw:name="Text Placeholder 46" svg:x="2.40411in" svg:y="3.02462in" svg:width="6.60856in" svg:height="0.32299in" presentation:class="outline" presentation:placeholder="false">
        <draw:text-box>
          <text:list text:style-name="a1067">
            <text:list-item>
              <text:p text:style-name="a1066" text:class-names="" text:cond-style-name=""><text:span text:style-name="a1065" text:class-names="">Click to edit title</text:span></text:p>
            </text:list-item>
          </text:list>
        </draw:text-box>
        <svg:title/>
        <svg:desc/>
      </draw:frame>
      <draw:frame draw:id="id200" presentation:style-name="a1072" draw:name="Text Placeholder 3" svg:x="2.40411in" svg:y="4.70623in" svg:width="6.60856in" svg:height="0.5567in" presentation:class="outline" presentation:placeholder="false">
        <draw:text-box>
          <text:list text:style-name="a1071">
            <text:list-item>
              <text:p text:style-name="a1070" text:class-names="" text:cond-style-name=""><text:span text:style-name="a1069" text:class-names="">Edit text</text:span></text:p>
            </text:list-item>
          </text:list>
        </draw:text-box>
        <svg:title/>
        <svg:desc/>
      </draw:frame>
      <draw:frame draw:id="id201" presentation:style-name="a1075" draw:name="Picture Placeholder 2" svg:x="0.88163in" svg:y="4.37428in" svg:width="0.84696in" svg:height="0.89169in" presentation:class="graphic" presentation:placeholder="false">
        <draw:text-box>
          <text:p text:style-name="a1074" text:class-names="" text:cond-style-name=""><text:span text:style-name="a1073" text:class-names="">Click icon to add picture</text:span></text:p>
        </draw:text-box>
        <svg:title/>
        <svg:desc/>
      </draw:frame>
      <draw:frame draw:id="id202" presentation:style-name="a1079" draw:name="Text Placeholder 46" svg:x="2.40411in" svg:y="4.37163in" svg:width="6.60856in" svg:height="0.32299in" presentation:class="outline" presentation:placeholder="false">
        <draw:text-box>
          <text:list text:style-name="a1078">
            <text:list-item>
              <text:p text:style-name="a1077" text:class-names="" text:cond-style-name=""><text:span text:style-name="a1076" text:class-names="">Click to edit title</text:span></text:p>
            </text:list-item>
          </text:list>
        </draw:text-box>
        <svg:title/>
        <svg:desc/>
      </draw:frame>
      <draw:frame draw:id="id203" presentation:style-name="a1083" draw:name="Text Placeholder 3" svg:x="2.40411in" svg:y="5.9903in" svg:width="6.60856in" svg:height="0.5567in" presentation:class="outline" presentation:placeholder="false">
        <draw:text-box>
          <text:list text:style-name="a1082">
            <text:list-item>
              <text:p text:style-name="a1081" text:class-names="" text:cond-style-name=""><text:span text:style-name="a1080" text:class-names="">Edit text</text:span></text:p>
            </text:list-item>
          </text:list>
        </draw:text-box>
        <svg:title/>
        <svg:desc/>
      </draw:frame>
      <draw:frame draw:id="id204" presentation:style-name="a1086" draw:name="Picture Placeholder 2" svg:x="0.88163in" svg:y="5.65835in" svg:width="0.84696in" svg:height="0.89169in" presentation:class="graphic" presentation:placeholder="false">
        <draw:text-box>
          <text:p text:style-name="a1085" text:class-names="" text:cond-style-name=""><text:span text:style-name="a1084" text:class-names="">Click icon to add picture</text:span></text:p>
        </draw:text-box>
        <svg:title/>
        <svg:desc/>
      </draw:frame>
      <draw:frame draw:id="id205" presentation:style-name="a1090" draw:name="Text Placeholder 46" svg:x="2.40411in" svg:y="5.6557in" svg:width="6.60856in" svg:height="0.32299in" presentation:class="outline" presentation:placeholder="false">
        <draw:text-box>
          <text:list text:style-name="a1089">
            <text:list-item>
              <text:p text:style-name="a1088" text:class-names="" text:cond-style-name=""><text:span text:style-name="a1087" text:class-names="">Click to edit title</text:span></text:p>
            </text:list-item>
          </text:list>
        </draw:text-box>
        <svg:title/>
        <svg:desc/>
      </draw:frame>
      <draw:frame draw:id="id206" presentation:style-name="a1093" draw:name="Slide Number Placeholder 5" svg:x="4.89868in" svg:y="6.77418in" svg:width="0.51437in" svg:height="0.39931in" presentation:class="page-number" presentation:placeholder="false">
        <draw:text-box>
          <text:p text:style-name="a1092" text:class-names="" text:cond-style-name=""><text:span text:style-name="a1091" text:class-names=""><text:page-number style:num-format="1" text:fixed="false"/></text:span></text:p>
        </draw:text-box>
        <svg:title/>
        <svg:desc/>
      </draw:frame>
      <draw:frame draw:id="id207" presentation:style-name="a1096" draw:name="Title Placeholder 1" svg:x="1.30303in" svg:y="0.40138in" svg:width="7.2018in" svg:height="0.79856in" presentation:class="title" presentation:placeholder="false">
        <draw:text-box>
          <text:p text:style-name="a1095" text:class-names="" text:cond-style-name=""><text:span text:style-name="a1094" text:class-names="">Click to edit title</text:span></text:p>
        </draw:text-box>
        <svg:title/>
        <svg:desc/>
      </draw:frame>
      <presentation:notes style:page-layout-name="pageLayout2" draw:style-name="a1135">
        <draw:frame draw:id="id13" presentation:style-name="a1108" draw:name="Header Placeholder 1" svg:x="0in" svg:y="0in" svg:width="3.32222in" svg:height="0.5101in" presentation:class="header" presentation:placeholder="false">
          <draw:text-box>
            <text:p text:style-name="a1107" text:class-names="" text:cond-style-name=""><text:span text:style-name="a1106" text:class-names=""/></text:p>
          </draw:text-box>
          <svg:title/>
          <svg:desc/>
        </draw:frame>
        <draw:frame draw:id="id14" presentation:style-name="a1112" draw:name="Date Placeholder 2" svg:x="4.34267in" svg:y="0in" svg:width="3.32222in" svg:height="0.5101in" presentation:class="date-time" presentation:placeholder="false">
          <draw:text-box>
            <text:p text:style-name="a1111" text:class-names="" text:cond-style-name=""><text:span text:style-name="a1109" text:class-names=""><text:date text:fixed="false" style:data-style-name="a1110">2/15/2026</text:date></text:span></text:p>
          </draw:text-box>
          <svg:title/>
          <svg:desc/>
        </draw:frame>
        <draw:page-thumbnail svg:x="1.54688in" svg:y="1.27083in" svg:width="4.57292in" svg:height="3.43056in" presentation:class="page" draw:id="id15" presentation:style-name="a1113" draw:name="Slide Image Placeholder 3">
          <svg:title/>
          <svg:desc/>
        </draw:page-thumbnail>
        <draw:frame draw:id="id16" presentation:style-name="a1128" draw:name="Notes Placeholder 4" svg:x="0.76667in" svg:y="4.89271in" svg:width="6.13333in" svg:height="4.00313in" presentation:class="notes" presentation:placeholder="false">
          <draw:text-box>
            <text:p text:style-name="a1115" text:class-names="" text:cond-style-name=""><text:span text:style-name="a1114" text:class-names="">Click to edit Master text styles</text:span></text:p>
            <text:list text:style-name="a1118">
              <text:list-item>
                <text:list text:style-name="a1118">
                  <text:list-item>
                    <text:p text:style-name="a1117" text:class-names="" text:cond-style-name=""><text:span text:style-name="a1116" text:class-names="">Second level</text:span></text:p>
                  </text:list-item>
                </text:list>
              </text:list-item>
            </text:list>
            <text:list text:style-name="a1121">
              <text:list-item>
                <text:list text:style-name="a1121">
                  <text:list-item>
                    <text:list text:style-name="a1121">
                      <text:list-item>
                        <text:p text:style-name="a1120" text:class-names="" text:cond-style-name=""><text:span text:style-name="a1119" text:class-names="">Third level</text:span></text:p>
                      </text:list-item>
                    </text:list>
                  </text:list-item>
                </text:list>
              </text:list-item>
            </text:list>
            <text:list text:style-name="a1124">
              <text:list-item>
                <text:list text:style-name="a1124">
                  <text:list-item>
                    <text:list text:style-name="a1124">
                      <text:list-item>
                        <text:list text:style-name="a1124">
                          <text:list-item>
                            <text:p text:style-name="a1123" text:class-names="" text:cond-style-name=""><text:span text:style-name="a1122" text:class-names="">Fourth level</text:span></text:p>
                          </text:list-item>
                        </text:list>
                      </text:list-item>
                    </text:list>
                  </text:list-item>
                </text:list>
              </text:list-item>
            </text:list>
            <text:list text:style-name="a1127">
              <text:list-item>
                <text:list text:style-name="a1127">
                  <text:list-item>
                    <text:list text:style-name="a1127">
                      <text:list-item>
                        <text:list text:style-name="a1127">
                          <text:list-item>
                            <text:list text:style-name="a1127">
                              <text:list-item>
                                <text:p text:style-name="a1126" text:class-names="" text:cond-style-name=""><text:span text:style-name="a1125" text:class-names="">Fifth level</text:span></text:p>
                              </text:list-item>
                            </text:list>
                          </text:list-item>
                        </text:list>
                      </text:list-item>
                    </text:list>
                  </text:list-item>
                </text:list>
              </text:list-item>
            </text:list>
          </draw:text-box>
          <svg:title/>
          <svg:desc/>
        </draw:frame>
        <draw:frame draw:id="id17" presentation:style-name="a1131" draw:name="Footer Placeholder 5" svg:x="0in" svg:y="9.65657in" svg:width="3.32222in" svg:height="0.5101in" presentation:class="footer" presentation:placeholder="false">
          <draw:text-box>
            <text:p text:style-name="a1130" text:class-names="" text:cond-style-name=""><text:span text:style-name="a1129" text:class-names=""/></text:p>
          </draw:text-box>
          <svg:title/>
          <svg:desc/>
        </draw:frame>
        <draw:frame draw:id="id18" presentation:style-name="a1134" draw:name="Slide Number Placeholder 6" svg:x="4.34267in" svg:y="9.65657in" svg:width="3.32222in" svg:height="0.5101in" presentation:class="page-number" presentation:placeholder="false">
          <draw:text-box>
            <text:p text:style-name="a1133" text:class-names="" text:cond-style-name=""><text:span text:style-name="a1132" text:class-names=""><text:page-number style:num-format="1" text:fixed="false"/></text:span></text:p>
          </draw:text-box>
          <svg:title/>
          <svg:desc/>
        </draw:frame>
      </presentation:notes>
    </style:master-page>
    <style:master-page style:name="Master1-Layout20-cust-Vertical-Icon,-Header,-Paragraph" style:page-layout-name="pageLayout1" draw:style-name="a1136">
      <draw:frame draw:id="id211" draw:layer="Master1-bg" draw:style-name="a1137" draw:name="Picture 31" svg:x="0.12029in" svg:y="7.12207in" svg:width="0.36324in" svg:height="0.27765in" style:rel-width="scale" style:rel-height="scale">
        <draw:image xlink:href="media/image19.png" xlink:type="simple" xlink:show="embed" xlink:actuate="onLoad"/>
        <svg:title/>
        <svg:desc/>
      </draw:frame>
      <draw:g draw:name="Group 13" draw:id="id212">
        <svg:title/>
        <svg:desc/>
        <draw:custom-shape svg:width="0.13823in" svg:height="9.65059in" draw:id="id225" draw:layer="Master1-bg" draw:style-name="a1177" draw:transform="translate(-0.06911in -4.82529in) rotate(-1.5708) translate(4.93089in 0.16101in)" draw:name="Rectangle 14">
          <svg:title/>
          <svg:desc/>
          <text:p text:style-name="a1176" text:class-names="" text:cond-style-name=""><text:span text:style-name="a1175" text:class-names=""/></text:p>
          <draw:enhanced-geometry xmlns:dr3d="urn:oasis:names:tc:opendocument:xmlns:dr3d:1.0" draw:type="non-primitive" svg:viewBox="0 0 21600 21600" draw:enhanced-path="M 0 0 L 21600 0 21600 21600 0 21600 Z N"/>
        </draw:custom-shape>
        <draw:custom-shape svg:x="9.75618in" svg:y="0.0919in" svg:width="0.13823in" svg:height="0.36061in" draw:id="id226" draw:layer="Master1-bg" draw:style-name="a1180" draw:name="Rectangle 15">
          <svg:title/>
          <svg:desc/>
          <text:p text:style-name="a1179" text:class-names="" text:cond-style-name=""><text:span text:style-name="a1178" text:class-names=""/></text:p>
          <draw:enhanced-geometry xmlns:dr3d="urn:oasis:names:tc:opendocument:xmlns:dr3d:1.0" draw:type="non-primitive" svg:viewBox="0 0 21600 21600" draw:enhanced-path="M 0 0 L 21600 0 21600 21600 0 21600 Z N"/>
        </draw:custom-shape>
        <draw:custom-shape svg:x="0.10559in" svg:y="0.0919in" svg:width="0.13823in" svg:height="0.36061in" draw:id="id227" draw:layer="Master1-bg" draw:style-name="a1183" draw:name="Rectangle 17">
          <svg:title/>
          <svg:desc/>
          <text:p text:style-name="a1182" text:class-names="" text:cond-style-name=""><text:span text:style-name="a1181" text:class-names=""/></text:p>
          <draw:enhanced-geometry xmlns:dr3d="urn:oasis:names:tc:opendocument:xmlns:dr3d:1.0" draw:type="non-primitive" svg:viewBox="0 0 21600 21600" draw:enhanced-path="M 0 0 L 21600 0 21600 21600 0 21600 Z N"/>
        </draw:custom-shape>
      </draw:g>
      <draw:custom-shape svg:width="0.13823in" svg:height="9.20063in" draw:id="id213" draw:layer="Master1-bg" draw:style-name="a1140" draw:transform="translate(-0.06911in -4.60031in) rotate(-1.5708) translate(5.15586in 7.33714in)" draw:name="Rectangle 6">
        <svg:title/>
        <svg:desc/>
        <text:p text:style-name="a1139" text:class-names="" text:cond-style-name=""><text:span text:style-name="a1138" text:class-names=""/></text:p>
        <draw:enhanced-geometry xmlns:dr3d="urn:oasis:names:tc:opendocument:xmlns:dr3d:1.0" draw:type="non-primitive" svg:viewBox="0 0 21600 21600" draw:enhanced-path="M 0 0 L 21600 0 21600 21600 0 21600 Z N"/>
      </draw:custom-shape>
      <draw:custom-shape svg:x="9.75618in" svg:y="6.92059in" svg:width="0.13823in" svg:height="0.48746in" draw:id="id214" draw:layer="Master1-bg" draw:style-name="a1143" draw:name="Rectangle 30">
        <svg:title/>
        <svg:desc/>
        <text:p text:style-name="a1142" text:class-names="" text:cond-style-name=""><text:span text:style-name="a1141" text:class-names=""/></text:p>
        <draw:enhanced-geometry xmlns:dr3d="urn:oasis:names:tc:opendocument:xmlns:dr3d:1.0" draw:type="non-primitive" svg:viewBox="0 0 126396 445733" draw:enhanced-path="M ?f0 ?f0 L ?f1 ?f0 C ?f3 ?f4 ?f5 ?f6 ?f7 ?f8 L ?f0 ?f2 ?f0 ?f0 Z N" draw:text-areas="?f25 ?f27 ?f26 ?f28" draw:glue-points="?f29 ?f30 ?f31 ?f30 ?f32 ?f33 ?f29 ?f34 ?f29 ?f30" draw:glue-point-leaving-directions="-90, -90, -90, -90, -90">
          <draw:equation draw:name="f0" draw:formula="0"/>
          <draw:equation draw:name="f1" draw:formula="126396"/>
          <draw:equation draw:name="f2" draw:formula="445733"/>
          <draw:equation draw:name="f3" draw:formula="125338"/>
          <draw:equation draw:name="f4" draw:formula="108361"/>
          <draw:equation draw:name="f5" draw:formula="124279"/>
          <draw:equation draw:name="f6" draw:formula="216722"/>
          <draw:equation draw:name="f7" draw:formula="123221"/>
          <draw:equation draw:name="f8" draw:formula="325083"/>
          <draw:equation draw:name="f9" draw:formula="?f2 - ?f0"/>
          <draw:equation draw:name="f10" draw:formula="?f1 - ?f0"/>
          <draw:equation draw:name="f11" draw:formula="?f10 / 126396"/>
          <draw:equation draw:name="f12" draw:formula="?f9 / 445733"/>
          <draw:equation draw:name="f13" draw:formula="0 * ?f10"/>
          <draw:equation draw:name="f14" draw:formula="0 * ?f9"/>
          <draw:equation draw:name="f15" draw:formula="126396 * ?f10"/>
          <draw:equation draw:name="f16" draw:formula="445733 * ?f9"/>
          <draw:equation draw:name="f17" draw:formula="123221 * ?f10"/>
          <draw:equation draw:name="f18" draw:formula="325083 * ?f9"/>
          <draw:equation draw:name="f19" draw:formula="?f13 / 126396"/>
          <draw:equation draw:name="f20" draw:formula="?f14 / 445733"/>
          <draw:equation draw:name="f21" draw:formula="?f15 / 126396"/>
          <draw:equation draw:name="f22" draw:formula="?f16 / 445733"/>
          <draw:equation draw:name="f23" draw:formula="?f17 / 126396"/>
          <draw:equation draw:name="f24" draw:formula="?f18 / 445733"/>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3 / ?f11"/>
          <draw:equation draw:name="f33" draw:formula="?f24 / ?f12"/>
          <draw:equation draw:name="f34" draw:formula="?f22 / ?f12"/>
        </draw:enhanced-geometry>
      </draw:custom-shape>
      <draw:frame draw:id="id215" draw:layer="Master1-bg" draw:style-name="a1144" draw:name="Picture 11" svg:x="8.45383in" svg:y="6.85256in" svg:width="1.22953in" svg:height="0.33126in" style:rel-width="scale" style:rel-height="scale">
        <draw:image xlink:href="media/image20.png" xlink:type="simple" xlink:show="embed" xlink:actuate="onLoad"/>
        <svg:title/>
        <svg:desc>Text

Description automatically generated</svg:desc>
      </draw:frame>
      <draw:frame draw:id="id216" draw:layer="Master1-bg" draw:style-name="a1145" draw:name="Picture 12" svg:x="8.42949in" svg:y="0.16453in" svg:width="1.38651in" svg:height="0.67125in" style:rel-width="scale" style:rel-height="scale">
        <draw:image xlink:href="media/image21.png" xlink:type="simple" xlink:show="embed" xlink:actuate="onLoad"/>
        <svg:title/>
        <svg:desc/>
      </draw:frame>
      <draw:frame draw:id="id217" presentation:style-name="a1149" draw:name="Text Placeholder 46" svg:x="2.40411in" svg:y="2.68842in" svg:width="6.60856in" svg:height="0.32299in" presentation:class="outline" presentation:placeholder="false">
        <draw:text-box>
          <text:list text:style-name="a1148">
            <text:list-item>
              <text:p text:style-name="a1147" text:class-names="" text:cond-style-name=""><text:span text:style-name="a1146" text:class-names="">Click to edit title</text:span></text:p>
            </text:list-item>
          </text:list>
        </draw:text-box>
        <svg:title/>
        <svg:desc/>
      </draw:frame>
      <draw:frame draw:id="id218" presentation:style-name="a1153" draw:name="Text Placeholder 3" svg:x="2.40411in" svg:y="4.37003in" svg:width="6.60856in" svg:height="0.5567in" presentation:class="outline" presentation:placeholder="false">
        <draw:text-box>
          <text:list text:style-name="a1152">
            <text:list-item>
              <text:p text:style-name="a1151" text:class-names="" text:cond-style-name=""><text:span text:style-name="a1150" text:class-names="">Edit text</text:span></text:p>
            </text:list-item>
          </text:list>
        </draw:text-box>
        <svg:title/>
        <svg:desc/>
      </draw:frame>
      <draw:frame draw:id="id219" presentation:style-name="a1156" draw:name="Picture Placeholder 2" svg:x="0.88163in" svg:y="4.03808in" svg:width="0.84696in" svg:height="0.89169in" presentation:class="graphic" presentation:placeholder="false">
        <draw:text-box>
          <text:p text:style-name="a1155" text:class-names="" text:cond-style-name=""><text:span text:style-name="a1154" text:class-names="">Click icon to add picture</text:span></text:p>
        </draw:text-box>
        <svg:title/>
        <svg:desc/>
      </draw:frame>
      <draw:frame draw:id="id220" presentation:style-name="a1160" draw:name="Text Placeholder 46" svg:x="2.40411in" svg:y="4.03543in" svg:width="6.60856in" svg:height="0.32299in" presentation:class="outline" presentation:placeholder="false">
        <draw:text-box>
          <text:list text:style-name="a1159">
            <text:list-item>
              <text:p text:style-name="a1158" text:class-names="" text:cond-style-name=""><text:span text:style-name="a1157" text:class-names="">Click to edit title</text:span></text:p>
            </text:list-item>
          </text:list>
        </draw:text-box>
        <svg:title/>
        <svg:desc/>
      </draw:frame>
      <draw:frame draw:id="id221" presentation:style-name="a1164" draw:name="Text Placeholder 3" svg:x="2.40411in" svg:y="5.6541in" svg:width="6.60856in" svg:height="0.5567in" presentation:class="outline" presentation:placeholder="false">
        <draw:text-box>
          <text:list text:style-name="a1163">
            <text:list-item>
              <text:p text:style-name="a1162" text:class-names="" text:cond-style-name=""><text:span text:style-name="a1161" text:class-names="">Edit text</text:span></text:p>
            </text:list-item>
          </text:list>
        </draw:text-box>
        <svg:title/>
        <svg:desc/>
      </draw:frame>
      <draw:frame draw:id="id222" presentation:style-name="a1167" draw:name="Picture Placeholder 2" svg:x="0.88163in" svg:y="5.32215in" svg:width="0.84696in" svg:height="0.89169in" presentation:class="graphic" presentation:placeholder="false">
        <draw:text-box>
          <text:p text:style-name="a1166" text:class-names="" text:cond-style-name=""><text:span text:style-name="a1165" text:class-names="">Click icon to add picture</text:span></text:p>
        </draw:text-box>
        <svg:title/>
        <svg:desc/>
      </draw:frame>
      <draw:frame draw:id="id223" presentation:style-name="a1171" draw:name="Text Placeholder 46" svg:x="2.40411in" svg:y="5.3195in" svg:width="6.60856in" svg:height="0.32299in" presentation:class="outline" presentation:placeholder="false">
        <draw:text-box>
          <text:list text:style-name="a1170">
            <text:list-item>
              <text:p text:style-name="a1169" text:class-names="" text:cond-style-name=""><text:span text:style-name="a1168" text:class-names="">Click to edit title</text:span></text:p>
            </text:list-item>
          </text:list>
        </draw:text-box>
        <svg:title/>
        <svg:desc/>
      </draw:frame>
      <draw:frame draw:id="id224" presentation:style-name="a1174" draw:name="Slide Number Placeholder 5" svg:x="4.89868in" svg:y="6.77418in" svg:width="0.51437in" svg:height="0.39931in" presentation:class="page-number" presentation:placeholder="false">
        <draw:text-box>
          <text:p text:style-name="a1173" text:class-names="" text:cond-style-name=""><text:span text:style-name="a1172" text:class-names=""><text:page-number style:num-format="1" text:fixed="false"/></text:span></text:p>
        </draw:text-box>
        <svg:title/>
        <svg:desc/>
      </draw:frame>
      <presentation:notes style:page-layout-name="pageLayout2" draw:style-name="a1213">
        <draw:frame draw:id="id13" presentation:style-name="a1186" draw:name="Header Placeholder 1" svg:x="0in" svg:y="0in" svg:width="3.32222in" svg:height="0.5101in" presentation:class="header" presentation:placeholder="false">
          <draw:text-box>
            <text:p text:style-name="a1185" text:class-names="" text:cond-style-name=""><text:span text:style-name="a1184" text:class-names=""/></text:p>
          </draw:text-box>
          <svg:title/>
          <svg:desc/>
        </draw:frame>
        <draw:frame draw:id="id14" presentation:style-name="a1190" draw:name="Date Placeholder 2" svg:x="4.34267in" svg:y="0in" svg:width="3.32222in" svg:height="0.5101in" presentation:class="date-time" presentation:placeholder="false">
          <draw:text-box>
            <text:p text:style-name="a1189" text:class-names="" text:cond-style-name=""><text:span text:style-name="a1187" text:class-names=""><text:date text:fixed="false" style:data-style-name="a1188">2/15/2026</text:date></text:span></text:p>
          </draw:text-box>
          <svg:title/>
          <svg:desc/>
        </draw:frame>
        <draw:page-thumbnail svg:x="1.54688in" svg:y="1.27083in" svg:width="4.57292in" svg:height="3.43056in" presentation:class="page" draw:id="id15" presentation:style-name="a1191" draw:name="Slide Image Placeholder 3">
          <svg:title/>
          <svg:desc/>
        </draw:page-thumbnail>
        <draw:frame draw:id="id16" presentation:style-name="a1206" draw:name="Notes Placeholder 4" svg:x="0.76667in" svg:y="4.89271in" svg:width="6.13333in" svg:height="4.00313in" presentation:class="notes" presentation:placeholder="false">
          <draw:text-box>
            <text:p text:style-name="a1193" text:class-names="" text:cond-style-name=""><text:span text:style-name="a1192" text:class-names="">Click to edit Master text styles</text:span></text:p>
            <text:list text:style-name="a1196">
              <text:list-item>
                <text:list text:style-name="a1196">
                  <text:list-item>
                    <text:p text:style-name="a1195" text:class-names="" text:cond-style-name=""><text:span text:style-name="a1194" text:class-names="">Second level</text:span></text:p>
                  </text:list-item>
                </text:list>
              </text:list-item>
            </text:list>
            <text:list text:style-name="a1199">
              <text:list-item>
                <text:list text:style-name="a1199">
                  <text:list-item>
                    <text:list text:style-name="a1199">
                      <text:list-item>
                        <text:p text:style-name="a1198" text:class-names="" text:cond-style-name=""><text:span text:style-name="a1197" text:class-names="">Third level</text:span></text:p>
                      </text:list-item>
                    </text:list>
                  </text:list-item>
                </text:list>
              </text:list-item>
            </text:list>
            <text:list text:style-name="a1202">
              <text:list-item>
                <text:list text:style-name="a1202">
                  <text:list-item>
                    <text:list text:style-name="a1202">
                      <text:list-item>
                        <text:list text:style-name="a1202">
                          <text:list-item>
                            <text:p text:style-name="a1201" text:class-names="" text:cond-style-name=""><text:span text:style-name="a1200" text:class-names="">Fourth level</text:span></text:p>
                          </text:list-item>
                        </text:list>
                      </text:list-item>
                    </text:list>
                  </text:list-item>
                </text:list>
              </text:list-item>
            </text:list>
            <text:list text:style-name="a1205">
              <text:list-item>
                <text:list text:style-name="a1205">
                  <text:list-item>
                    <text:list text:style-name="a1205">
                      <text:list-item>
                        <text:list text:style-name="a1205">
                          <text:list-item>
                            <text:list text:style-name="a1205">
                              <text:list-item>
                                <text:p text:style-name="a1204" text:class-names="" text:cond-style-name=""><text:span text:style-name="a1203" text:class-names="">Fifth level</text:span></text:p>
                              </text:list-item>
                            </text:list>
                          </text:list-item>
                        </text:list>
                      </text:list-item>
                    </text:list>
                  </text:list-item>
                </text:list>
              </text:list-item>
            </text:list>
          </draw:text-box>
          <svg:title/>
          <svg:desc/>
        </draw:frame>
        <draw:frame draw:id="id17" presentation:style-name="a1209" draw:name="Footer Placeholder 5" svg:x="0in" svg:y="9.65657in" svg:width="3.32222in" svg:height="0.5101in" presentation:class="footer" presentation:placeholder="false">
          <draw:text-box>
            <text:p text:style-name="a1208" text:class-names="" text:cond-style-name=""><text:span text:style-name="a1207" text:class-names=""/></text:p>
          </draw:text-box>
          <svg:title/>
          <svg:desc/>
        </draw:frame>
        <draw:frame draw:id="id18" presentation:style-name="a1212" draw:name="Slide Number Placeholder 6" svg:x="4.34267in" svg:y="9.65657in" svg:width="3.32222in" svg:height="0.5101in" presentation:class="page-number" presentation:placeholder="false">
          <draw:text-box>
            <text:p text:style-name="a1211" text:class-names="" text:cond-style-name=""><text:span text:style-name="a1210" text:class-names=""><text:page-number style:num-format="1" text:fixed="false"/></text:span></text:p>
          </draw:text-box>
          <svg:title/>
          <svg:desc/>
        </draw:frame>
      </presentation:notes>
    </style:master-page>
    <style:handout-master style:page-layout-name="pageLayout3" draw:style-name="a1214">
      <draw:frame draw:id="id228" presentation:style-name="a1217" draw:name="Header Placeholder 1" svg:x="0in" svg:y="0in" svg:width="3.32222in" svg:height="0.5101in" presentation:class="header" presentation:placeholder="false">
        <draw:text-box>
          <text:p text:style-name="a1216" text:class-names="" text:cond-style-name=""><text:span text:style-name="a1215" text:class-names=""/></text:p>
        </draw:text-box>
        <svg:title/>
        <svg:desc/>
      </draw:frame>
      <draw:frame draw:id="id229" presentation:style-name="a1221" draw:name="Date Placeholder 2" svg:x="4.34267in" svg:y="0in" svg:width="3.32222in" svg:height="0.5101in" presentation:class="date-time" presentation:placeholder="false">
        <draw:text-box>
          <text:p text:style-name="a1220" text:class-names="" text:cond-style-name=""><text:span text:style-name="a1218" text:class-names=""><text:date text:fixed="false" style:data-style-name="a1219">2/15/2026</text:date></text:span></text:p>
        </draw:text-box>
        <svg:title/>
        <svg:desc/>
      </draw:frame>
      <draw:frame draw:id="id230" presentation:style-name="a1224" draw:name="Footer Placeholder 3" svg:x="0in" svg:y="9.65657in" svg:width="3.32222in" svg:height="0.5101in" presentation:class="footer" presentation:placeholder="false">
        <draw:text-box>
          <text:p text:style-name="a1223" text:class-names="" text:cond-style-name=""><text:span text:style-name="a1222" text:class-names=""/></text:p>
        </draw:text-box>
        <svg:title/>
        <svg:desc/>
      </draw:frame>
      <draw:frame draw:id="id231" presentation:style-name="a1227" draw:name="Slide Number Placeholder 4" svg:x="4.34267in" svg:y="9.65657in" svg:width="3.32222in" svg:height="0.5101in" presentation:class="page-number" presentation:placeholder="false">
        <draw:text-box>
          <text:p text:style-name="a1226" text:class-names="" text:cond-style-name=""><text:span text:style-name="a1225" text:class-names=""><text:page-number style:num-format="1" text:fixed="false"/></text:span></text:p>
        </draw:text-box>
        <svg:title/>
        <svg:desc/>
      </draw:frame>
      <draw:page-thumbnail draw:page-number="1" svg:x="0.59549in" svg:y="1in" svg:width="2.93229in" svg:height="2.19965in"/>
      <draw:page-thumbnail draw:page-number="2" svg:x="3.97049in" svg:y="1in" svg:width="2.93229in" svg:height="2.19965in"/>
      <draw:page-thumbnail draw:page-number="3" svg:x="0.59549in" svg:y="3.89931in" svg:width="2.93229in" svg:height="2.19965in"/>
      <draw:page-thumbnail draw:page-number="4" svg:x="3.97049in" svg:y="3.89931in" svg:width="2.93229in" svg:height="2.19965in"/>
      <draw:page-thumbnail draw:page-number="5" svg:x="0.59549in" svg:y="6.79861in" svg:width="2.93229in" svg:height="2.19965in"/>
      <draw:page-thumbnail draw:page-number="6" svg:x="3.97049in" svg:y="6.79861in" svg:width="2.93229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Monthly VBDO Sync  July 2019</dc:title>
    <meta:initial-creator>SBA OVBD</meta:initial-creator>
    <dc:creator>Robert Sewell</dc:creator>
    <meta:creation-date>2019-07-09T20:09:35Z</meta:creation-date>
    <dc:date>2026-02-15T21:23:20Z</dc:date>
    <meta:print-date>2019-10-17T13:00:55Z</meta:print-date>
    <meta:editing-cycles>11</meta:editing-cycles>
    <meta:editing-duration>PT70171S</meta:editing-duration>
    <meta:user-defined meta:name="ContentTypeId">0x0101002F4BFECC814B6A4DA79CE86AB86465EC</meta:user-defined>
    <meta:user-defined meta:name="MediaServiceImageTags"/>
    <meta:document-statistic meta:paragraph-count="439" meta:word-count="4337"/>
  </office:meta>
</office:document-meta>
</file>